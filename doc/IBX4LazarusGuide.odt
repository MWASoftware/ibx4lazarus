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1900000019A9530BCF.png" manifest:media-type="image/png"/>
  <manifest:file-entry manifest:full-path="Pictures/1000000000000019000000191BC0D30D.png" manifest:media-type="image/png"/>
  <manifest:file-entry manifest:full-path="Pictures/1000000000000019000000195ABB68A0.png" manifest:media-type="image/png"/>
  <manifest:file-entry manifest:full-path="Pictures/10000000000000190000001980BE8BCC.png" manifest:media-type="image/png"/>
  <manifest:file-entry manifest:full-path="Pictures/100000000000001900000019358B1944.png" manifest:media-type="image/png"/>
  <manifest:file-entry manifest:full-path="Pictures/1000000000000019000000190522DB56.png" manifest:media-type="image/png"/>
  <manifest:file-entry manifest:full-path="Pictures/100000010000001900000019240033AF.png" manifest:media-type="image/png"/>
  <manifest:file-entry manifest:full-path="Pictures/10000000000000190000001905185DA1.png" manifest:media-type="image/png"/>
  <manifest:file-entry manifest:full-path="Pictures/1000000100000019000000198CDE5D53.png" manifest:media-type="image/png"/>
  <manifest:file-entry manifest:full-path="Pictures/100000010000001900000019BC0350E3.png" manifest:media-type="image/png"/>
  <manifest:file-entry manifest:full-path="Pictures/1000000100000019000000194A355D5E.png" manifest:media-type="image/png"/>
  <manifest:file-entry manifest:full-path="Pictures/1000000100000019000000198E2981B4.png" manifest:media-type="image/png"/>
  <manifest:file-entry manifest:full-path="Pictures/100000000000001900000019E31AFE46.png" manifest:media-type="image/png"/>
  <manifest:file-entry manifest:full-path="Pictures/1000000000000019000000191F9FD4A0.png" manifest:media-type="image/png"/>
  <manifest:file-entry manifest:full-path="Pictures/100000010000001900000019827962D3.png" manifest:media-type="image/png"/>
  <manifest:file-entry manifest:full-path="Pictures/10000000000002790000018BB8435797.png" manifest:media-type="image/png"/>
  <manifest:file-entry manifest:full-path="Pictures/100000000000001900000019930F54A6.png" manifest:media-type="image/png"/>
  <manifest:file-entry manifest:full-path="Pictures/10000000000000190000001976A8C125.png" manifest:media-type="image/png"/>
  <manifest:file-entry manifest:full-path="Pictures/1000000000000019000000194EA42036.png" manifest:media-type="image/png"/>
  <manifest:file-entry manifest:full-path="Pictures/10000000000000190000001986671082.png" manifest:media-type="image/png"/>
  <manifest:file-entry manifest:full-path="Pictures/100000000000030A0000024337B19296.png" manifest:media-type="image/png"/>
  <manifest:file-entry manifest:full-path="Pictures/1000000000000019000000199B4F2BFA.png" manifest:media-type="image/png"/>
  <manifest:file-entry manifest:full-path="Pictures/10000000000000190000001973A45AB2.png" manifest:media-type="image/png"/>
  <manifest:file-entry manifest:full-path="Pictures/1000000000000019000000199A48145C.png" manifest:media-type="image/png"/>
  <manifest:file-entry manifest:full-path="Pictures/10000000000000190000001965A75367.png" manifest:media-type="image/png"/>
  <manifest:file-entry manifest:full-path="Pictures/1000000000000019000000192676207B.png" manifest:media-type="image/png"/>
  <manifest:file-entry manifest:full-path="Pictures/10000000000000190000001943942CD6.png" manifest:media-type="image/png"/>
  <manifest:file-entry manifest:full-path="Pictures/100000010000001900000019CA73D5F4.png" manifest:media-type="image/png"/>
  <manifest:file-entry manifest:full-path="Pictures/100000010000001900000019EFC0A37E.png" manifest:media-type="image/png"/>
  <manifest:file-entry manifest:full-path="Pictures/100000000000001900000019A6B7E297.png" manifest:media-type="image/png"/>
  <manifest:file-entry manifest:full-path="Pictures/1000000000000019000000199B10632A.png" manifest:media-type="image/png"/>
  <manifest:file-entry manifest:full-path="Pictures/100000000000001900000019DC17AE9D.png" manifest:media-type="image/png"/>
  <manifest:file-entry manifest:full-path="Pictures/100000000000030E0000024A82A021B0.png" manifest:media-type="image/png"/>
  <manifest:file-entry manifest:full-path="Pictures/10000000000001E20000018C49E9BFBD.png" manifest:media-type="image/png"/>
  <manifest:file-entry manifest:full-path="Pictures/10000001000000190000001993DFF7DB.png" manifest:media-type="image/png"/>
  <manifest:file-entry manifest:full-path="Pictures/10000001000000190000001958E2CFA0.png" manifest:media-type="image/png"/>
  <manifest:file-entry manifest:full-path="Pictures/10000000000003AE000001FC9112FDB8.png" manifest:media-type="image/png"/>
  <manifest:file-entry manifest:full-path="Pictures/100000000000018C000000E116D4C6BC.png" manifest:media-type="image/png"/>
  <manifest:file-entry manifest:full-path="Pictures/100000010000001900000019062117C5.png" manifest:media-type="image/png"/>
  <manifest:file-entry manifest:full-path="Pictures/1000000100000019000000196D13A7C6.png" manifest:media-type="image/png"/>
  <manifest:file-entry manifest:full-path="Pictures/1000000000000019000000192DA9B8C8.png" manifest:media-type="image/png"/>
  <manifest:file-entry manifest:full-path="Pictures/100000000000032A000001E8BE2E9D05.png" manifest:media-type="image/png"/>
  <manifest:file-entry manifest:full-path="Pictures/100000010000001900000019A2A42BAF.png" manifest:media-type="image/png"/>
  <manifest:file-entry manifest:full-path="Pictures/10000001000000190000001930B14E3D.png" manifest:media-type="image/png"/>
  <manifest:file-entry manifest:full-path="Pictures/10000000000002EF00000205F0BA773E.png" manifest:media-type="image/png"/>
  <manifest:file-entry manifest:full-path="Pictures/100000010000001900000019E3FDC2AA.png" manifest:media-type="image/png"/>
  <manifest:file-entry manifest:full-path="Pictures/100000000000035A00000286A400F36E.png" manifest:media-type="image/png"/>
  <manifest:file-entry manifest:full-path="Pictures/100000000000001900000019115CBB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family-generic="system" style:font-pitch="variable"/>
    <style:font-face style:name="Droid Sans Mono" svg:font-family="'Droid Sans Mono'" style:font-adornments="Regular" style:font-family-generic="swiss" style:font-pitch="fixed"/>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style:font-face style:name="serif" svg:font-family="serif"/>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85" style:family="table">
      <style:table-properties style:width="6.6951in" table:align="margins" style:writing-mode="lr-tb"/>
    </style:style>
    <style:style style:name="Table85.A" style:family="table-column">
      <style:table-column-properties style:column-width="1.875in" style:rel-column-width="18355*"/>
    </style:style>
    <style:style style:name="Table85.B" style:family="table-column">
      <style:table-column-properties style:column-width="4.8201in" style:rel-column-width="47180*"/>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6951in" table:align="margins" style:writing-mode="lr-tb"/>
    </style:style>
    <style:style style:name="Table86.A" style:family="table-column">
      <style:table-column-properties style:column-width="1.691in" style:rel-column-width="16553*"/>
    </style:style>
    <style:style style:name="Table86.B" style:family="table-column">
      <style:table-column-properties style:column-width="5.0042in" style:rel-column-width="48982*"/>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7" style:family="table">
      <style:table-properties style:width="6.6951in" table:align="margins" style:writing-mode="lr-tb"/>
    </style:style>
    <style:style style:name="Table87.A" style:family="table-column">
      <style:table-column-properties style:column-width="2.5618in" style:rel-column-width="25077*"/>
    </style:style>
    <style:style style:name="Table87.B" style:family="table-column">
      <style:table-column-properties style:column-width="4.1333in" style:rel-column-width="40458*"/>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6951in" table:align="margins" style:writing-mode="lr-tb"/>
    </style:style>
    <style:style style:name="Table88.A" style:family="table-column">
      <style:table-column-properties style:column-width="2.5618in" style:rel-column-width="25077*"/>
    </style:style>
    <style:style style:name="Table88.B" style:family="table-column">
      <style:table-column-properties style:column-width="4.1333in" style:rel-column-width="40458*"/>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175dd25"/>
    </style:style>
    <style:style style:name="P1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6" style:family="paragraph" style:parent-style-name="Running_20_Footer">
      <style:paragraph-properties fo:margin-top="0in" fo:margin-bottom="0in" style:contextual-spacing="false" fo:line-height="100%" fo:padding="0in" fo:border="none">
        <style:tab-stops/>
      </style:paragraph-properties>
    </style:style>
    <style:style style:name="P17"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2" style:family="paragraph" style:parent-style-name="Text_20_body">
      <style:paragraph-properties fo:line-height="100%"/>
      <style:text-properties officeooo:paragraph-rsid="0133e009"/>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1" style:family="paragraph" style:parent-style-name="Standard">
      <style:paragraph-properties fo:margin-top="0in" fo:margin-bottom="0in" style:contextual-spacing="false"/>
    </style:style>
    <style:style style:name="P32"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3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34"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3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36" style:family="paragraph" style:parent-style-name="Text_20_body">
      <style:text-properties style:font-name="DejaVu Sans Mono" fo:font-size="10pt" officeooo:rsid="000f0e4b" officeooo:paragraph-rsid="013d90a7" style:font-size-asian="10pt" style:font-size-complex="10pt"/>
    </style:style>
    <style:style style:name="P37" style:family="paragraph" style:parent-style-name="Text_20_body">
      <style:paragraph-properties fo:margin-top="0in" fo:margin-bottom="0.1in" style:contextual-spacing="true"/>
      <style:text-properties style:font-name="DejaVu Sans Mono" fo:font-size="10pt" officeooo:rsid="000f0e4b" officeooo:paragraph-rsid="013d90a7" style:font-size-asian="10pt" style:font-size-complex="10pt"/>
    </style:style>
    <style:style style:name="P38" style:family="paragraph" style:parent-style-name="Text_20_body">
      <style:text-properties style:font-name="DejaVu Sans Mono" fo:font-size="10pt" officeooo:rsid="0181129d" officeooo:paragraph-rsid="0181129d" style:font-size-asian="10pt" style:font-size-complex="10pt"/>
    </style:style>
    <style:style style:name="P39" style:family="paragraph" style:parent-style-name="Text_20_body">
      <style:paragraph-properties fo:margin-top="0in" fo:margin-bottom="0.1in" style:contextual-spacing="true"/>
      <style:text-properties style:font-name="DejaVu Sans Mono" fo:font-size="10pt" officeooo:rsid="017f15c6" officeooo:paragraph-rsid="017f15c6" style:font-size-asian="10pt" style:font-size-complex="10pt"/>
    </style:style>
    <style:style style:name="P40" style:family="paragraph" style:parent-style-name="Standard">
      <style:text-properties style:font-name="DejaVu Sans Mono" fo:font-size="9pt" officeooo:rsid="00eab1bc" officeooo:paragraph-rsid="0173fcab" style:font-size-asian="9pt" style:font-size-complex="9pt"/>
    </style:style>
    <style:style style:name="P41" style:family="paragraph" style:parent-style-name="Table_20_Contents">
      <style:text-properties style:font-name="DejaVu Sans Mono" fo:font-size="9.5pt" officeooo:rsid="02428cee" officeooo:paragraph-rsid="02428cee" style:font-size-asian="8.30000019073486pt" style:font-size-complex="9.5pt"/>
    </style:style>
    <style:style style:name="P42" style:family="paragraph" style:parent-style-name="Text_20_body">
      <style:paragraph-properties fo:margin-top="0in" fo:margin-bottom="0.1in" style:contextual-spacing="true"/>
      <style:text-properties style:font-name="DejaVu Sans Mono" officeooo:rsid="000f0e4b" officeooo:paragraph-rsid="013d90a7"/>
    </style:style>
    <style:style style:name="P4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4" style:family="paragraph" style:parent-style-name="Text_20_body">
      <style:text-properties officeooo:rsid="001854e8" officeooo:paragraph-rsid="001854e8"/>
    </style:style>
    <style:style style:name="P45" style:family="paragraph" style:parent-style-name="Text_20_body">
      <style:text-properties officeooo:rsid="00b6bc63" officeooo:paragraph-rsid="00d03d2f"/>
    </style:style>
    <style:style style:name="P46" style:family="paragraph" style:parent-style-name="Text_20_body">
      <style:text-properties officeooo:paragraph-rsid="00d03d2f"/>
    </style:style>
    <style:style style:name="P47" style:family="paragraph" style:parent-style-name="Text_20_body">
      <style:text-properties officeooo:rsid="00d03d2f" officeooo:paragraph-rsid="00d03d2f"/>
    </style:style>
    <style:style style:name="P48" style:family="paragraph" style:parent-style-name="Text_20_body">
      <style:text-properties officeooo:paragraph-rsid="00d23a81"/>
    </style:style>
    <style:style style:name="P49" style:family="paragraph" style:parent-style-name="Text_20_body">
      <style:text-properties officeooo:rsid="0002d179" officeooo:paragraph-rsid="00d23a81"/>
    </style:style>
    <style:style style:name="P50" style:family="paragraph" style:parent-style-name="Text_20_body">
      <style:text-properties officeooo:rsid="000dc6a0" officeooo:paragraph-rsid="00d2a825"/>
    </style:style>
    <style:style style:name="P51" style:family="paragraph" style:parent-style-name="Text_20_body" style:master-page-name="">
      <style:paragraph-properties style:page-number="auto"/>
      <style:text-properties officeooo:rsid="000dc6a0" officeooo:paragraph-rsid="00d2a825"/>
    </style:style>
    <style:style style:name="P52" style:family="paragraph" style:parent-style-name="Text_20_body">
      <style:paragraph-properties fo:margin-left="0.4902in" fo:margin-right="0in" fo:text-indent="0in" style:auto-text-indent="false"/>
      <style:text-properties officeooo:rsid="000dc6a0" officeooo:paragraph-rsid="00d2a825"/>
    </style:style>
    <style:style style:name="P53" style:family="paragraph" style:parent-style-name="Text_20_body">
      <style:text-properties fo:font-style="normal" officeooo:paragraph-rsid="00d4375d" style:font-style-asian="normal" style:font-style-complex="normal"/>
    </style:style>
    <style:style style:name="P54" style:family="paragraph" style:parent-style-name="Text_20_body">
      <style:text-properties fo:font-style="normal" officeooo:paragraph-rsid="00dad200" style:font-style-asian="normal" style:font-style-complex="normal"/>
    </style:style>
    <style:style style:name="P55" style:family="paragraph" style:parent-style-name="Text_20_body">
      <style:text-properties fo:font-style="normal" officeooo:rsid="01261b53" officeooo:paragraph-rsid="01261b53" style:font-style-asian="normal" style:font-style-complex="normal"/>
    </style:style>
    <style:style style:name="P56" style:family="paragraph" style:parent-style-name="Text_20_body">
      <style:text-properties fo:font-style="normal" officeooo:rsid="01261b53" officeooo:paragraph-rsid="0126c516" style:font-style-asian="normal" style:font-style-complex="normal"/>
    </style:style>
    <style:style style:name="P57" style:family="paragraph" style:parent-style-name="Text_20_body">
      <style:text-properties fo:font-style="normal" officeooo:rsid="01ab4e00" officeooo:paragraph-rsid="01ab4e00" style:font-style-asian="normal" style:font-style-complex="normal"/>
    </style:style>
    <style:style style:name="P5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59" style:family="paragraph" style:parent-style-name="Text_20_body">
      <style:text-properties fo:font-style="normal" officeooo:rsid="0126c516" officeooo:paragraph-rsid="01c9e743" style:font-style-asian="normal" style:font-style-complex="normal"/>
    </style:style>
    <style:style style:name="P60" style:family="paragraph" style:parent-style-name="Text_20_body">
      <style:text-properties fo:font-style="normal" officeooo:rsid="0126c516" officeooo:paragraph-rsid="01ca1370" style:font-style-asian="normal" style:font-style-complex="normal"/>
    </style:style>
    <style:style style:name="P61" style:family="paragraph" style:parent-style-name="Text_20_body">
      <style:text-properties fo:font-style="normal" officeooo:rsid="01ca1370" officeooo:paragraph-rsid="01ca1370" style:font-style-asian="normal" style:font-style-complex="normal"/>
    </style:style>
    <style:style style:name="P62" style:family="paragraph" style:parent-style-name="Text_20_body">
      <style:text-properties fo:font-style="normal" officeooo:rsid="01ca1370" officeooo:paragraph-rsid="01cd3b97" style:font-style-asian="normal" style:font-style-complex="normal"/>
    </style:style>
    <style:style style:name="P63" style:family="paragraph" style:parent-style-name="Text_20_body">
      <style:text-properties fo:font-style="normal" officeooo:rsid="01cd3b97" officeooo:paragraph-rsid="01cd3b97" style:font-style-asian="normal" style:font-style-complex="normal"/>
    </style:style>
    <style:style style:name="P64" style:family="paragraph" style:parent-style-name="Text_20_body">
      <style:text-properties fo:font-style="normal" officeooo:rsid="01cf2619" officeooo:paragraph-rsid="01cf2619" style:font-style-asian="normal" style:font-style-complex="normal"/>
    </style:style>
    <style:style style:name="P65" style:family="paragraph" style:parent-style-name="Highlighted">
      <style:paragraph-properties fo:margin-left="0.5in" fo:margin-right="0in" fo:text-indent="0in" style:auto-text-indent="false"/>
      <style:text-properties fo:font-style="normal" style:font-style-asian="normal" style:font-style-complex="normal"/>
    </style:style>
    <style:style style:name="P66" style:family="paragraph" style:parent-style-name="Standard">
      <style:text-properties fo:font-style="normal" officeooo:rsid="00eaf163" officeooo:paragraph-rsid="00eaf163" style:font-style-asian="normal" style:font-style-complex="normal"/>
    </style:style>
    <style:style style:name="P67" style:family="paragraph" style:parent-style-name="Standard">
      <style:text-properties fo:font-style="normal" officeooo:rsid="0103b5ed" officeooo:paragraph-rsid="00eaf163" style:font-style-asian="normal" style:font-style-complex="normal"/>
    </style:style>
    <style:style style:name="P68" style:family="paragraph" style:parent-style-name="Text_20_body">
      <style:paragraph-properties fo:line-height="100%"/>
      <style:text-properties officeooo:rsid="001ec567" officeooo:paragraph-rsid="00d4375d"/>
    </style:style>
    <style:style style:name="P69" style:family="paragraph" style:parent-style-name="Text_20_body">
      <style:text-properties officeooo:rsid="001ec567" officeooo:paragraph-rsid="00d4375d"/>
    </style:style>
    <style:style style:name="P70" style:family="paragraph" style:parent-style-name="Text_20_body">
      <style:paragraph-properties fo:line-height="100%"/>
      <style:text-properties officeooo:rsid="0008c3fb" officeooo:paragraph-rsid="00d4375d"/>
    </style:style>
    <style:style style:name="P71" style:family="paragraph" style:parent-style-name="Text_20_body">
      <style:paragraph-properties fo:line-height="100%"/>
      <style:text-properties officeooo:rsid="000b8bb9" officeooo:paragraph-rsid="00d4375d"/>
    </style:style>
    <style:style style:name="P72" style:family="paragraph" style:parent-style-name="Text_20_body">
      <style:paragraph-properties fo:line-height="100%"/>
      <style:text-properties officeooo:rsid="0017c87a" officeooo:paragraph-rsid="00d4375d"/>
    </style:style>
    <style:style style:name="P73" style:family="paragraph" style:parent-style-name="Text_20_body">
      <style:paragraph-properties fo:line-height="100%"/>
      <style:text-properties officeooo:rsid="000def56" officeooo:paragraph-rsid="00d4375d"/>
    </style:style>
    <style:style style:name="P74" style:family="paragraph" style:parent-style-name="Text_20_body">
      <style:paragraph-properties fo:line-height="100%"/>
      <style:text-properties officeooo:rsid="0011a035" officeooo:paragraph-rsid="00d4375d"/>
    </style:style>
    <style:style style:name="P75" style:family="paragraph" style:parent-style-name="Text_20_body">
      <style:paragraph-properties fo:line-height="100%"/>
      <style:text-properties officeooo:rsid="0012b01e" officeooo:paragraph-rsid="00d4375d"/>
    </style:style>
    <style:style style:name="P76" style:family="paragraph" style:parent-style-name="Text_20_body">
      <style:paragraph-properties fo:line-height="100%"/>
      <style:text-properties officeooo:rsid="0017dc1b" officeooo:paragraph-rsid="00d4375d"/>
    </style:style>
    <style:style style:name="P77" style:family="paragraph" style:parent-style-name="Text_20_body">
      <style:paragraph-properties fo:line-height="100%"/>
      <style:text-properties officeooo:rsid="0019c221" officeooo:paragraph-rsid="00d4375d"/>
    </style:style>
    <style:style style:name="P78" style:family="paragraph" style:parent-style-name="Table_20_Contents">
      <style:paragraph-properties fo:margin-top="0.0799in" fo:margin-bottom="0.0799in" style:contextual-spacing="false" fo:line-height="100%"/>
      <style:text-properties officeooo:rsid="0019c221" officeooo:paragraph-rsid="00d4375d"/>
    </style:style>
    <style:style style:name="P79" style:family="paragraph" style:parent-style-name="Text_20_body">
      <style:paragraph-properties fo:line-height="100%"/>
      <style:text-properties officeooo:rsid="001b9191" officeooo:paragraph-rsid="00d4375d"/>
    </style:style>
    <style:style style:name="P80" style:family="paragraph" style:parent-style-name="Text_20_body">
      <style:paragraph-properties fo:line-height="100%"/>
      <style:text-properties officeooo:rsid="001bdc73" officeooo:paragraph-rsid="00d4375d"/>
    </style:style>
    <style:style style:name="P81" style:family="paragraph" style:parent-style-name="Text_20_body">
      <style:paragraph-properties fo:line-height="100%"/>
      <style:text-properties officeooo:rsid="000700b6"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paragraph-properties fo:margin-top="0in" fo:margin-bottom="0.1in" style:contextual-spacing="false"/>
      <style:text-properties officeooo:rsid="000f546c" officeooo:paragraph-rsid="00d61d85"/>
    </style:style>
    <style:style style:name="P84" style:family="paragraph" style:parent-style-name="Text_20_body">
      <style:text-properties officeooo:paragraph-rsid="00dad200"/>
    </style:style>
    <style:style style:name="P85" style:family="paragraph" style:parent-style-name="Text_20_body">
      <style:text-properties officeooo:paragraph-rsid="0101e6fc"/>
    </style:style>
    <style:style style:name="P86" style:family="paragraph" style:parent-style-name="Highlighted">
      <style:text-properties officeooo:paragraph-rsid="0101e6fc"/>
    </style:style>
    <style:style style:name="P87" style:family="paragraph" style:parent-style-name="Text_20_body">
      <style:text-properties officeooo:rsid="00fb3a7c" officeooo:paragraph-rsid="01eeca0c"/>
    </style:style>
    <style:style style:name="P88" style:family="paragraph" style:parent-style-name="Standard">
      <style:text-properties officeooo:rsid="00fb3a7c" officeooo:paragraph-rsid="01eeca0c"/>
    </style:style>
    <style:style style:name="P89" style:family="paragraph" style:parent-style-name="Table_20_Contents">
      <style:text-properties officeooo:rsid="00fb3a7c" officeooo:paragraph-rsid="01eeca0c"/>
    </style:style>
    <style:style style:name="P90" style:family="paragraph" style:parent-style-name="pascalcode">
      <style:text-properties officeooo:rsid="00fb3a7c" officeooo:paragraph-rsid="01eeca0c"/>
    </style:style>
    <style:style style:name="P91" style:family="paragraph" style:parent-style-name="Standard">
      <style:text-properties officeooo:rsid="00fb3a7c" officeooo:paragraph-rsid="01feed26"/>
    </style:style>
    <style:style style:name="P92" style:family="paragraph" style:parent-style-name="Standard">
      <style:text-properties officeooo:rsid="00fb3a7c" officeooo:paragraph-rsid="0209da56"/>
    </style:style>
    <style:style style:name="P93" style:family="paragraph" style:parent-style-name="Standard">
      <style:text-properties officeooo:rsid="00fb3a7c" officeooo:paragraph-rsid="02051d53"/>
    </style:style>
    <style:style style:name="P94" style:family="paragraph" style:parent-style-name="Table_20_Contents">
      <style:text-properties officeooo:rsid="00fb3a7c" officeooo:paragraph-rsid="00fb3a7c"/>
    </style:style>
    <style:style style:name="P95" style:family="paragraph" style:parent-style-name="Text_20_body">
      <style:text-properties officeooo:rsid="00ff6b5c" officeooo:paragraph-rsid="01eeca0c"/>
    </style:style>
    <style:style style:name="P96" style:family="paragraph" style:parent-style-name="Standard">
      <style:text-properties officeooo:rsid="00ff6b5c" officeooo:paragraph-rsid="01eeca0c"/>
    </style:style>
    <style:style style:name="P97" style:family="paragraph" style:parent-style-name="pascalcode">
      <style:text-properties officeooo:rsid="00ff6b5c" officeooo:paragraph-rsid="01eeca0c"/>
    </style:style>
    <style:style style:name="P98" style:family="paragraph" style:parent-style-name="Standard">
      <style:text-properties officeooo:rsid="00ff6b5c" officeooo:paragraph-rsid="02051d53"/>
    </style:style>
    <style:style style:name="P99" style:family="paragraph" style:parent-style-name="pascalcode">
      <style:text-properties officeooo:rsid="00ff6b5c" officeooo:paragraph-rsid="02051d53"/>
    </style:style>
    <style:style style:name="P100" style:family="paragraph" style:parent-style-name="Standard">
      <style:text-properties officeooo:rsid="00ff6b5c" officeooo:paragraph-rsid="0209f0cf"/>
    </style:style>
    <style:style style:name="P101" style:family="paragraph" style:parent-style-name="pascalcode">
      <style:text-properties officeooo:rsid="00ff6b5c" officeooo:paragraph-rsid="0209f0cf"/>
    </style:style>
    <style:style style:name="P102" style:family="paragraph" style:parent-style-name="Text_20_body">
      <style:text-properties officeooo:rsid="0100eb3c" officeooo:paragraph-rsid="01eeca0c"/>
    </style:style>
    <style:style style:name="P103" style:family="paragraph" style:parent-style-name="Table_20_Contents">
      <style:text-properties officeooo:rsid="0100eb3c" officeooo:paragraph-rsid="01eeca0c"/>
    </style:style>
    <style:style style:name="P104" style:family="paragraph" style:parent-style-name="pascalcode">
      <style:text-properties officeooo:rsid="0100eb3c" officeooo:paragraph-rsid="01eeca0c"/>
    </style:style>
    <style:style style:name="P105" style:family="paragraph" style:parent-style-name="Text_20_body">
      <style:text-properties officeooo:rsid="0100eb3c" officeooo:paragraph-rsid="02051d53"/>
    </style:style>
    <style:style style:name="P106" style:family="paragraph" style:parent-style-name="Table_20_Contents">
      <style:text-properties officeooo:rsid="0100eb3c" officeooo:paragraph-rsid="02051d53"/>
    </style:style>
    <style:style style:name="P107" style:family="paragraph" style:parent-style-name="pascalcode">
      <style:text-properties officeooo:rsid="0100eb3c" officeooo:paragraph-rsid="02051d53"/>
    </style:style>
    <style:style style:name="P108" style:family="paragraph" style:parent-style-name="Text_20_body">
      <style:text-properties officeooo:rsid="00dc83f0" officeooo:paragraph-rsid="0101e6fc"/>
    </style:style>
    <style:style style:name="P109" style:family="paragraph" style:parent-style-name="Standard">
      <style:text-properties officeooo:rsid="00dc83f0" officeooo:paragraph-rsid="0101e6fc"/>
    </style:style>
    <style:style style:name="P110" style:family="paragraph" style:parent-style-name="Text_20_body">
      <style:text-properties officeooo:rsid="00dc83f0" officeooo:paragraph-rsid="01a7e2e2"/>
    </style:style>
    <style:style style:name="P111" style:family="paragraph" style:parent-style-name="Standard">
      <style:text-properties officeooo:rsid="00dc83f0" officeooo:paragraph-rsid="00dc83f0"/>
    </style:style>
    <style:style style:name="P112" style:family="paragraph" style:parent-style-name="Text_20_body">
      <style:text-properties officeooo:paragraph-rsid="010cb508"/>
    </style:style>
    <style:style style:name="P113" style:family="paragraph" style:parent-style-name="Standard">
      <style:text-properties officeooo:paragraph-rsid="010cb508"/>
    </style:style>
    <style:style style:name="P114" style:family="paragraph" style:parent-style-name="Text_20_body">
      <style:text-properties officeooo:rsid="0110d205" officeooo:paragraph-rsid="0110d205"/>
    </style:style>
    <style:style style:name="P115" style:family="paragraph" style:parent-style-name="Standard">
      <style:text-properties officeooo:rsid="0110d205" officeooo:paragraph-rsid="0110d205"/>
    </style:style>
    <style:style style:name="P116" style:family="paragraph" style:parent-style-name="Table_20_Contents">
      <style:text-properties officeooo:rsid="0110d205" officeooo:paragraph-rsid="0110d205"/>
    </style:style>
    <style:style style:name="P117" style:family="paragraph" style:parent-style-name="SQL">
      <style:text-properties officeooo:rsid="0110d205" officeooo:paragraph-rsid="0110d205"/>
    </style:style>
    <style:style style:name="P118" style:family="paragraph" style:parent-style-name="Table_20_Contents">
      <style:text-properties officeooo:rsid="0110d205" officeooo:paragraph-rsid="0113982d"/>
    </style:style>
    <style:style style:name="P119" style:family="paragraph" style:parent-style-name="Text_20_body">
      <style:text-properties officeooo:rsid="01128d0e" officeooo:paragraph-rsid="01128d0e"/>
    </style:style>
    <style:style style:name="P120" style:family="paragraph" style:parent-style-name="Standard">
      <style:text-properties officeooo:rsid="01128d0e" officeooo:paragraph-rsid="01128d0e"/>
    </style:style>
    <style:style style:name="P121" style:family="paragraph" style:parent-style-name="Text_20_body">
      <style:text-properties officeooo:rsid="0113982d" officeooo:paragraph-rsid="0113982d"/>
    </style:style>
    <style:style style:name="P122" style:family="paragraph" style:parent-style-name="Table_20_Contents">
      <style:text-properties officeooo:rsid="0113982d" officeooo:paragraph-rsid="0113982d"/>
    </style:style>
    <style:style style:name="P123" style:family="paragraph" style:parent-style-name="Text_20_body">
      <style:text-properties officeooo:rsid="011414b7" officeooo:paragraph-rsid="011414b7"/>
    </style:style>
    <style:style style:name="P124" style:family="paragraph" style:parent-style-name="Standard">
      <style:text-properties officeooo:rsid="011414b7" officeooo:paragraph-rsid="011414b7"/>
    </style:style>
    <style:style style:name="P125" style:family="paragraph" style:parent-style-name="Table_20_Contents">
      <style:text-properties officeooo:rsid="011414b7" officeooo:paragraph-rsid="011414b7"/>
    </style:style>
    <style:style style:name="P126" style:family="paragraph" style:parent-style-name="SQL">
      <style:text-properties officeooo:rsid="011414b7" officeooo:paragraph-rsid="011414b7"/>
    </style:style>
    <style:style style:name="P127" style:family="paragraph" style:parent-style-name="pascalcode">
      <style:text-properties officeooo:rsid="011414b7" officeooo:paragraph-rsid="011414b7"/>
    </style:style>
    <style:style style:name="P128" style:family="paragraph" style:parent-style-name="pascalcode">
      <style:text-properties officeooo:rsid="011414b7" officeooo:paragraph-rsid="0114226a"/>
    </style:style>
    <style:style style:name="P129" style:family="paragraph" style:parent-style-name="Text_20_body">
      <style:text-properties officeooo:rsid="0114226a" officeooo:paragraph-rsid="0114226a"/>
    </style:style>
    <style:style style:name="P130" style:family="paragraph" style:parent-style-name="Standard">
      <style:text-properties officeooo:rsid="0114226a" officeooo:paragraph-rsid="0114226a"/>
    </style:style>
    <style:style style:name="P131" style:family="paragraph" style:parent-style-name="SQL">
      <style:text-properties officeooo:rsid="0114226a" officeooo:paragraph-rsid="0114226a"/>
    </style:style>
    <style:style style:name="P132" style:family="paragraph" style:parent-style-name="pascalcode">
      <style:text-properties officeooo:rsid="0114226a" officeooo:paragraph-rsid="0114226a"/>
    </style:style>
    <style:style style:name="P133" style:family="paragraph" style:parent-style-name="Highlighted">
      <style:text-properties officeooo:rsid="0114226a" officeooo:paragraph-rsid="0114226a"/>
    </style:style>
    <style:style style:name="P134" style:family="paragraph" style:parent-style-name="Text_20_body">
      <style:text-properties officeooo:rsid="011a3ced" officeooo:paragraph-rsid="011a3ced"/>
    </style:style>
    <style:style style:name="P135" style:family="paragraph" style:parent-style-name="Standard">
      <style:text-properties officeooo:rsid="011a3ced" officeooo:paragraph-rsid="011a3ced"/>
    </style:style>
    <style:style style:name="P136" style:family="paragraph" style:parent-style-name="Table_20_Contents">
      <style:text-properties officeooo:rsid="011a3ced" officeooo:paragraph-rsid="011a3ced"/>
    </style:style>
    <style:style style:name="P137" style:family="paragraph" style:parent-style-name="Text_20_body">
      <style:text-properties officeooo:rsid="012406f5" officeooo:paragraph-rsid="012406f5"/>
    </style:style>
    <style:style style:name="P138" style:family="paragraph" style:parent-style-name="Standard">
      <style:text-properties officeooo:rsid="012406f5" officeooo:paragraph-rsid="012406f5"/>
    </style:style>
    <style:style style:name="P139" style:family="paragraph" style:parent-style-name="Text_20_body">
      <style:text-properties officeooo:rsid="01241079" officeooo:paragraph-rsid="01241079"/>
    </style:style>
    <style:style style:name="P140" style:family="paragraph" style:parent-style-name="Standard">
      <style:text-properties officeooo:rsid="01241079" officeooo:paragraph-rsid="01241079"/>
    </style:style>
    <style:style style:name="P141" style:family="paragraph" style:parent-style-name="Table_20_Contents">
      <style:text-properties officeooo:rsid="01241079" officeooo:paragraph-rsid="01241079"/>
    </style:style>
    <style:style style:name="P142" style:family="paragraph" style:parent-style-name="SQL">
      <style:text-properties officeooo:rsid="01241079" officeooo:paragraph-rsid="01241079"/>
    </style:style>
    <style:style style:name="P143" style:family="paragraph" style:parent-style-name="pascalcode">
      <style:text-properties officeooo:rsid="01241079" officeooo:paragraph-rsid="01241079"/>
    </style:style>
    <style:style style:name="P144" style:family="paragraph" style:parent-style-name="Text_20_body">
      <style:text-properties officeooo:paragraph-rsid="0127d356"/>
    </style:style>
    <style:style style:name="P145" style:family="paragraph" style:parent-style-name="pascalcode">
      <style:text-properties officeooo:paragraph-rsid="0127d356"/>
    </style:style>
    <style:style style:name="P146" style:family="paragraph" style:parent-style-name="Text_20_body">
      <style:text-properties officeooo:rsid="012a6598" officeooo:paragraph-rsid="012a6598"/>
    </style:style>
    <style:style style:name="P147" style:family="paragraph" style:parent-style-name="Text_20_body">
      <style:paragraph-properties fo:line-height="100%"/>
      <style:text-properties officeooo:rsid="0133e009" officeooo:paragraph-rsid="0133e009"/>
    </style:style>
    <style:style style:name="P148" style:family="paragraph" style:parent-style-name="Text_20_body">
      <style:text-properties officeooo:rsid="01387aa4" officeooo:paragraph-rsid="01387aa4"/>
    </style:style>
    <style:style style:name="P149" style:family="paragraph" style:parent-style-name="Standard">
      <style:text-properties officeooo:rsid="01387aa4" officeooo:paragraph-rsid="01387aa4"/>
    </style:style>
    <style:style style:name="P150" style:family="paragraph" style:parent-style-name="Text_20_body">
      <style:text-properties officeooo:rsid="000b99a7" officeooo:paragraph-rsid="013d90a7"/>
    </style:style>
    <style:style style:name="P151" style:family="paragraph" style:parent-style-name="Text_20_body">
      <style:text-properties officeooo:rsid="000b99a7" officeooo:paragraph-rsid="01675a79"/>
    </style:style>
    <style:style style:name="P152" style:family="paragraph" style:parent-style-name="Text_20_body">
      <style:text-properties officeooo:rsid="000b99a7" officeooo:paragraph-rsid="018321cd"/>
    </style:style>
    <style:style style:name="P153" style:family="paragraph" style:parent-style-name="Text_20_body">
      <style:text-properties officeooo:rsid="000b99a7" officeooo:paragraph-rsid="01adef96"/>
    </style:style>
    <style:style style:name="P154" style:family="paragraph" style:parent-style-name="Text_20_body">
      <style:text-properties officeooo:rsid="000e960b" officeooo:paragraph-rsid="013d90a7"/>
    </style:style>
    <style:style style:name="P155" style:family="paragraph" style:parent-style-name="Text_20_body">
      <style:text-properties officeooo:rsid="00016212" officeooo:paragraph-rsid="013d90a7"/>
    </style:style>
    <style:style style:name="P156" style:family="paragraph" style:parent-style-name="Text_20_body">
      <style:text-properties fo:font-weight="bold" officeooo:rsid="000e960b" officeooo:paragraph-rsid="013d90a7" style:font-weight-asian="bold" style:font-weight-complex="bold"/>
    </style:style>
    <style:style style:name="P15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8"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59" style:family="paragraph" style:parent-style-name="Table_20_Contents">
      <style:text-properties fo:font-weight="bold" officeooo:rsid="00013f83" officeooo:paragraph-rsid="00d4375d" style:font-weight-asian="bold" style:font-weight-complex="bold"/>
    </style:style>
    <style:style style:name="P160" style:family="paragraph" style:parent-style-name="Table_20_Contents">
      <style:text-properties fo:font-weight="bold" officeooo:paragraph-rsid="00d4375d" style:font-weight-asian="bold" style:font-weight-complex="bold"/>
    </style:style>
    <style:style style:name="P16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16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163" style:family="paragraph" style:parent-style-name="Table_20_Contents">
      <style:text-properties fo:font-weight="bold" officeooo:rsid="01174121" officeooo:paragraph-rsid="01174121" style:font-weight-asian="bold" style:font-weight-complex="bold"/>
    </style:style>
    <style:style style:name="P16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165" style:family="paragraph" style:parent-style-name="Table_20_Contents">
      <style:text-properties fo:font-weight="bold" officeooo:rsid="0192065a" officeooo:paragraph-rsid="0192065a" style:font-weight-asian="bold" style:font-weight-complex="bold"/>
    </style:style>
    <style:style style:name="P166"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167" style:family="paragraph" style:parent-style-name="Text_20_body">
      <style:text-properties officeooo:rsid="000f0e4b" officeooo:paragraph-rsid="013d90a7"/>
    </style:style>
    <style:style style:name="P168" style:family="paragraph" style:parent-style-name="Text_20_body">
      <style:text-properties officeooo:rsid="000f0e4b" officeooo:paragraph-rsid="0181129d"/>
    </style:style>
    <style:style style:name="P169" style:family="paragraph" style:parent-style-name="Text_20_body">
      <style:text-properties officeooo:rsid="000787fc" officeooo:paragraph-rsid="013d90a7"/>
    </style:style>
    <style:style style:name="P170" style:family="paragraph" style:parent-style-name="Text_20_body">
      <style:text-properties officeooo:rsid="0003f3cf" officeooo:paragraph-rsid="013d90a7"/>
    </style:style>
    <style:style style:name="P171" style:family="paragraph" style:parent-style-name="Text_20_body">
      <style:text-properties officeooo:rsid="01455bf5" officeooo:paragraph-rsid="01455bf5"/>
    </style:style>
    <style:style style:name="P172" style:family="paragraph" style:parent-style-name="Standard">
      <style:text-properties officeooo:rsid="01455bf5" officeooo:paragraph-rsid="01455bf5"/>
    </style:style>
    <style:style style:name="P173" style:family="paragraph" style:parent-style-name="pascalcode">
      <style:text-properties officeooo:rsid="01455bf5" officeooo:paragraph-rsid="01455bf5"/>
    </style:style>
    <style:style style:name="P174" style:family="paragraph" style:parent-style-name="Text_20_body">
      <style:text-properties officeooo:rsid="010f8efe" officeooo:paragraph-rsid="010f8efe"/>
    </style:style>
    <style:style style:name="P175" style:family="paragraph" style:parent-style-name="Standard">
      <style:text-properties officeooo:rsid="010f8efe" officeooo:paragraph-rsid="010f8efe"/>
    </style:style>
    <style:style style:name="P176" style:family="paragraph" style:parent-style-name="Table_20_Contents">
      <style:text-properties officeooo:rsid="010f8efe" officeooo:paragraph-rsid="010f8efe"/>
    </style:style>
    <style:style style:name="P177" style:family="paragraph" style:parent-style-name="pascalcode">
      <style:text-properties officeooo:rsid="010f8efe" officeooo:paragraph-rsid="010f8efe"/>
    </style:style>
    <style:style style:name="P178" style:family="paragraph" style:parent-style-name="Highlighted">
      <style:text-properties officeooo:rsid="010f8efe" officeooo:paragraph-rsid="010f8efe"/>
    </style:style>
    <style:style style:name="P179" style:family="paragraph" style:parent-style-name="Text_20_body">
      <style:text-properties officeooo:rsid="014b359c" officeooo:paragraph-rsid="014b359c"/>
    </style:style>
    <style:style style:name="P180" style:family="paragraph" style:parent-style-name="Table_20_Contents">
      <style:text-properties officeooo:rsid="014b359c" officeooo:paragraph-rsid="014b359c"/>
    </style:style>
    <style:style style:name="P181" style:family="paragraph" style:parent-style-name="Text_20_body">
      <style:text-properties officeooo:rsid="01193c89" officeooo:paragraph-rsid="01193c89"/>
    </style:style>
    <style:style style:name="P182" style:family="paragraph" style:parent-style-name="Text_20_body">
      <style:paragraph-properties fo:line-height="100%"/>
      <style:text-properties officeooo:rsid="000993e7" officeooo:paragraph-rsid="00d4375d"/>
    </style:style>
    <style:style style:name="P183" style:family="paragraph" style:parent-style-name="Text_20_body">
      <style:paragraph-properties fo:line-height="100%"/>
      <style:text-properties officeooo:rsid="001452d2" officeooo:paragraph-rsid="00d4375d"/>
    </style:style>
    <style:style style:name="P184" style:family="paragraph" style:parent-style-name="Text_20_body">
      <style:paragraph-properties fo:line-height="100%"/>
      <style:text-properties officeooo:rsid="0015d523" officeooo:paragraph-rsid="00d4375d"/>
    </style:style>
    <style:style style:name="P185" style:family="paragraph" style:parent-style-name="Text_20_body">
      <style:text-properties officeooo:rsid="01512986" officeooo:paragraph-rsid="01512986"/>
    </style:style>
    <style:style style:name="P186" style:family="paragraph" style:parent-style-name="Table_20_Contents">
      <style:paragraph-properties fo:margin-top="0in" fo:margin-bottom="0.1701in" style:contextual-spacing="false"/>
      <style:text-properties officeooo:rsid="01512986" officeooo:paragraph-rsid="01512986"/>
    </style:style>
    <style:style style:name="P187" style:family="paragraph" style:parent-style-name="Table_20_Contents">
      <style:text-properties officeooo:rsid="01512986" officeooo:paragraph-rsid="01512986"/>
    </style:style>
    <style:style style:name="P188" style:family="paragraph" style:parent-style-name="Table_20_Contents">
      <style:text-properties officeooo:rsid="01512986" officeooo:paragraph-rsid="01783caf"/>
    </style:style>
    <style:style style:name="P189" style:family="paragraph" style:parent-style-name="Text_20_body">
      <style:text-properties officeooo:rsid="0109a371" officeooo:paragraph-rsid="0109a371"/>
    </style:style>
    <style:style style:name="P190" style:family="paragraph" style:parent-style-name="pascalcode" style:master-page-name="">
      <style:paragraph-properties style:page-number="auto" fo:break-before="auto" fo:break-after="auto"/>
      <style:text-properties officeooo:rsid="0109a371" officeooo:paragraph-rsid="0109a371"/>
    </style:style>
    <style:style style:name="P191" style:family="paragraph" style:parent-style-name="Standard">
      <style:text-properties officeooo:rsid="0109a371" officeooo:paragraph-rsid="0109a371"/>
    </style:style>
    <style:style style:name="P192" style:family="paragraph" style:parent-style-name="Table_20_Contents">
      <style:text-properties officeooo:rsid="0109a371" officeooo:paragraph-rsid="0109a371"/>
    </style:style>
    <style:style style:name="P193" style:family="paragraph" style:parent-style-name="pascalcode">
      <style:text-properties officeooo:rsid="0109a371" officeooo:paragraph-rsid="0109a371"/>
    </style:style>
    <style:style style:name="P194" style:family="paragraph" style:parent-style-name="Text_20_body">
      <style:text-properties officeooo:rsid="0156fb83" officeooo:paragraph-rsid="0156fb83"/>
    </style:style>
    <style:style style:name="P195" style:family="paragraph" style:parent-style-name="Text_20_body">
      <style:text-properties officeooo:rsid="0141ab2f" officeooo:paragraph-rsid="0159282f"/>
    </style:style>
    <style:style style:name="P196" style:family="paragraph" style:parent-style-name="Text_20_body">
      <style:text-properties officeooo:rsid="0141ab2f" officeooo:paragraph-rsid="0141ab2f"/>
    </style:style>
    <style:style style:name="P197" style:family="paragraph" style:parent-style-name="Standard" style:master-page-name="">
      <style:paragraph-properties style:page-number="auto" fo:break-before="auto" fo:break-after="auto"/>
      <style:text-properties officeooo:rsid="0141ab2f" officeooo:paragraph-rsid="0141ab2f"/>
    </style:style>
    <style:style style:name="P198" style:family="paragraph" style:parent-style-name="SQL">
      <style:text-properties officeooo:rsid="0141ab2f" officeooo:paragraph-rsid="0141ab2f"/>
    </style:style>
    <style:style style:name="P199" style:family="paragraph" style:parent-style-name="Text_20_body">
      <style:text-properties officeooo:rsid="01596760" officeooo:paragraph-rsid="01596760"/>
    </style:style>
    <style:style style:name="P200" style:family="paragraph" style:parent-style-name="SQL">
      <style:text-properties officeooo:rsid="01596760" officeooo:paragraph-rsid="01596760"/>
    </style:style>
    <style:style style:name="P201" style:family="paragraph" style:parent-style-name="Highlighted">
      <style:text-properties officeooo:rsid="01596760" officeooo:paragraph-rsid="01596760"/>
    </style:style>
    <style:style style:name="P202" style:family="paragraph" style:parent-style-name="Text_20_body">
      <style:text-properties fo:font-weight="normal" officeooo:rsid="000b99a7" officeooo:paragraph-rsid="013d90a7" style:font-weight-asian="normal" style:font-weight-complex="normal"/>
    </style:style>
    <style:style style:name="P203" style:family="paragraph" style:parent-style-name="Text_20_body">
      <style:paragraph-properties fo:line-height="100%"/>
      <style:text-properties fo:font-weight="normal" officeooo:rsid="000993e7" officeooo:paragraph-rsid="00d4375d" style:font-weight-asian="normal" style:font-weight-complex="normal"/>
    </style:style>
    <style:style style:name="P204" style:family="paragraph" style:parent-style-name="Text_20_body">
      <style:paragraph-properties fo:line-height="100%"/>
      <style:text-properties fo:font-weight="normal" officeooo:rsid="000b8bb9" officeooo:paragraph-rsid="00d4375d" style:font-weight-asian="normal" style:font-weight-complex="normal"/>
    </style:style>
    <style:style style:name="P205" style:family="paragraph" style:parent-style-name="Text_20_body">
      <style:paragraph-properties fo:line-height="100%"/>
      <style:text-properties fo:font-weight="normal" officeooo:rsid="001452d2" officeooo:paragraph-rsid="00d4375d" style:font-weight-asian="normal" style:font-weight-complex="normal"/>
    </style:style>
    <style:style style:name="P206" style:family="paragraph" style:parent-style-name="Text_20_body">
      <style:paragraph-properties fo:line-height="100%"/>
      <style:text-properties fo:font-weight="normal" officeooo:rsid="0015d523" officeooo:paragraph-rsid="00d4375d" style:font-weight-asian="normal" style:font-weight-complex="normal"/>
    </style:style>
    <style:style style:name="P207" style:family="paragraph" style:parent-style-name="Text_20_body">
      <style:text-properties fo:font-weight="normal" officeooo:rsid="017f05c4" officeooo:paragraph-rsid="017f05c4" style:font-weight-asian="normal" style:font-weight-complex="normal"/>
    </style:style>
    <style:style style:name="P208" style:family="paragraph" style:parent-style-name="Text_20_body">
      <style:text-properties fo:font-weight="normal" officeooo:rsid="018e1cb3" officeooo:paragraph-rsid="018e1cb3" style:font-weight-asian="normal" style:font-weight-complex="normal"/>
    </style:style>
    <style:style style:name="P209" style:family="paragraph" style:parent-style-name="Text_20_body">
      <style:text-properties fo:font-weight="normal" officeooo:rsid="02174144" officeooo:paragraph-rsid="02174144" style:font-weight-asian="normal" style:font-weight-complex="normal"/>
    </style:style>
    <style:style style:name="P210" style:family="paragraph" style:parent-style-name="Text_20_body">
      <style:paragraph-properties fo:line-height="100%"/>
      <style:text-properties fo:font-weight="normal" officeooo:rsid="024faa1a" officeooo:paragraph-rsid="024faa1a" style:font-weight-asian="normal" style:font-weight-complex="normal"/>
    </style:style>
    <style:style style:name="P211" style:family="paragraph" style:parent-style-name="Text_20_body">
      <style:paragraph-properties fo:line-height="100%"/>
      <style:text-properties fo:font-weight="normal" officeooo:rsid="027617de" officeooo:paragraph-rsid="027617de" style:font-weight-asian="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Table_20_Contents">
      <style:text-properties fo:font-weight="normal" officeooo:rsid="017e7995" officeooo:paragraph-rsid="017e7995" style:font-weight-asian="normal" style:font-weight-complex="normal"/>
    </style:style>
    <style:style style:name="P214" style:family="paragraph" style:parent-style-name="Table_20_Contents">
      <style:text-properties fo:font-weight="normal" officeooo:rsid="017e7995" officeooo:paragraph-rsid="018740e3" style:font-weight-asian="normal" style:font-weight-complex="normal"/>
    </style:style>
    <style:style style:name="P215" style:family="paragraph" style:parent-style-name="Table_20_Contents">
      <style:text-properties fo:font-weight="normal" officeooo:paragraph-rsid="018740e3" style:font-weight-asian="normal" style:font-weight-complex="normal"/>
    </style:style>
    <style:style style:name="P216" style:family="paragraph" style:parent-style-name="Table_20_Contents">
      <style:text-properties fo:font-weight="normal" officeooo:rsid="018740e3" officeooo:paragraph-rsid="018740e3" style:font-weight-asian="normal" style:font-weight-complex="normal"/>
    </style:style>
    <style:style style:name="P217" style:family="paragraph" style:parent-style-name="Table_20_Contents">
      <style:text-properties fo:font-weight="normal" officeooo:rsid="01883cb8" officeooo:paragraph-rsid="01883cb8" style:font-weight-asian="normal" style:font-weight-complex="normal"/>
    </style:style>
    <style:style style:name="P218" style:family="paragraph" style:parent-style-name="Table_20_Contents">
      <style:text-properties fo:font-weight="normal" officeooo:rsid="024b38c8" officeooo:paragraph-rsid="024b38c8" style:font-weight-asian="normal" style:font-weight-complex="normal"/>
    </style:style>
    <style:style style:name="P219" style:family="paragraph" style:parent-style-name="Table_20_Contents">
      <style:text-properties fo:font-weight="normal" officeooo:rsid="024b38c8" officeooo:paragraph-rsid="024b551c" style:font-weight-asian="normal" style:font-weight-complex="normal"/>
    </style:style>
    <style:style style:name="P220" style:family="paragraph" style:parent-style-name="Table_20_Contents">
      <style:text-properties fo:font-weight="normal" officeooo:rsid="0250d175" officeooo:paragraph-rsid="0250d175" style:font-weight-asian="normal" style:font-weight-complex="normal"/>
    </style:style>
    <style:style style:name="P221" style:family="paragraph" style:parent-style-name="Table_20_Contents">
      <style:text-properties fo:font-weight="normal" officeooo:paragraph-rsid="0279e93f" style:font-weight-asian="normal" style:font-weight-complex="normal"/>
    </style:style>
    <style:style style:name="P222" style:family="paragraph" style:parent-style-name="Text_20_body">
      <style:text-properties officeooo:rsid="0135a4b6" officeooo:paragraph-rsid="016815a3"/>
    </style:style>
    <style:style style:name="P223" style:family="paragraph" style:parent-style-name="Standard">
      <style:text-properties officeooo:rsid="0135a4b6" officeooo:paragraph-rsid="016815a3"/>
    </style:style>
    <style:style style:name="P224" style:family="paragraph" style:parent-style-name="Standard">
      <style:text-properties officeooo:rsid="0135a4b6" officeooo:paragraph-rsid="013d90a7"/>
    </style:style>
    <style:style style:name="P225" style:family="paragraph" style:parent-style-name="Text_20_body">
      <style:text-properties officeooo:paragraph-rsid="016815a3"/>
    </style:style>
    <style:style style:name="P226" style:family="paragraph" style:parent-style-name="Text_20_body">
      <style:text-properties officeooo:rsid="017b531c" officeooo:paragraph-rsid="017b531c"/>
    </style:style>
    <style:style style:name="P227" style:family="paragraph" style:parent-style-name="Text_20_body">
      <style:text-properties officeooo:rsid="017b72ac" officeooo:paragraph-rsid="017b72ac"/>
    </style:style>
    <style:style style:name="P228" style:family="paragraph" style:parent-style-name="Standard">
      <style:text-properties officeooo:rsid="017b72ac" officeooo:paragraph-rsid="017b72ac"/>
    </style:style>
    <style:style style:name="P229" style:family="paragraph" style:parent-style-name="Text_20_body">
      <style:text-properties officeooo:rsid="017f05c4" officeooo:paragraph-rsid="017f05c4"/>
    </style:style>
    <style:style style:name="P230" style:family="paragraph" style:parent-style-name="Text_20_body">
      <style:text-properties officeooo:rsid="0181129d" officeooo:paragraph-rsid="0181129d"/>
    </style:style>
    <style:style style:name="P231" style:family="paragraph" style:parent-style-name="Text_20_body" style:master-page-name="">
      <style:paragraph-properties style:page-number="auto" fo:keep-with-next="always"/>
      <style:text-properties officeooo:rsid="0181129d" officeooo:paragraph-rsid="0181129d"/>
    </style:style>
    <style:style style:name="P232" style:family="paragraph" style:parent-style-name="Text_20_body">
      <style:text-properties officeooo:rsid="01818f8e" officeooo:paragraph-rsid="01818f8e"/>
    </style:style>
    <style:style style:name="P233" style:family="paragraph" style:parent-style-name="Standard">
      <style:text-properties officeooo:rsid="01818f8e" officeooo:paragraph-rsid="01818f8e"/>
    </style:style>
    <style:style style:name="P234" style:family="paragraph" style:parent-style-name="pascalcode">
      <style:text-properties officeooo:rsid="01818f8e" officeooo:paragraph-rsid="01818f8e"/>
    </style:style>
    <style:style style:name="P235" style:family="paragraph" style:parent-style-name="Text_20_body">
      <style:text-properties officeooo:rsid="0184fcbc" officeooo:paragraph-rsid="0184fcbc"/>
    </style:style>
    <style:style style:name="P236" style:family="paragraph" style:parent-style-name="Text_20_body">
      <style:text-properties officeooo:rsid="018740e3" officeooo:paragraph-rsid="018740e3"/>
    </style:style>
    <style:style style:name="P237" style:family="paragraph" style:parent-style-name="Standard">
      <style:text-properties officeooo:rsid="018740e3" officeooo:paragraph-rsid="018740e3"/>
    </style:style>
    <style:style style:name="P238" style:family="paragraph" style:parent-style-name="Table_20_Contents">
      <style:text-properties officeooo:rsid="018740e3" officeooo:paragraph-rsid="018740e3"/>
    </style:style>
    <style:style style:name="P239" style:family="paragraph" style:parent-style-name="pascalcode">
      <style:text-properties officeooo:rsid="018740e3" officeooo:paragraph-rsid="018740e3"/>
    </style:style>
    <style:style style:name="P240" style:family="paragraph" style:parent-style-name="Text_20_body">
      <style:text-properties officeooo:rsid="018b07f2" officeooo:paragraph-rsid="018b07f2"/>
    </style:style>
    <style:style style:name="P241" style:family="paragraph" style:parent-style-name="Table_20_Contents">
      <style:text-properties officeooo:rsid="018b07f2" officeooo:paragraph-rsid="018b07f2"/>
    </style:style>
    <style:style style:name="P242" style:family="paragraph" style:parent-style-name="Text_20_body">
      <style:text-properties officeooo:rsid="018e1cb3" officeooo:paragraph-rsid="018e1cb3"/>
    </style:style>
    <style:style style:name="P243" style:family="paragraph" style:parent-style-name="Text_20_body">
      <style:paragraph-properties fo:line-height="100%"/>
      <style:text-properties officeooo:rsid="00108c22" officeooo:paragraph-rsid="00d4375d"/>
    </style:style>
    <style:style style:name="P244" style:family="paragraph" style:parent-style-name="Text_20_body">
      <style:paragraph-properties fo:line-height="100%"/>
      <style:text-properties officeooo:rsid="01911aa6" officeooo:paragraph-rsid="01911aa6"/>
    </style:style>
    <style:style style:name="P245" style:family="paragraph" style:parent-style-name="Text_20_body">
      <style:text-properties officeooo:rsid="019940f7" officeooo:paragraph-rsid="019940f7"/>
    </style:style>
    <style:style style:name="P246" style:family="paragraph" style:parent-style-name="Standard">
      <style:text-properties officeooo:rsid="019940f7" officeooo:paragraph-rsid="019940f7"/>
    </style:style>
    <style:style style:name="P247" style:family="paragraph" style:parent-style-name="SQL">
      <style:text-properties officeooo:rsid="019940f7" officeooo:paragraph-rsid="019940f7"/>
    </style:style>
    <style:style style:name="P248" style:family="paragraph" style:parent-style-name="Text_20_body">
      <style:text-properties officeooo:rsid="01adef96" officeooo:paragraph-rsid="01adef96"/>
    </style:style>
    <style:style style:name="P249" style:family="paragraph" style:parent-style-name="Text_20_body">
      <style:text-properties officeooo:rsid="01b28d31" officeooo:paragraph-rsid="01b28d31"/>
    </style:style>
    <style:style style:name="P250" style:family="paragraph" style:parent-style-name="SQL">
      <style:text-properties officeooo:rsid="01b28d31" officeooo:paragraph-rsid="01b28d31"/>
    </style:style>
    <style:style style:name="P251" style:family="paragraph" style:parent-style-name="Text_20_body">
      <style:text-properties officeooo:rsid="01b51166" officeooo:paragraph-rsid="01b51166"/>
    </style:style>
    <style:style style:name="P252" style:family="paragraph" style:parent-style-name="pascalcode">
      <style:text-properties officeooo:rsid="01b51166" officeooo:paragraph-rsid="01b51166"/>
    </style:style>
    <style:style style:name="P253" style:family="paragraph" style:parent-style-name="pascalcode">
      <style:text-properties officeooo:rsid="01b51166" officeooo:paragraph-rsid="01b5c096"/>
    </style:style>
    <style:style style:name="P254" style:family="paragraph" style:parent-style-name="Text_20_body">
      <style:text-properties officeooo:rsid="01997f4b" officeooo:paragraph-rsid="01997f4b"/>
    </style:style>
    <style:style style:name="P255" style:family="paragraph" style:parent-style-name="Text_20_body">
      <style:text-properties officeooo:rsid="01c0b2bd" officeooo:paragraph-rsid="01c0b2bd"/>
    </style:style>
    <style:style style:name="P256" style:family="paragraph" style:parent-style-name="SQL">
      <style:paragraph-properties fo:margin-left="1in" fo:margin-right="0in" fo:text-indent="-0.3in" style:auto-text-indent="false"/>
      <style:text-properties officeooo:rsid="01c0b2bd" officeooo:paragraph-rsid="01c0b2bd"/>
    </style:style>
    <style:style style:name="P257" style:family="paragraph" style:parent-style-name="Text_20_body">
      <style:text-properties officeooo:rsid="01c7be54" officeooo:paragraph-rsid="01c7be54"/>
    </style:style>
    <style:style style:name="P258" style:family="paragraph" style:parent-style-name="Standard">
      <style:text-properties officeooo:rsid="01c7be54" officeooo:paragraph-rsid="01c7be54"/>
    </style:style>
    <style:style style:name="P259" style:family="paragraph" style:parent-style-name="Text_20_body">
      <style:text-properties officeooo:rsid="01be5d11" officeooo:paragraph-rsid="01be5d11"/>
    </style:style>
    <style:style style:name="P260" style:family="paragraph" style:parent-style-name="Highlighted">
      <style:text-properties officeooo:rsid="01be5d11" officeooo:paragraph-rsid="01be5d11"/>
    </style:style>
    <style:style style:name="P261" style:family="paragraph" style:parent-style-name="Text_20_body">
      <style:text-properties officeooo:rsid="01d2c2b3" officeooo:paragraph-rsid="01d2c2b3"/>
    </style:style>
    <style:style style:name="P262" style:family="paragraph" style:parent-style-name="Highlighted">
      <style:text-properties officeooo:rsid="01d2c2b3" officeooo:paragraph-rsid="01d2c2b3"/>
    </style:style>
    <style:style style:name="P263" style:family="paragraph" style:parent-style-name="Text_20_body">
      <style:text-properties officeooo:rsid="01d37fd7" officeooo:paragraph-rsid="01d37fd7"/>
    </style:style>
    <style:style style:name="P264" style:family="paragraph" style:parent-style-name="Highlighted">
      <style:text-properties officeooo:rsid="01d37fd7" officeooo:paragraph-rsid="01d37fd7"/>
    </style:style>
    <style:style style:name="P265" style:family="paragraph" style:parent-style-name="Text_20_body">
      <style:text-properties officeooo:rsid="01df824b" officeooo:paragraph-rsid="01df824b"/>
    </style:style>
    <style:style style:name="P266" style:family="paragraph" style:parent-style-name="Standard">
      <style:text-properties officeooo:rsid="01df824b" officeooo:paragraph-rsid="01df824b"/>
    </style:style>
    <style:style style:name="P267" style:family="paragraph" style:parent-style-name="pascalcode">
      <style:text-properties officeooo:rsid="01df824b" officeooo:paragraph-rsid="01df824b"/>
    </style:style>
    <style:style style:name="P268" style:family="paragraph" style:parent-style-name="Standard">
      <style:paragraph-properties fo:margin-top="0.0402in" fo:margin-bottom="0.0402in" style:contextual-spacing="false"/>
      <style:text-properties officeooo:rsid="01df824b" officeooo:paragraph-rsid="01df824b"/>
    </style:style>
    <style:style style:name="P269" style:family="paragraph" style:parent-style-name="Text_20_body">
      <style:paragraph-properties fo:margin-top="0.0402in" fo:margin-bottom="0.0402in" style:contextual-spacing="false"/>
      <style:text-properties officeooo:rsid="01df824b" officeooo:paragraph-rsid="01df824b"/>
    </style:style>
    <style:style style:name="P270" style:family="paragraph" style:parent-style-name="Text_20_body">
      <style:text-properties officeooo:rsid="01ddd893" officeooo:paragraph-rsid="01eeca0c"/>
    </style:style>
    <style:style style:name="P271" style:family="paragraph" style:parent-style-name="Text_20_body">
      <style:text-properties officeooo:rsid="01ddd893" officeooo:paragraph-rsid="01f8de69"/>
    </style:style>
    <style:style style:name="P272" style:family="paragraph" style:parent-style-name="Text_20_body">
      <style:text-properties officeooo:rsid="00f444df" officeooo:paragraph-rsid="01eeca0c"/>
    </style:style>
    <style:style style:name="P273" style:family="paragraph" style:parent-style-name="pascalcode">
      <style:text-properties officeooo:rsid="00f444df" officeooo:paragraph-rsid="01eeca0c"/>
    </style:style>
    <style:style style:name="P274" style:family="paragraph" style:parent-style-name="pascalcode">
      <style:text-properties officeooo:rsid="00f444df" officeooo:paragraph-rsid="01f9ec1c"/>
    </style:style>
    <style:style style:name="P275" style:family="paragraph" style:parent-style-name="pascalcode">
      <style:text-properties officeooo:rsid="00f444df" officeooo:paragraph-rsid="01f9f60c"/>
    </style:style>
    <style:style style:name="P276" style:family="paragraph" style:parent-style-name="Text_20_body">
      <style:text-properties officeooo:rsid="00f624c0" officeooo:paragraph-rsid="01eeca0c"/>
    </style:style>
    <style:style style:name="P277" style:family="paragraph" style:parent-style-name="Text_20_body">
      <style:text-properties officeooo:paragraph-rsid="00f7ac29"/>
    </style:style>
    <style:style style:name="P278" style:family="paragraph" style:parent-style-name="Text_20_body">
      <style:text-properties officeooo:paragraph-rsid="01eeca0c"/>
    </style:style>
    <style:style style:name="P279" style:family="paragraph" style:parent-style-name="Standard">
      <style:text-properties officeooo:paragraph-rsid="01eeca0c"/>
    </style:style>
    <style:style style:name="P280" style:family="paragraph" style:parent-style-name="Table_20_Contents">
      <style:text-properties officeooo:paragraph-rsid="01eeca0c"/>
    </style:style>
    <style:style style:name="P281" style:family="paragraph" style:parent-style-name="Highlighted">
      <style:text-properties officeooo:paragraph-rsid="01eeca0c"/>
    </style:style>
    <style:style style:name="P282" style:family="paragraph" style:parent-style-name="Text_20_body">
      <style:text-properties officeooo:rsid="01f9ec1c" officeooo:paragraph-rsid="01f9ec1c"/>
    </style:style>
    <style:style style:name="P283" style:family="paragraph" style:parent-style-name="Standard">
      <style:text-properties officeooo:rsid="01f9ec1c" officeooo:paragraph-rsid="01f9ec1c"/>
    </style:style>
    <style:style style:name="P284" style:family="paragraph" style:parent-style-name="Table_20_Contents">
      <style:text-properties officeooo:rsid="01f9ec1c" officeooo:paragraph-rsid="01f9ec1c"/>
    </style:style>
    <style:style style:name="P285" style:family="paragraph" style:parent-style-name="Text_20_body">
      <style:text-properties officeooo:rsid="01f9ec1c" officeooo:paragraph-rsid="01f9f60c"/>
    </style:style>
    <style:style style:name="P286" style:family="paragraph" style:parent-style-name="Table_20_Contents">
      <style:text-properties officeooo:rsid="01f9ec1c" officeooo:paragraph-rsid="01fc4913"/>
    </style:style>
    <style:style style:name="P287" style:family="paragraph" style:parent-style-name="Table_20_Contents">
      <style:text-properties officeooo:rsid="01f9ec1c" officeooo:paragraph-rsid="01fdcac1"/>
    </style:style>
    <style:style style:name="P288" style:family="paragraph" style:parent-style-name="Table_20_Contents">
      <style:text-properties officeooo:rsid="01f9ec1c" officeooo:paragraph-rsid="01feed26"/>
    </style:style>
    <style:style style:name="P289" style:family="paragraph" style:parent-style-name="Table_20_Contents">
      <style:text-properties officeooo:rsid="01f9ec1c" officeooo:paragraph-rsid="02011d3d"/>
    </style:style>
    <style:style style:name="P290" style:family="paragraph" style:parent-style-name="Table_20_Contents">
      <style:text-properties officeooo:rsid="01f9ec1c" officeooo:paragraph-rsid="02051d53"/>
    </style:style>
    <style:style style:name="P291" style:family="paragraph" style:parent-style-name="Table_20_Contents">
      <style:text-properties officeooo:rsid="01f9ec1c" officeooo:paragraph-rsid="0209da56"/>
    </style:style>
    <style:style style:name="P292" style:family="paragraph" style:parent-style-name="Text_20_body">
      <style:text-properties officeooo:rsid="01f9f60c" officeooo:paragraph-rsid="01f9f60c"/>
    </style:style>
    <style:style style:name="P293" style:family="paragraph" style:parent-style-name="pascalcode">
      <style:text-properties officeooo:rsid="01f9f60c" officeooo:paragraph-rsid="01f9f60c"/>
    </style:style>
    <style:style style:name="P294" style:family="paragraph" style:parent-style-name="Highlighted">
      <style:text-properties officeooo:rsid="01f9f60c" officeooo:paragraph-rsid="01f9f60c"/>
    </style:style>
    <style:style style:name="P295" style:family="paragraph" style:parent-style-name="Text_20_body">
      <style:text-properties officeooo:rsid="01f9f60c" officeooo:paragraph-rsid="01fabe1d"/>
    </style:style>
    <style:style style:name="P296" style:family="paragraph" style:parent-style-name="pascalcode">
      <style:text-properties officeooo:rsid="01f9f60c" officeooo:paragraph-rsid="01fabe1d"/>
    </style:style>
    <style:style style:name="P297" style:family="paragraph" style:parent-style-name="Highlighted">
      <style:text-properties officeooo:rsid="01f9f60c" officeooo:paragraph-rsid="01fc4913"/>
    </style:style>
    <style:style style:name="P298" style:family="paragraph" style:parent-style-name="Highlighted">
      <style:text-properties officeooo:rsid="01f9f60c" officeooo:paragraph-rsid="01feed26"/>
    </style:style>
    <style:style style:name="P299" style:family="paragraph" style:parent-style-name="Highlighted">
      <style:text-properties officeooo:rsid="01f9f60c" officeooo:paragraph-rsid="02051d53"/>
    </style:style>
    <style:style style:name="P300" style:family="paragraph" style:parent-style-name="Highlighted">
      <style:text-properties officeooo:rsid="01f9f60c" officeooo:paragraph-rsid="0209da56"/>
    </style:style>
    <style:style style:name="P301" style:family="paragraph" style:parent-style-name="Text_20_body">
      <style:text-properties officeooo:rsid="01feed26" officeooo:paragraph-rsid="01feed26"/>
    </style:style>
    <style:style style:name="P302" style:family="paragraph" style:parent-style-name="Table_20_Contents">
      <style:text-properties officeooo:rsid="01feed26" officeooo:paragraph-rsid="01feed26"/>
    </style:style>
    <style:style style:name="P303" style:family="paragraph" style:parent-style-name="pascalcode">
      <style:text-properties officeooo:rsid="01feed26" officeooo:paragraph-rsid="01feed26"/>
    </style:style>
    <style:style style:name="P304" style:family="paragraph" style:parent-style-name="Text_20_body">
      <style:text-properties officeooo:rsid="01feed26" officeooo:paragraph-rsid="02051d53"/>
    </style:style>
    <style:style style:name="P305" style:family="paragraph" style:parent-style-name="Table_20_Contents">
      <style:text-properties officeooo:rsid="01feed26" officeooo:paragraph-rsid="02051d53"/>
    </style:style>
    <style:style style:name="P306" style:family="paragraph" style:parent-style-name="pascalcode">
      <style:text-properties officeooo:rsid="01feed26" officeooo:paragraph-rsid="02051d53"/>
    </style:style>
    <style:style style:name="P307" style:family="paragraph" style:parent-style-name="Text_20_body">
      <style:text-properties officeooo:rsid="01feed26" officeooo:paragraph-rsid="02085f05"/>
    </style:style>
    <style:style style:name="P308" style:family="paragraph" style:parent-style-name="pascalcode">
      <style:text-properties officeooo:rsid="01feed26" officeooo:paragraph-rsid="02085f05"/>
    </style:style>
    <style:style style:name="P309" style:family="paragraph" style:parent-style-name="Text_20_body">
      <style:text-properties officeooo:rsid="0152f952" officeooo:paragraph-rsid="02011d3d"/>
    </style:style>
    <style:style style:name="P310" style:family="paragraph" style:parent-style-name="Text_20_body">
      <style:text-properties officeooo:rsid="02037047" officeooo:paragraph-rsid="02037047"/>
    </style:style>
    <style:style style:name="P311" style:family="paragraph" style:parent-style-name="Standard">
      <style:text-properties officeooo:rsid="02037047" officeooo:paragraph-rsid="02037047"/>
    </style:style>
    <style:style style:name="P312" style:family="paragraph" style:parent-style-name="Table_20_Contents">
      <style:text-properties officeooo:rsid="02037047" officeooo:paragraph-rsid="02037047"/>
    </style:style>
    <style:style style:name="P313" style:family="paragraph" style:parent-style-name="Text_20_body">
      <style:paragraph-properties fo:text-align="start" style:justify-single-word="false"/>
      <style:text-properties officeooo:rsid="02037047" officeooo:paragraph-rsid="02037047"/>
    </style:style>
    <style:style style:name="P314" style:family="paragraph" style:parent-style-name="Standard">
      <style:paragraph-properties fo:text-align="start" style:justify-single-word="false"/>
      <style:text-properties officeooo:rsid="02037047" officeooo:paragraph-rsid="02037047"/>
    </style:style>
    <style:style style:name="P315" style:family="paragraph" style:parent-style-name="Standard">
      <style:text-properties officeooo:rsid="02037047" officeooo:paragraph-rsid="020bc993"/>
    </style:style>
    <style:style style:name="P316" style:family="paragraph" style:parent-style-name="Table_20_Contents">
      <style:text-properties officeooo:rsid="02037047" officeooo:paragraph-rsid="020bc993"/>
    </style:style>
    <style:style style:name="P317" style:family="paragraph" style:parent-style-name="Text_20_body">
      <style:text-properties officeooo:rsid="02051d53" officeooo:paragraph-rsid="02051d53"/>
    </style:style>
    <style:style style:name="P318" style:family="paragraph" style:parent-style-name="Highlighted">
      <style:text-properties officeooo:rsid="02051d53" officeooo:paragraph-rsid="02051d53"/>
    </style:style>
    <style:style style:name="P319" style:family="paragraph" style:parent-style-name="After_20_Table">
      <style:text-properties officeooo:rsid="02051d53" officeooo:paragraph-rsid="02051d53"/>
    </style:style>
    <style:style style:name="P320" style:family="paragraph" style:parent-style-name="Text_20_body">
      <style:text-properties officeooo:rsid="020d9364" officeooo:paragraph-rsid="020d9364"/>
    </style:style>
    <style:style style:name="P321" style:family="paragraph" style:parent-style-name="Text_20_body">
      <style:text-properties officeooo:rsid="020d9364" officeooo:paragraph-rsid="020e2e35"/>
    </style:style>
    <style:style style:name="P322" style:family="paragraph" style:parent-style-name="pascalcode">
      <style:text-properties officeooo:rsid="020d9364" officeooo:paragraph-rsid="020e2e35"/>
    </style:style>
    <style:style style:name="P323" style:family="paragraph" style:parent-style-name="Text_20_body">
      <style:text-properties officeooo:rsid="020fc6cd" officeooo:paragraph-rsid="020fc6cd"/>
    </style:style>
    <style:style style:name="P324" style:family="paragraph" style:parent-style-name="Standard">
      <style:text-properties officeooo:rsid="020fc6cd" officeooo:paragraph-rsid="020fc6cd"/>
    </style:style>
    <style:style style:name="P325" style:family="paragraph" style:parent-style-name="pascalcode">
      <style:text-properties officeooo:rsid="020fc6cd" officeooo:paragraph-rsid="020fc6cd"/>
    </style:style>
    <style:style style:name="P326" style:family="paragraph" style:parent-style-name="Text_20_body">
      <style:text-properties officeooo:rsid="0210ca0f" officeooo:paragraph-rsid="0210ca0f"/>
    </style:style>
    <style:style style:name="P327" style:family="paragraph" style:parent-style-name="Text_20_body">
      <style:text-properties officeooo:rsid="020ecf61" officeooo:paragraph-rsid="021254a1"/>
    </style:style>
    <style:style style:name="P328" style:family="paragraph" style:parent-style-name="Standard">
      <style:text-properties officeooo:rsid="020ecf61" officeooo:paragraph-rsid="021254a1"/>
    </style:style>
    <style:style style:name="P329" style:family="paragraph" style:parent-style-name="pascalcode">
      <style:text-properties officeooo:rsid="020ecf61" officeooo:paragraph-rsid="021254a1"/>
    </style:style>
    <style:style style:name="P330" style:family="paragraph" style:parent-style-name="Text_20_body">
      <style:text-properties officeooo:rsid="02174144" officeooo:paragraph-rsid="02174144"/>
    </style:style>
    <style:style style:name="P331" style:family="paragraph" style:parent-style-name="Standard">
      <style:text-properties officeooo:rsid="02174144" officeooo:paragraph-rsid="02174144"/>
    </style:style>
    <style:style style:name="P332" style:family="paragraph" style:parent-style-name="pascalcode">
      <style:text-properties officeooo:rsid="02174144" officeooo:paragraph-rsid="02174144"/>
    </style:style>
    <style:style style:name="P333" style:family="paragraph" style:parent-style-name="Text_20_body">
      <style:text-properties officeooo:rsid="021917b0" officeooo:paragraph-rsid="021917b0"/>
    </style:style>
    <style:style style:name="P334" style:family="paragraph" style:parent-style-name="Standard">
      <style:text-properties officeooo:rsid="021917b0" officeooo:paragraph-rsid="021917b0"/>
    </style:style>
    <style:style style:name="P335" style:family="paragraph" style:parent-style-name="Text_20_body">
      <style:text-properties officeooo:paragraph-rsid="022d8458"/>
    </style:style>
    <style:style style:name="P336" style:family="paragraph" style:parent-style-name="Text_20_body">
      <style:text-properties officeooo:paragraph-rsid="022f4b38"/>
    </style:style>
    <style:style style:name="P337" style:family="paragraph" style:parent-style-name="Text_20_body">
      <style:text-properties officeooo:rsid="0238ad9b" officeooo:paragraph-rsid="0238ad9b"/>
    </style:style>
    <style:style style:name="P338" style:family="paragraph" style:parent-style-name="Standard">
      <style:text-properties officeooo:rsid="0238ad9b" officeooo:paragraph-rsid="0238ad9b"/>
    </style:style>
    <style:style style:name="P339" style:family="paragraph" style:parent-style-name="pascalcode">
      <style:text-properties officeooo:rsid="0238ad9b" officeooo:paragraph-rsid="0238ad9b"/>
    </style:style>
    <style:style style:name="P340" style:family="paragraph" style:parent-style-name="Text_20_body">
      <style:text-properties officeooo:rsid="0243bb48" officeooo:paragraph-rsid="0243bb48"/>
    </style:style>
    <style:style style:name="P341" style:family="paragraph" style:parent-style-name="Standard">
      <style:text-properties officeooo:rsid="0243bb48" officeooo:paragraph-rsid="0243bb48"/>
    </style:style>
    <style:style style:name="P342" style:family="paragraph" style:parent-style-name="Text_20_body">
      <style:text-properties officeooo:rsid="02497445" officeooo:paragraph-rsid="02497445"/>
    </style:style>
    <style:style style:name="P343" style:family="paragraph" style:parent-style-name="Table_20_Contents">
      <style:text-properties officeooo:rsid="02497445" officeooo:paragraph-rsid="02497445"/>
    </style:style>
    <style:style style:name="P344" style:family="paragraph" style:parent-style-name="Highlighted">
      <style:text-properties officeooo:rsid="02497445" officeooo:paragraph-rsid="02497445"/>
    </style:style>
    <style:style style:name="P345" style:family="paragraph" style:parent-style-name="Text_20_body">
      <style:paragraph-properties fo:line-height="100%"/>
      <style:text-properties officeooo:rsid="024faa1a" officeooo:paragraph-rsid="024faa1a"/>
    </style:style>
    <style:style style:name="P346" style:family="paragraph" style:parent-style-name="Text_20_body">
      <style:text-properties officeooo:rsid="010c1eae" officeooo:paragraph-rsid="010c1eae"/>
    </style:style>
    <style:style style:name="P347" style:family="paragraph" style:parent-style-name="Standard">
      <style:text-properties officeooo:rsid="010c1eae" officeooo:paragraph-rsid="010c1eae"/>
    </style:style>
    <style:style style:name="P348" style:family="paragraph" style:parent-style-name="pascalcode">
      <style:text-properties officeooo:rsid="010c1eae" officeooo:paragraph-rsid="010c1eae"/>
    </style:style>
    <style:style style:name="P349" style:family="paragraph" style:parent-style-name="Standard">
      <style:text-properties officeooo:rsid="010c1eae" officeooo:paragraph-rsid="0110d205"/>
    </style:style>
    <style:style style:name="P350" style:family="paragraph" style:parent-style-name="Text_20_body">
      <style:text-properties officeooo:rsid="02562d91" officeooo:paragraph-rsid="02562d91"/>
    </style:style>
    <style:style style:name="P351" style:family="paragraph" style:parent-style-name="pascalcode">
      <style:text-properties officeooo:rsid="02562d91" officeooo:paragraph-rsid="02562d91"/>
    </style:style>
    <style:style style:name="P352" style:family="paragraph" style:parent-style-name="Text_20_body">
      <style:text-properties officeooo:rsid="0275af6c" officeooo:paragraph-rsid="0275af6c"/>
    </style:style>
    <style:style style:name="P353" style:family="paragraph" style:parent-style-name="Standard">
      <style:text-properties officeooo:rsid="0275af6c" officeooo:paragraph-rsid="0275af6c"/>
    </style:style>
    <style:style style:name="P354" style:family="paragraph" style:parent-style-name="Text_20_body">
      <style:text-properties officeooo:paragraph-rsid="02780062"/>
    </style:style>
    <style:style style:name="P355" style:family="paragraph" style:parent-style-name="Text_20_body">
      <style:text-properties officeooo:rsid="02780062" officeooo:paragraph-rsid="02780062"/>
    </style:style>
    <style:style style:name="P356" style:family="paragraph" style:parent-style-name="Table_20_Contents">
      <style:text-properties officeooo:rsid="02780062" officeooo:paragraph-rsid="02780062"/>
    </style:style>
    <style:style style:name="P357" style:family="paragraph" style:parent-style-name="Text_20_body">
      <style:text-properties officeooo:rsid="01a2bd88" officeooo:paragraph-rsid="02780062"/>
    </style:style>
    <style:style style:name="P358" style:family="paragraph" style:parent-style-name="Text_20_body">
      <style:text-properties officeooo:rsid="01675a79" officeooo:paragraph-rsid="01675a79"/>
    </style:style>
    <style:style style:name="P359" style:family="paragraph" style:parent-style-name="Text_20_body">
      <style:text-properties officeooo:rsid="0008350d" officeooo:paragraph-rsid="027ff4f9"/>
    </style:style>
    <style:style style:name="P360" style:family="paragraph" style:parent-style-name="Text_20_body">
      <style:text-properties officeooo:rsid="000857f9" officeooo:paragraph-rsid="027ff4f9"/>
    </style:style>
    <style:style style:name="P361" style:family="paragraph" style:parent-style-name="Text_20_body">
      <style:text-properties officeooo:rsid="000ee136" officeooo:paragraph-rsid="027ff4f9"/>
    </style:style>
    <style:style style:name="P362" style:family="paragraph" style:parent-style-name="Text_20_body">
      <style:text-properties officeooo:paragraph-rsid="027ff4f9"/>
    </style:style>
    <style:style style:name="P363" style:family="paragraph" style:parent-style-name="Standard">
      <style:text-properties officeooo:paragraph-rsid="027ff4f9"/>
    </style:style>
    <style:style style:name="P364" style:family="paragraph" style:parent-style-name="Preformatted_20_Text">
      <style:text-properties officeooo:paragraph-rsid="027ff4f9"/>
    </style:style>
    <style:style style:name="P365" style:family="paragraph" style:parent-style-name="Table_20_Contents">
      <style:paragraph-properties fo:margin-top="0.0827in" fo:margin-bottom="0.0827in" style:contextual-spacing="false"/>
      <style:text-properties officeooo:paragraph-rsid="027ff4f9"/>
    </style:style>
    <style:style style:name="P366" style:family="paragraph" style:parent-style-name="Text_20_body">
      <style:text-properties officeooo:rsid="00282b24" officeooo:paragraph-rsid="027ff4f9"/>
    </style:style>
    <style:style style:name="P367" style:family="paragraph" style:parent-style-name="Text_20_body">
      <style:text-properties officeooo:rsid="00163149" officeooo:paragraph-rsid="027ff4f9"/>
    </style:style>
    <style:style style:name="P368" style:family="paragraph" style:parent-style-name="Text_20_body">
      <style:text-properties officeooo:rsid="0016370b" officeooo:paragraph-rsid="027ff4f9"/>
    </style:style>
    <style:style style:name="P369" style:family="paragraph" style:parent-style-name="Text_20_body">
      <style:text-properties officeooo:rsid="0019a7f9" officeooo:paragraph-rsid="02821d5a"/>
    </style:style>
    <style:style style:name="P370" style:family="paragraph" style:parent-style-name="Text_20_body">
      <style:text-properties officeooo:rsid="0017c3a5" officeooo:paragraph-rsid="027ff4f9"/>
    </style:style>
    <style:style style:name="P371" style:family="paragraph" style:parent-style-name="Text_20_body">
      <style:text-properties officeooo:rsid="00186c1d" officeooo:paragraph-rsid="027ff4f9"/>
    </style:style>
    <style:style style:name="P372" style:family="paragraph" style:parent-style-name="Text_20_body">
      <style:text-properties officeooo:rsid="002b264b" officeooo:paragraph-rsid="027ff4f9"/>
    </style:style>
    <style:style style:name="P373" style:family="paragraph" style:parent-style-name="Text_20_body">
      <style:text-properties officeooo:rsid="002b682e" officeooo:paragraph-rsid="027ff4f9"/>
    </style:style>
    <style:style style:name="P374" style:family="paragraph" style:parent-style-name="Text_20_body">
      <style:text-properties officeooo:rsid="001f45da" officeooo:paragraph-rsid="027ff4f9"/>
    </style:style>
    <style:style style:name="P375" style:family="paragraph" style:parent-style-name="Text_20_body">
      <style:text-properties officeooo:rsid="0020d740" officeooo:paragraph-rsid="027ff4f9"/>
    </style:style>
    <style:style style:name="P376" style:family="paragraph" style:parent-style-name="Text_20_body">
      <style:text-properties officeooo:rsid="0021d45f" officeooo:paragraph-rsid="027ff4f9"/>
    </style:style>
    <style:style style:name="P377" style:family="paragraph" style:parent-style-name="Text_20_body">
      <style:text-properties officeooo:rsid="002ed9d5" officeooo:paragraph-rsid="027ff4f9"/>
    </style:style>
    <style:style style:name="P378" style:family="paragraph" style:parent-style-name="Text_20_body">
      <style:text-properties officeooo:rsid="002dae23" officeooo:paragraph-rsid="027ff4f9"/>
    </style:style>
    <style:style style:name="P379" style:family="paragraph" style:parent-style-name="Text_20_body">
      <style:text-properties officeooo:rsid="002ee441" officeooo:paragraph-rsid="027ff4f9"/>
    </style:style>
    <style:style style:name="P380" style:family="paragraph" style:parent-style-name="Text_20_body">
      <style:text-properties officeooo:rsid="0030faf7" officeooo:paragraph-rsid="027ff4f9"/>
    </style:style>
    <style:style style:name="P381" style:family="paragraph" style:parent-style-name="Table_20_Contents">
      <style:paragraph-properties fo:margin-top="0.0827in" fo:margin-bottom="0.0827in" style:contextual-spacing="false"/>
      <style:text-properties officeooo:rsid="0030faf7" officeooo:paragraph-rsid="027ff4f9"/>
    </style:style>
    <style:style style:name="P382" style:family="paragraph" style:parent-style-name="Text_20_body">
      <style:text-properties officeooo:rsid="00333b79" officeooo:paragraph-rsid="027ff4f9"/>
    </style:style>
    <style:style style:name="P383"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84" style:family="paragraph" style:parent-style-name="Text_20_body">
      <style:paragraph-properties fo:margin-left="0.5in" fo:margin-right="0in" fo:text-indent="0in" style:auto-text-indent="false"/>
      <style:text-properties officeooo:paragraph-rsid="00d4375d"/>
    </style:style>
    <style:style style:name="P385" style:family="paragraph" style:parent-style-name="Table_20_Contents">
      <style:paragraph-properties fo:margin-top="0in" fo:margin-bottom="0.1701in" style:contextual-spacing="false"/>
      <style:text-properties officeooo:paragraph-rsid="00d4375d"/>
    </style:style>
    <style:style style:name="P386" style:family="paragraph" style:parent-style-name="Table_20_Contents">
      <style:text-properties officeooo:paragraph-rsid="00d4375d"/>
    </style:style>
    <style:style style:name="P387" style:family="paragraph" style:parent-style-name="Text_20_body">
      <style:paragraph-properties fo:margin-left="0.5in" fo:margin-right="0in" fo:text-indent="0in" style:auto-text-indent="false"/>
      <style:text-properties officeooo:paragraph-rsid="013d90a7"/>
    </style:style>
    <style:style style:name="P388" style:family="paragraph" style:parent-style-name="Standard">
      <style:text-properties officeooo:paragraph-rsid="013d90a7"/>
    </style:style>
    <style:style style:name="P389" style:family="paragraph" style:parent-style-name="pascalcode">
      <style:text-properties officeooo:paragraph-rsid="013d90a7"/>
    </style:style>
    <style:style style:name="P390" style:family="paragraph" style:parent-style-name="Highlighted">
      <style:text-properties officeooo:paragraph-rsid="013d90a7"/>
    </style:style>
    <style:style style:name="P391" style:family="paragraph" style:parent-style-name="SQL">
      <style:paragraph-properties fo:margin-left="0.5in" fo:margin-right="0in" fo:text-indent="-0.3in" style:auto-text-indent="false"/>
      <style:text-properties officeooo:paragraph-rsid="013d90a7"/>
    </style:style>
    <style:style style:name="P392" style:family="paragraph" style:parent-style-name="Highlighted">
      <style:paragraph-properties fo:margin-left="0.5in" fo:margin-right="0in" fo:text-indent="0in" style:auto-text-indent="false"/>
    </style:style>
    <style:style style:name="P393" style:family="paragraph" style:parent-style-name="Highlighted">
      <style:paragraph-properties fo:margin-left="0.5in" fo:margin-right="0in" fo:text-indent="0in" style:auto-text-indent="false"/>
      <style:text-properties officeooo:rsid="012c993d" officeooo:paragraph-rsid="012c993d"/>
    </style:style>
    <style:style style:name="P394" style:family="paragraph" style:parent-style-name="Standard">
      <style:text-properties officeooo:rsid="012c993d" officeooo:paragraph-rsid="012c993d"/>
    </style:style>
    <style:style style:name="P395" style:family="paragraph" style:parent-style-name="Highlighted">
      <style:text-properties officeooo:rsid="012c993d" officeooo:paragraph-rsid="012c993d"/>
    </style:style>
    <style:style style:name="P39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397" style:family="paragraph" style:parent-style-name="Standard">
      <style:paragraph-properties fo:margin-left="0.5in" fo:margin-right="0in" fo:text-indent="0in" style:auto-text-indent="false"/>
      <style:text-properties officeooo:rsid="01dbe152" officeooo:paragraph-rsid="01dbe152"/>
    </style:style>
    <style:style style:name="P398" style:family="paragraph" style:parent-style-name="Standard">
      <style:text-properties officeooo:rsid="01dbe152" officeooo:paragraph-rsid="01dbe152"/>
    </style:style>
    <style:style style:name="P399" style:family="paragraph" style:parent-style-name="Standard">
      <style:paragraph-properties fo:margin-left="0.5in" fo:margin-right="0in" fo:text-indent="0in" style:auto-text-indent="false"/>
      <style:text-properties officeooo:rsid="024bea25" officeooo:paragraph-rsid="024bea25"/>
    </style:style>
    <style:style style:name="P400" style:family="paragraph" style:parent-style-name="Standard">
      <style:text-properties officeooo:rsid="024bea25" officeooo:paragraph-rsid="024bea25"/>
    </style:style>
    <style:style style:name="P401" style:family="paragraph" style:parent-style-name="Standard">
      <style:paragraph-properties fo:margin-left="0.5in" fo:margin-right="0in" fo:text-indent="0in" style:auto-text-indent="false"/>
      <style:text-properties officeooo:rsid="024ce69e" officeooo:paragraph-rsid="024ce69e"/>
    </style:style>
    <style:style style:name="P402" style:family="paragraph" style:parent-style-name="Standard">
      <style:paragraph-properties fo:margin-left="0.5in" fo:margin-right="0in" fo:text-indent="0in" style:auto-text-indent="false"/>
      <style:text-properties officeooo:rsid="0259f347" officeooo:paragraph-rsid="0259f347"/>
    </style:style>
    <style:style style:name="P403" style:family="paragraph" style:parent-style-name="Standard">
      <style:text-properties officeooo:rsid="0259f347" officeooo:paragraph-rsid="0259f347"/>
    </style:style>
    <style:style style:name="P404" style:family="paragraph" style:parent-style-name="Standard">
      <style:paragraph-properties fo:margin-left="0.5in" fo:margin-right="0in" fo:text-indent="0in" style:auto-text-indent="false"/>
      <style:text-properties officeooo:rsid="0259f347" officeooo:paragraph-rsid="026eb1f1"/>
    </style:style>
    <style:style style:name="P405" style:family="paragraph" style:parent-style-name="Standard">
      <style:paragraph-properties fo:margin-left="0.5in" fo:margin-right="0in" fo:text-indent="0in" style:auto-text-indent="false"/>
      <style:text-properties officeooo:rsid="025c3edb" officeooo:paragraph-rsid="025c3edb"/>
    </style:style>
    <style:style style:name="P406" style:family="paragraph" style:parent-style-name="Standard">
      <style:paragraph-properties fo:margin-left="0.5in" fo:margin-right="0in" fo:text-indent="0in" style:auto-text-indent="false"/>
      <style:text-properties officeooo:paragraph-rsid="026eb1f1"/>
    </style:style>
    <style:style style:name="P407" style:family="paragraph" style:parent-style-name="Standard">
      <style:paragraph-properties fo:margin-left="0.5in" fo:margin-right="0in" fo:text-indent="0in" style:auto-text-indent="false"/>
      <style:text-properties officeooo:rsid="025466e3" officeooo:paragraph-rsid="025c3edb"/>
    </style:style>
    <style:style style:name="P408" style:family="paragraph" style:parent-style-name="Standard">
      <style:paragraph-properties fo:margin-left="0.5in" fo:margin-right="0in" fo:text-indent="0in" style:auto-text-indent="false"/>
      <style:text-properties officeooo:rsid="0285478b" officeooo:paragraph-rsid="0285478b"/>
    </style:style>
    <style:style style:name="P409" style:family="paragraph" style:parent-style-name="Standard">
      <style:text-properties officeooo:rsid="0285478b" officeooo:paragraph-rsid="0285478b"/>
    </style:style>
    <style:style style:name="P410" style:family="paragraph" style:parent-style-name="Text_20_body" style:master-page-name="">
      <style:paragraph-properties style:page-number="auto" fo:keep-with-next="always"/>
      <style:text-properties officeooo:rsid="00d23a81" officeooo:paragraph-rsid="00d23a81"/>
    </style:style>
    <style:style style:name="P411" style:family="paragraph" style:parent-style-name="Standard" style:master-page-name="">
      <style:paragraph-properties style:page-number="auto" fo:keep-with-next="always"/>
      <style:text-properties officeooo:rsid="01d533af" officeooo:paragraph-rsid="01d533af"/>
    </style:style>
    <style:style style:name="P412" style:family="paragraph" style:parent-style-name="Standard">
      <style:text-properties officeooo:rsid="01d533af" officeooo:paragraph-rsid="01d533af"/>
    </style:style>
    <style:style style:name="P413" style:family="paragraph" style:parent-style-name="Table_20_Contents">
      <style:text-properties officeooo:rsid="01d533af" officeooo:paragraph-rsid="01d533af"/>
    </style:style>
    <style:style style:name="P414" style:family="paragraph" style:parent-style-name="Standard">
      <style:text-properties officeooo:rsid="01d533af" officeooo:paragraph-rsid="01d70ac8"/>
    </style:style>
    <style:style style:name="P415" style:family="paragraph" style:parent-style-name="Text_20_body">
      <style:paragraph-properties fo:margin-left="0.4902in" fo:margin-right="0in" fo:text-indent="0in" style:auto-text-indent="false"/>
      <style:text-properties officeooo:rsid="0015b02f" officeooo:paragraph-rsid="00d2a825"/>
    </style:style>
    <style:style style:name="P416" style:family="paragraph" style:parent-style-name="Text_20_body">
      <style:paragraph-properties fo:margin-left="0.4902in" fo:margin-right="0in" fo:text-indent="0in" style:auto-text-indent="false"/>
      <style:text-properties officeooo:rsid="0011be67" officeooo:paragraph-rsid="00d2a825"/>
    </style:style>
    <style:style style:name="P417" style:family="paragraph" style:parent-style-name="Text_20_body">
      <style:paragraph-properties fo:margin-left="0.4902in" fo:margin-right="0in" fo:text-indent="0in" style:auto-text-indent="false"/>
      <style:text-properties officeooo:rsid="001243d1" officeooo:paragraph-rsid="00d2a825"/>
    </style:style>
    <style:style style:name="P418" style:family="paragraph" style:parent-style-name="Text_20_body">
      <style:paragraph-properties fo:margin-left="0.4902in" fo:margin-right="0in" fo:text-indent="0in" style:auto-text-indent="false"/>
      <style:text-properties officeooo:rsid="00126c44" officeooo:paragraph-rsid="00d2a825"/>
    </style:style>
    <style:style style:name="P419" style:family="paragraph" style:parent-style-name="Standard">
      <style:text-properties officeooo:rsid="00d2a825" officeooo:paragraph-rsid="00d2a825"/>
    </style:style>
    <style:style style:name="P420" style:family="paragraph" style:parent-style-name="Standard">
      <style:text-properties officeooo:rsid="000473b7" officeooo:paragraph-rsid="00d61d85"/>
    </style:style>
    <style:style style:name="P421" style:family="paragraph" style:parent-style-name="Standard">
      <style:text-properties officeooo:rsid="00d69792" officeooo:paragraph-rsid="00d69792"/>
    </style:style>
    <style:style style:name="P422" style:family="paragraph" style:parent-style-name="Standard">
      <style:text-properties officeooo:rsid="00de0fc1" officeooo:paragraph-rsid="00de0fc1"/>
    </style:style>
    <style:style style:name="P423" style:family="paragraph" style:parent-style-name="Standard">
      <style:text-properties officeooo:rsid="00de0fc1" officeooo:paragraph-rsid="0101e6fc"/>
    </style:style>
    <style:style style:name="P424" style:family="paragraph" style:parent-style-name="Standard">
      <style:text-properties officeooo:rsid="00dfea1e" officeooo:paragraph-rsid="00dfea1e"/>
    </style:style>
    <style:style style:name="P425" style:family="paragraph" style:parent-style-name="Standard">
      <style:text-properties officeooo:rsid="00eaf163" officeooo:paragraph-rsid="013714dd"/>
    </style:style>
    <style:style style:name="P426" style:family="paragraph" style:parent-style-name="Standard">
      <style:text-properties officeooo:rsid="00eaf163" officeooo:paragraph-rsid="01db6e0e"/>
    </style:style>
    <style:style style:name="P427" style:family="paragraph" style:parent-style-name="Standard">
      <style:text-properties officeooo:rsid="00ee7b1b" officeooo:paragraph-rsid="00ee7b1b"/>
    </style:style>
    <style:style style:name="P428" style:family="paragraph" style:parent-style-name="Table_20_Contents">
      <style:text-properties officeooo:rsid="00ee7b1b" officeooo:paragraph-rsid="00ee7b1b"/>
    </style:style>
    <style:style style:name="P429" style:family="paragraph" style:parent-style-name="Table_20_Contents">
      <style:text-properties officeooo:rsid="00ee7b1b" officeooo:paragraph-rsid="00f00ab7"/>
    </style:style>
    <style:style style:name="P430" style:family="paragraph" style:parent-style-name="Table_20_Contents">
      <style:text-properties officeooo:rsid="00ee7b1b" officeooo:paragraph-rsid="00f088cc"/>
    </style:style>
    <style:style style:name="P431" style:family="paragraph" style:parent-style-name="Table_20_Contents">
      <style:text-properties officeooo:rsid="00ee7b1b" officeooo:paragraph-rsid="00f7ac29"/>
    </style:style>
    <style:style style:name="P432" style:family="paragraph" style:parent-style-name="Table_20_Contents">
      <style:text-properties officeooo:rsid="00ee7b1b" officeooo:paragraph-rsid="01eeca0c"/>
    </style:style>
    <style:style style:name="P433" style:family="paragraph" style:parent-style-name="Table_20_Contents">
      <style:text-properties officeooo:rsid="00ee7b1b" officeooo:paragraph-rsid="01f724a5"/>
    </style:style>
    <style:style style:name="P434" style:family="paragraph" style:parent-style-name="Standard">
      <style:text-properties officeooo:rsid="00f397bc" officeooo:paragraph-rsid="00f397bc"/>
    </style:style>
    <style:style style:name="P435" style:family="paragraph" style:parent-style-name="Standard">
      <style:text-properties officeooo:rsid="00f397bc" officeooo:paragraph-rsid="00f444df"/>
    </style:style>
    <style:style style:name="P436" style:family="paragraph" style:parent-style-name="Standard">
      <style:text-properties officeooo:rsid="00f397bc" officeooo:paragraph-rsid="00f86d29"/>
    </style:style>
    <style:style style:name="P437" style:family="paragraph" style:parent-style-name="Standard">
      <style:text-properties officeooo:rsid="00f397bc" officeooo:paragraph-rsid="01eeca0c"/>
    </style:style>
    <style:style style:name="P438" style:family="paragraph" style:parent-style-name="Standard">
      <style:text-properties officeooo:rsid="00f397bc" officeooo:paragraph-rsid="01f8de69"/>
    </style:style>
    <style:style style:name="P439" style:family="paragraph" style:parent-style-name="Standard">
      <style:text-properties officeooo:rsid="00f9ed17" officeooo:paragraph-rsid="00f9ed17"/>
    </style:style>
    <style:style style:name="P440" style:family="paragraph" style:parent-style-name="Table_20_Contents">
      <style:text-properties officeooo:rsid="00f9ed17" officeooo:paragraph-rsid="00f9ed17"/>
    </style:style>
    <style:style style:name="P441" style:family="paragraph" style:parent-style-name="Standard">
      <style:text-properties officeooo:rsid="00f9ed17" officeooo:paragraph-rsid="01eeca0c"/>
    </style:style>
    <style:style style:name="P442" style:family="paragraph" style:parent-style-name="Table_20_Contents">
      <style:text-properties officeooo:rsid="00f9ed17" officeooo:paragraph-rsid="01eeca0c"/>
    </style:style>
    <style:style style:name="P443" style:family="paragraph" style:parent-style-name="Standard">
      <style:text-properties officeooo:rsid="00fd335e" officeooo:paragraph-rsid="00fd335e"/>
    </style:style>
    <style:style style:name="P444" style:family="paragraph" style:parent-style-name="pascalcode">
      <style:text-properties officeooo:rsid="00fd335e" officeooo:paragraph-rsid="00fd335e"/>
    </style:style>
    <style:style style:name="P445" style:family="paragraph" style:parent-style-name="Standard">
      <style:text-properties officeooo:rsid="00fd335e" officeooo:paragraph-rsid="01eeca0c"/>
    </style:style>
    <style:style style:name="P446" style:family="paragraph" style:parent-style-name="pascalcode">
      <style:text-properties officeooo:rsid="00fd335e" officeooo:paragraph-rsid="01eeca0c"/>
    </style:style>
    <style:style style:name="P447" style:family="paragraph" style:parent-style-name="Standard">
      <style:text-properties officeooo:rsid="00fd7ad6" officeooo:paragraph-rsid="00fd7ad6"/>
    </style:style>
    <style:style style:name="P448" style:family="paragraph" style:parent-style-name="Table_20_Contents">
      <style:text-properties officeooo:rsid="00fd7ad6" officeooo:paragraph-rsid="00fd7ad6"/>
    </style:style>
    <style:style style:name="P449" style:family="paragraph" style:parent-style-name="pascalcode">
      <style:text-properties officeooo:rsid="00fd7ad6" officeooo:paragraph-rsid="00fd7ad6"/>
    </style:style>
    <style:style style:name="P450" style:family="paragraph" style:parent-style-name="Standard">
      <style:text-properties officeooo:rsid="00fd7ad6" officeooo:paragraph-rsid="01eeca0c"/>
    </style:style>
    <style:style style:name="P451" style:family="paragraph" style:parent-style-name="Table_20_Contents">
      <style:text-properties officeooo:rsid="00fd7ad6" officeooo:paragraph-rsid="01eeca0c"/>
    </style:style>
    <style:style style:name="P452" style:family="paragraph" style:parent-style-name="pascalcode">
      <style:text-properties officeooo:rsid="00fd7ad6" officeooo:paragraph-rsid="01eeca0c"/>
    </style:style>
    <style:style style:name="P453" style:family="paragraph" style:parent-style-name="Table_20_Contents">
      <style:text-properties officeooo:rsid="00fd7ad6" officeooo:paragraph-rsid="02037047"/>
    </style:style>
    <style:style style:name="P454" style:family="paragraph" style:parent-style-name="Table_20_Contents">
      <style:text-properties officeooo:rsid="00fd7ad6" officeooo:paragraph-rsid="020bc993"/>
    </style:style>
    <style:style style:name="P455" style:family="paragraph" style:parent-style-name="Standard">
      <style:text-properties officeooo:rsid="00fef681" officeooo:paragraph-rsid="01eeca0c"/>
    </style:style>
    <style:style style:name="P456" style:family="paragraph" style:parent-style-name="Table_20_Contents">
      <style:text-properties officeooo:rsid="00fef681" officeooo:paragraph-rsid="01eeca0c"/>
    </style:style>
    <style:style style:name="P457" style:family="paragraph" style:parent-style-name="Table_20_Contents">
      <style:text-properties officeooo:rsid="00fef681" officeooo:paragraph-rsid="00fef681"/>
    </style:style>
    <style:style style:name="P458" style:family="paragraph" style:parent-style-name="Table_20_Contents">
      <style:paragraph-properties fo:text-align="start" style:justify-single-word="false"/>
      <style:text-properties officeooo:rsid="00fef681" officeooo:paragraph-rsid="00fef681"/>
    </style:style>
    <style:style style:name="P459" style:family="paragraph" style:parent-style-name="Table_20_Contents">
      <style:paragraph-properties fo:text-align="start" style:justify-single-word="false"/>
      <style:text-properties officeooo:rsid="00fef681" officeooo:paragraph-rsid="01eeca0c"/>
    </style:style>
    <style:style style:name="P460" style:family="paragraph" style:parent-style-name="Standard">
      <style:text-properties officeooo:rsid="0101e6fc" officeooo:paragraph-rsid="0101e6fc"/>
    </style:style>
    <style:style style:name="P461" style:family="paragraph" style:parent-style-name="Standard">
      <style:text-properties officeooo:rsid="0103b5ed" officeooo:paragraph-rsid="0103b5ed"/>
    </style:style>
    <style:style style:name="P462" style:family="paragraph" style:parent-style-name="Table_20_Contents">
      <style:text-properties officeooo:rsid="0103b5ed" officeooo:paragraph-rsid="0103b5ed"/>
    </style:style>
    <style:style style:name="P463" style:family="paragraph" style:parent-style-name="Standard">
      <style:text-properties officeooo:rsid="0108bd94" officeooo:paragraph-rsid="0108bd94"/>
    </style:style>
    <style:style style:name="P464" style:family="paragraph" style:parent-style-name="Table_20_Contents">
      <style:text-properties officeooo:rsid="0108bd94" officeooo:paragraph-rsid="0108bd94"/>
    </style:style>
    <style:style style:name="P465" style:family="paragraph" style:parent-style-name="Table_20_Contents">
      <style:text-properties officeooo:rsid="0108bd94" officeooo:paragraph-rsid="010cb508"/>
    </style:style>
    <style:style style:name="P466" style:family="paragraph" style:parent-style-name="Standard">
      <style:text-properties officeooo:rsid="010d9fd2" officeooo:paragraph-rsid="010d9fd2"/>
    </style:style>
    <style:style style:name="P467" style:family="paragraph" style:parent-style-name="Standard">
      <style:text-properties officeooo:paragraph-rsid="0110d205"/>
    </style:style>
    <style:style style:name="P468" style:family="paragraph" style:parent-style-name="Standard">
      <style:text-properties officeooo:paragraph-rsid="0113982d"/>
    </style:style>
    <style:style style:name="P469" style:family="paragraph" style:parent-style-name="Standard">
      <style:text-properties officeooo:rsid="0116168d" officeooo:paragraph-rsid="0116168d"/>
    </style:style>
    <style:style style:name="P470" style:family="paragraph" style:parent-style-name="Footnote">
      <style:text-properties officeooo:rsid="0116168d" officeooo:paragraph-rsid="0116168d"/>
    </style:style>
    <style:style style:name="P471" style:family="paragraph" style:parent-style-name="Standard">
      <style:text-properties officeooo:rsid="011f4539" officeooo:paragraph-rsid="011f4539"/>
    </style:style>
    <style:style style:name="P472" style:family="paragraph" style:parent-style-name="Table_20_Contents">
      <style:text-properties officeooo:rsid="011f4539" officeooo:paragraph-rsid="011f4539"/>
    </style:style>
    <style:style style:name="P473" style:family="paragraph" style:parent-style-name="Footnote">
      <style:text-properties officeooo:rsid="011f4539" officeooo:paragraph-rsid="011f4539"/>
    </style:style>
    <style:style style:name="P474" style:family="paragraph" style:parent-style-name="Table_20_Contents">
      <style:text-properties officeooo:rsid="011f4539" officeooo:paragraph-rsid="0120505d"/>
    </style:style>
    <style:style style:name="P475" style:family="paragraph" style:parent-style-name="Standard">
      <style:text-properties officeooo:rsid="0121da82" officeooo:paragraph-rsid="0121da82"/>
    </style:style>
    <style:style style:name="P476" style:family="paragraph" style:parent-style-name="Table_20_Contents">
      <style:text-properties officeooo:rsid="0121da82" officeooo:paragraph-rsid="0121da82"/>
    </style:style>
    <style:style style:name="P477" style:family="paragraph" style:parent-style-name="Standard">
      <style:text-properties officeooo:paragraph-rsid="0121da82"/>
    </style:style>
    <style:style style:name="P478" style:family="paragraph" style:parent-style-name="Standard">
      <style:text-properties officeooo:rsid="0122a9b6" officeooo:paragraph-rsid="0122a9b6"/>
    </style:style>
    <style:style style:name="P479" style:family="paragraph" style:parent-style-name="Standard">
      <style:text-properties officeooo:paragraph-rsid="01241079"/>
    </style:style>
    <style:style style:name="P480" style:family="paragraph" style:parent-style-name="Standard">
      <style:text-properties officeooo:rsid="01261b53" officeooo:paragraph-rsid="01261b53"/>
    </style:style>
    <style:style style:name="P481" style:family="paragraph" style:parent-style-name="Standard">
      <style:text-properties officeooo:rsid="0127d356" officeooo:paragraph-rsid="0127d356"/>
    </style:style>
    <style:style style:name="P482" style:family="paragraph" style:parent-style-name="Standard">
      <style:text-properties officeooo:rsid="0127d356" officeooo:paragraph-rsid="02644807"/>
    </style:style>
    <style:style style:name="P483" style:family="paragraph" style:parent-style-name="Standard">
      <style:text-properties officeooo:rsid="0127e8e9" officeooo:paragraph-rsid="0127e8e9"/>
    </style:style>
    <style:style style:name="P484" style:family="paragraph" style:parent-style-name="Table_20_Contents">
      <style:text-properties officeooo:rsid="0127e8e9" officeooo:paragraph-rsid="0127e8e9"/>
    </style:style>
    <style:style style:name="P485" style:family="paragraph" style:parent-style-name="Standard">
      <style:text-properties officeooo:rsid="0127e8e9" officeooo:paragraph-rsid="0163a38d"/>
    </style:style>
    <style:style style:name="P486" style:family="paragraph" style:parent-style-name="Table_20_Contents">
      <style:text-properties officeooo:rsid="0127e8e9" officeooo:paragraph-rsid="012ed61f"/>
    </style:style>
    <style:style style:name="P487" style:family="paragraph" style:parent-style-name="Table_20_Contents">
      <style:text-properties officeooo:rsid="0127e8e9" officeooo:paragraph-rsid="012f893f"/>
    </style:style>
    <style:style style:name="P488" style:family="paragraph" style:parent-style-name="Table_20_Contents">
      <style:text-properties officeooo:rsid="0127e8e9" officeooo:paragraph-rsid="0192065a"/>
    </style:style>
    <style:style style:name="P489" style:family="paragraph" style:parent-style-name="Table_20_Contents">
      <style:text-properties officeooo:rsid="0127e8e9" officeooo:paragraph-rsid="019340d0"/>
    </style:style>
    <style:style style:name="P490" style:family="paragraph" style:parent-style-name="Table_20_Contents">
      <style:text-properties officeooo:rsid="0127e8e9" officeooo:paragraph-rsid="01bf22a6"/>
    </style:style>
    <style:style style:name="P491" style:family="paragraph" style:parent-style-name="Standard">
      <style:text-properties officeooo:paragraph-rsid="0127e8e9"/>
    </style:style>
    <style:style style:name="P492" style:family="paragraph" style:parent-style-name="Standard">
      <style:text-properties officeooo:rsid="012d47b9" officeooo:paragraph-rsid="012d47b9"/>
    </style:style>
    <style:style style:name="P493" style:family="paragraph" style:parent-style-name="Standard">
      <style:text-properties officeooo:rsid="012e17b6" officeooo:paragraph-rsid="012e17b6"/>
    </style:style>
    <style:style style:name="P494" style:family="paragraph" style:parent-style-name="Standard">
      <style:text-properties officeooo:rsid="012ed61f" officeooo:paragraph-rsid="012ed61f"/>
    </style:style>
    <style:style style:name="P495" style:family="paragraph" style:parent-style-name="Highlighted">
      <style:text-properties officeooo:rsid="012ed61f" officeooo:paragraph-rsid="012ed61f"/>
    </style:style>
    <style:style style:name="P496" style:family="paragraph" style:parent-style-name="Standard">
      <style:text-properties officeooo:rsid="012ed61f" officeooo:paragraph-rsid="0163a38d"/>
    </style:style>
    <style:style style:name="P497" style:family="paragraph" style:parent-style-name="Standard">
      <style:text-properties officeooo:paragraph-rsid="012ed61f"/>
    </style:style>
    <style:style style:name="P498" style:family="paragraph" style:parent-style-name="Standard">
      <style:text-properties officeooo:rsid="012fd71c" officeooo:paragraph-rsid="012fd71c"/>
    </style:style>
    <style:style style:name="P499" style:family="paragraph" style:parent-style-name="Standard">
      <style:text-properties officeooo:paragraph-rsid="0116168d"/>
    </style:style>
    <style:style style:name="P500" style:family="paragraph" style:parent-style-name="Standard">
      <style:text-properties officeooo:rsid="0104fe82" officeooo:paragraph-rsid="013119b1"/>
    </style:style>
    <style:style style:name="P501" style:family="paragraph" style:parent-style-name="Table_20_Contents">
      <style:text-properties officeooo:rsid="0104fe82" officeooo:paragraph-rsid="0104fe82"/>
    </style:style>
    <style:style style:name="P502" style:family="paragraph" style:parent-style-name="Standard">
      <style:text-properties officeooo:rsid="0139e38d" officeooo:paragraph-rsid="0139e38d"/>
    </style:style>
    <style:style style:name="P503" style:family="paragraph" style:parent-style-name="Standard">
      <style:text-properties officeooo:rsid="013b818f" officeooo:paragraph-rsid="013b818f"/>
    </style:style>
    <style:style style:name="P504" style:family="paragraph" style:parent-style-name="Standard">
      <style:text-properties officeooo:rsid="013cf6fb" officeooo:paragraph-rsid="013cf6fb"/>
    </style:style>
    <style:style style:name="P505" style:family="paragraph" style:parent-style-name="Standard">
      <style:text-properties officeooo:rsid="0001877c" officeooo:paragraph-rsid="013d90a7"/>
    </style:style>
    <style:style style:name="P506" style:family="paragraph" style:parent-style-name="Standard">
      <style:text-properties officeooo:rsid="0006dd99" officeooo:paragraph-rsid="013d90a7"/>
    </style:style>
    <style:style style:name="P507" style:family="paragraph" style:parent-style-name="Standard">
      <style:text-properties officeooo:rsid="0000356d" officeooo:paragraph-rsid="013d90a7"/>
    </style:style>
    <style:style style:name="P508" style:family="paragraph" style:parent-style-name="Standard">
      <style:text-properties officeooo:rsid="00034e16" officeooo:paragraph-rsid="013d90a7"/>
    </style:style>
    <style:style style:name="P509" style:family="paragraph" style:parent-style-name="Standard">
      <style:text-properties officeooo:rsid="00099004" officeooo:paragraph-rsid="013d90a7"/>
    </style:style>
    <style:style style:name="P510" style:family="paragraph" style:parent-style-name="Standard">
      <style:text-properties officeooo:rsid="00e81ef6" officeooo:paragraph-rsid="013d90a7"/>
    </style:style>
    <style:style style:name="P511" style:family="paragraph" style:parent-style-name="Standard">
      <style:text-properties officeooo:rsid="013dd33d" officeooo:paragraph-rsid="013dd33d"/>
    </style:style>
    <style:style style:name="P512" style:family="paragraph" style:parent-style-name="Standard">
      <style:text-properties officeooo:rsid="013f2d3b" officeooo:paragraph-rsid="013f2d3b"/>
    </style:style>
    <style:style style:name="P513" style:family="paragraph" style:parent-style-name="Standard">
      <style:text-properties officeooo:rsid="0140178a" officeooo:paragraph-rsid="0140178a"/>
    </style:style>
    <style:style style:name="P514" style:family="paragraph" style:parent-style-name="Standard">
      <style:text-properties officeooo:rsid="01407516" officeooo:paragraph-rsid="01407516"/>
    </style:style>
    <style:style style:name="P515" style:family="paragraph" style:parent-style-name="Standard">
      <style:text-properties officeooo:rsid="014202ec" officeooo:paragraph-rsid="014202ec"/>
    </style:style>
    <style:style style:name="P516" style:family="paragraph" style:parent-style-name="Standard">
      <style:text-properties officeooo:rsid="0142fc7f" officeooo:paragraph-rsid="0142fc7f"/>
    </style:style>
    <style:style style:name="P517" style:family="paragraph" style:parent-style-name="Standard">
      <style:text-properties officeooo:rsid="01445b72" officeooo:paragraph-rsid="01445b72"/>
    </style:style>
    <style:style style:name="P518" style:family="paragraph" style:parent-style-name="Standard">
      <style:text-properties officeooo:rsid="00628db8" officeooo:paragraph-rsid="01447b13"/>
    </style:style>
    <style:style style:name="P519" style:family="paragraph" style:parent-style-name="Standard">
      <style:text-properties officeooo:rsid="01447b13" officeooo:paragraph-rsid="01447b13"/>
    </style:style>
    <style:style style:name="P520" style:family="paragraph" style:parent-style-name="Highlighted">
      <style:text-properties officeooo:rsid="01447b13" officeooo:paragraph-rsid="01447b13"/>
    </style:style>
    <style:style style:name="P521" style:family="paragraph" style:parent-style-name="Standard">
      <style:text-properties officeooo:rsid="0146c85e" officeooo:paragraph-rsid="0146c85e"/>
    </style:style>
    <style:style style:name="P522" style:family="paragraph" style:parent-style-name="Table_20_Contents">
      <style:paragraph-properties fo:margin-top="0.0402in" fo:margin-bottom="0.0402in" style:contextual-spacing="false"/>
      <style:text-properties officeooo:rsid="0146c85e" officeooo:paragraph-rsid="0146c85e"/>
    </style:style>
    <style:style style:name="P523" style:family="paragraph" style:parent-style-name="Standard">
      <style:text-properties officeooo:rsid="014ad3e5" officeooo:paragraph-rsid="014ad3e5"/>
    </style:style>
    <style:style style:name="P524" style:family="paragraph" style:parent-style-name="Table_20_Contents">
      <style:text-properties officeooo:rsid="014ad3e5" officeooo:paragraph-rsid="014ad3e5"/>
    </style:style>
    <style:style style:name="P525" style:family="paragraph" style:parent-style-name="Standard">
      <style:text-properties officeooo:rsid="014c8d44" officeooo:paragraph-rsid="014c8d44"/>
    </style:style>
    <style:style style:name="P526" style:family="paragraph" style:parent-style-name="Text_20_body">
      <style:paragraph-properties fo:margin-top="0in" fo:margin-bottom="0.1701in" style:contextual-spacing="true"/>
      <style:text-properties officeooo:rsid="014c8d44" officeooo:paragraph-rsid="014c8d44"/>
    </style:style>
    <style:style style:name="P527" style:family="paragraph" style:parent-style-name="Standard">
      <style:text-properties officeooo:rsid="0121b8d8" officeooo:paragraph-rsid="0121b8d8"/>
    </style:style>
    <style:style style:name="P528" style:family="paragraph" style:parent-style-name="Standard">
      <style:text-properties officeooo:rsid="014f2a11" officeooo:paragraph-rsid="014f2a11"/>
    </style:style>
    <style:style style:name="P529" style:family="paragraph" style:parent-style-name="Standard">
      <style:text-properties officeooo:rsid="015aadeb" officeooo:paragraph-rsid="015aadeb"/>
    </style:style>
    <style:style style:name="P530" style:family="paragraph" style:parent-style-name="Footnote">
      <style:text-properties officeooo:rsid="015aadeb" officeooo:paragraph-rsid="015aadeb"/>
    </style:style>
    <style:style style:name="P531" style:family="paragraph" style:parent-style-name="Standard">
      <style:text-properties officeooo:paragraph-rsid="015aadeb"/>
    </style:style>
    <style:style style:name="P532" style:family="paragraph" style:parent-style-name="Standard">
      <style:text-properties officeooo:paragraph-rsid="0162bcfa"/>
    </style:style>
    <style:style style:name="P533" style:family="paragraph" style:parent-style-name="Standard">
      <style:text-properties officeooo:rsid="00eab1bc" officeooo:paragraph-rsid="0173fcab"/>
    </style:style>
    <style:style style:name="P534" style:family="paragraph" style:parent-style-name="Standard">
      <style:text-properties officeooo:rsid="00cd912f" officeooo:paragraph-rsid="0173fcab"/>
    </style:style>
    <style:style style:name="P535" style:family="paragraph" style:parent-style-name="Standard">
      <style:text-properties officeooo:rsid="00e9f827" officeooo:paragraph-rsid="0173fcab"/>
    </style:style>
    <style:style style:name="P536" style:family="paragraph" style:parent-style-name="Standard">
      <style:text-properties officeooo:rsid="00e9f827" officeooo:paragraph-rsid="021416fd"/>
    </style:style>
    <style:style style:name="P537" style:family="paragraph" style:parent-style-name="Standard">
      <style:text-properties officeooo:rsid="0176dc26" officeooo:paragraph-rsid="0176dc26"/>
    </style:style>
    <style:style style:name="P538" style:family="paragraph" style:parent-style-name="Standard">
      <style:text-properties officeooo:rsid="017b462c" officeooo:paragraph-rsid="017b531c"/>
    </style:style>
    <style:style style:name="P539" style:family="paragraph" style:parent-style-name="Standard">
      <style:text-properties officeooo:rsid="01896efd" officeooo:paragraph-rsid="01896efd"/>
    </style:style>
    <style:style style:name="P540" style:family="paragraph" style:parent-style-name="Standard">
      <style:text-properties officeooo:rsid="0192065a" officeooo:paragraph-rsid="0192065a"/>
    </style:style>
    <style:style style:name="P541" style:family="paragraph" style:parent-style-name="Table_20_Contents">
      <style:text-properties officeooo:rsid="0192065a" officeooo:paragraph-rsid="0192065a"/>
    </style:style>
    <style:style style:name="P542" style:family="paragraph" style:parent-style-name="Standard">
      <style:text-properties officeooo:rsid="019827f8" officeooo:paragraph-rsid="019827f8"/>
    </style:style>
    <style:style style:name="P543" style:family="paragraph" style:parent-style-name="Highlighted">
      <style:text-properties officeooo:rsid="019827f8" officeooo:paragraph-rsid="019827f8"/>
    </style:style>
    <style:style style:name="P544" style:family="paragraph" style:parent-style-name="Standard">
      <style:text-properties officeooo:paragraph-rsid="019940f7"/>
    </style:style>
    <style:style style:name="P545" style:family="paragraph" style:parent-style-name="Standard">
      <style:text-properties officeooo:rsid="012f893f" officeooo:paragraph-rsid="012f893f"/>
    </style:style>
    <style:style style:name="P546" style:family="paragraph" style:parent-style-name="Table_20_Contents">
      <style:text-properties officeooo:rsid="012f893f" officeooo:paragraph-rsid="012f893f"/>
    </style:style>
    <style:style style:name="P547" style:family="paragraph" style:parent-style-name="Table_20_Contents">
      <style:text-properties officeooo:rsid="012f893f" officeooo:paragraph-rsid="019ac7f8"/>
    </style:style>
    <style:style style:name="P548" style:family="paragraph" style:parent-style-name="Table_20_Contents">
      <style:text-properties officeooo:rsid="012f893f" officeooo:paragraph-rsid="019de97e"/>
    </style:style>
    <style:style style:name="P549" style:family="paragraph" style:parent-style-name="Table_20_Contents">
      <style:text-properties officeooo:rsid="012f893f" officeooo:paragraph-rsid="019f9353"/>
    </style:style>
    <style:style style:name="P550" style:family="paragraph" style:parent-style-name="Table_20_Contents">
      <style:text-properties officeooo:rsid="012f893f" officeooo:paragraph-rsid="026af2cd"/>
    </style:style>
    <style:style style:name="P551" style:family="paragraph" style:parent-style-name="Standard">
      <style:text-properties officeooo:rsid="019a55ad" officeooo:paragraph-rsid="019a55ad"/>
    </style:style>
    <style:style style:name="P552" style:family="paragraph" style:parent-style-name="Standard">
      <style:text-properties officeooo:rsid="019a55ad" officeooo:paragraph-rsid="019ac7f8"/>
    </style:style>
    <style:style style:name="P553" style:family="paragraph" style:parent-style-name="Standard">
      <style:text-properties officeooo:rsid="019d1dd2" officeooo:paragraph-rsid="019d1dd2"/>
    </style:style>
    <style:style style:name="P554" style:family="paragraph" style:parent-style-name="Standard">
      <style:text-properties officeooo:rsid="019de97e" officeooo:paragraph-rsid="019de97e"/>
    </style:style>
    <style:style style:name="P555" style:family="paragraph" style:parent-style-name="Table_20_Contents">
      <style:text-properties officeooo:rsid="019de97e" officeooo:paragraph-rsid="019de97e"/>
    </style:style>
    <style:style style:name="P556" style:family="paragraph" style:parent-style-name="Standard">
      <style:text-properties officeooo:rsid="019f9353" officeooo:paragraph-rsid="019f9353"/>
    </style:style>
    <style:style style:name="P557" style:family="paragraph" style:parent-style-name="Table_20_Contents">
      <style:text-properties officeooo:rsid="019f9353" officeooo:paragraph-rsid="019f9353"/>
    </style:style>
    <style:style style:name="P558" style:family="paragraph" style:parent-style-name="Standard">
      <style:text-properties officeooo:rsid="019f9353" officeooo:paragraph-rsid="026af2cd"/>
    </style:style>
    <style:style style:name="P559" style:family="paragraph" style:parent-style-name="Table_20_Contents">
      <style:text-properties officeooo:rsid="019f9353" officeooo:paragraph-rsid="026af2cd"/>
    </style:style>
    <style:style style:name="P560" style:family="paragraph" style:parent-style-name="Standard">
      <style:text-properties officeooo:rsid="01a04c4c" officeooo:paragraph-rsid="01a04c4c"/>
    </style:style>
    <style:style style:name="P561" style:family="paragraph" style:parent-style-name="Standard">
      <style:text-properties officeooo:rsid="01b26728" officeooo:paragraph-rsid="01b26728"/>
    </style:style>
    <style:style style:name="P562" style:family="paragraph" style:parent-style-name="Standard">
      <style:text-properties officeooo:rsid="01b26728" officeooo:paragraph-rsid="01b28d31"/>
    </style:style>
    <style:style style:name="P563" style:family="paragraph" style:parent-style-name="Standard">
      <style:text-properties officeooo:rsid="01c4cec1" officeooo:paragraph-rsid="01c4cec1"/>
    </style:style>
    <style:style style:name="P564" style:family="paragraph" style:parent-style-name="Standard">
      <style:text-properties officeooo:rsid="01ca1370" officeooo:paragraph-rsid="01ca1370"/>
    </style:style>
    <style:style style:name="P565" style:family="paragraph" style:parent-style-name="Standard">
      <style:text-properties officeooo:rsid="01ca1370" officeooo:paragraph-rsid="01ca2bea"/>
    </style:style>
    <style:style style:name="P566" style:family="paragraph" style:parent-style-name="Standard">
      <style:text-properties officeooo:rsid="01ca2bea" officeooo:paragraph-rsid="01ca2bea"/>
    </style:style>
    <style:style style:name="P567" style:family="paragraph" style:parent-style-name="Standard">
      <style:text-properties officeooo:rsid="01ca2bea" officeooo:paragraph-rsid="01cc60e9"/>
    </style:style>
    <style:style style:name="P568" style:family="paragraph" style:parent-style-name="Standard">
      <style:text-properties officeooo:rsid="01cc60e9" officeooo:paragraph-rsid="01cc60e9"/>
    </style:style>
    <style:style style:name="P569" style:family="paragraph" style:parent-style-name="Standard">
      <style:text-properties officeooo:rsid="01cd3b97" officeooo:paragraph-rsid="01cd3b97"/>
    </style:style>
    <style:style style:name="P570" style:family="paragraph" style:parent-style-name="Standard">
      <style:text-properties officeooo:rsid="01d38901" officeooo:paragraph-rsid="01d38901"/>
    </style:style>
    <style:style style:name="P571" style:family="paragraph" style:parent-style-name="Standard">
      <style:text-properties officeooo:rsid="01d66621" officeooo:paragraph-rsid="01d66621"/>
    </style:style>
    <style:style style:name="P572" style:family="paragraph" style:parent-style-name="Standard">
      <style:text-properties officeooo:rsid="01d760de" officeooo:paragraph-rsid="01d760de"/>
    </style:style>
    <style:style style:name="P573" style:family="paragraph" style:parent-style-name="Standard">
      <style:text-properties officeooo:rsid="01db6e0e" officeooo:paragraph-rsid="01db6e0e"/>
    </style:style>
    <style:style style:name="P574" style:family="paragraph" style:parent-style-name="Highlighted">
      <style:text-properties officeooo:rsid="01db6e0e" officeooo:paragraph-rsid="01db6e0e"/>
    </style:style>
    <style:style style:name="P575" style:family="paragraph" style:parent-style-name="Standard">
      <style:text-properties officeooo:rsid="01db6e0e" officeooo:paragraph-rsid="01dbe152"/>
    </style:style>
    <style:style style:name="P576" style:family="paragraph" style:parent-style-name="Standard">
      <style:text-properties officeooo:rsid="01e0b56d" officeooo:paragraph-rsid="01e0b56d"/>
    </style:style>
    <style:style style:name="P577" style:family="paragraph" style:parent-style-name="Table_20_Contents">
      <style:text-properties officeooo:rsid="01e0b56d" officeooo:paragraph-rsid="01e0b56d"/>
    </style:style>
    <style:style style:name="P578" style:family="paragraph" style:parent-style-name="Standard">
      <style:text-properties officeooo:rsid="01e0b56d" officeooo:paragraph-rsid="01eeca0c"/>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Standard">
      <style:text-properties officeooo:rsid="00f088cc" officeooo:paragraph-rsid="00f088cc"/>
    </style:style>
    <style:style style:name="P582" style:family="paragraph" style:parent-style-name="Table_20_Contents">
      <style:text-properties officeooo:rsid="00f088cc" officeooo:paragraph-rsid="00f088cc"/>
    </style:style>
    <style:style style:name="P583" style:family="paragraph" style:parent-style-name="Standard">
      <style:text-properties officeooo:rsid="00f088cc" officeooo:paragraph-rsid="01eeca0c"/>
    </style:style>
    <style:style style:name="P584" style:family="paragraph" style:parent-style-name="Table_20_Contents">
      <style:text-properties officeooo:rsid="00f088cc" officeooo:paragraph-rsid="01eeca0c"/>
    </style:style>
    <style:style style:name="P585" style:family="paragraph" style:parent-style-name="Table_20_Contents">
      <style:text-properties officeooo:rsid="00f088cc" officeooo:paragraph-rsid="01f8de69"/>
    </style:style>
    <style:style style:name="P586" style:family="paragraph" style:parent-style-name="Standard">
      <style:text-properties officeooo:rsid="01eeca0c" officeooo:paragraph-rsid="01eeca0c"/>
    </style:style>
    <style:style style:name="P587" style:family="paragraph" style:parent-style-name="Standard">
      <style:text-properties officeooo:rsid="01f6ad98" officeooo:paragraph-rsid="01f6ad98"/>
    </style:style>
    <style:style style:name="P588" style:family="paragraph" style:parent-style-name="Standard">
      <style:text-properties officeooo:rsid="01f6ad98" officeooo:paragraph-rsid="01f724a5"/>
    </style:style>
    <style:style style:name="P589" style:family="paragraph" style:parent-style-name="Standard">
      <style:text-properties officeooo:rsid="01f8de69" officeooo:paragraph-rsid="01f8de69"/>
    </style:style>
    <style:style style:name="P590" style:family="paragraph" style:parent-style-name="Table_20_Contents">
      <style:text-properties officeooo:rsid="01f8de69" officeooo:paragraph-rsid="01f8de69"/>
    </style:style>
    <style:style style:name="P591" style:family="paragraph" style:parent-style-name="Standard">
      <style:text-properties officeooo:rsid="0202f2a1" officeooo:paragraph-rsid="02037047"/>
    </style:style>
    <style:style style:name="P592" style:family="paragraph" style:parent-style-name="Standard">
      <style:text-properties officeooo:rsid="0202f2a1" officeooo:paragraph-rsid="020bc993"/>
    </style:style>
    <style:style style:name="P593" style:family="paragraph" style:parent-style-name="Standard">
      <style:text-properties officeooo:rsid="0209da56" officeooo:paragraph-rsid="0209da56"/>
    </style:style>
    <style:style style:name="P594" style:family="paragraph" style:parent-style-name="Standard">
      <style:text-properties officeooo:rsid="0209f0cf" officeooo:paragraph-rsid="0209f0cf"/>
    </style:style>
    <style:style style:name="P595" style:family="paragraph" style:parent-style-name="Table_20_Contents">
      <style:text-properties officeooo:rsid="0209f0cf" officeooo:paragraph-rsid="0209f0cf"/>
    </style:style>
    <style:style style:name="P596" style:family="paragraph" style:parent-style-name="Standard">
      <style:text-properties officeooo:rsid="01fdcac1" officeooo:paragraph-rsid="02011d3d"/>
    </style:style>
    <style:style style:name="P597" style:family="paragraph" style:parent-style-name="Table_20_Contents">
      <style:text-properties officeooo:rsid="01fdcac1" officeooo:paragraph-rsid="01fdcac1"/>
    </style:style>
    <style:style style:name="P598" style:family="paragraph" style:parent-style-name="pascalcode">
      <style:paragraph-properties fo:margin-top="0.0799in" fo:margin-bottom="0.1701in" style:contextual-spacing="true"/>
      <style:text-properties officeooo:rsid="01fdcac1" officeooo:paragraph-rsid="01fdcac1"/>
    </style:style>
    <style:style style:name="P599" style:family="paragraph" style:parent-style-name="Standard">
      <style:text-properties officeooo:paragraph-rsid="00ee7b1b"/>
    </style:style>
    <style:style style:name="P600" style:family="paragraph" style:parent-style-name="Standard">
      <style:text-properties officeooo:rsid="021254a1" officeooo:paragraph-rsid="021254a1"/>
    </style:style>
    <style:style style:name="P601" style:family="paragraph" style:parent-style-name="pascalcode">
      <style:text-properties officeooo:rsid="021254a1" officeooo:paragraph-rsid="021254a1"/>
    </style:style>
    <style:style style:name="P602" style:family="paragraph" style:parent-style-name="Standard">
      <style:text-properties officeooo:rsid="02146a72" officeooo:paragraph-rsid="02146a72"/>
    </style:style>
    <style:style style:name="P603" style:family="paragraph" style:parent-style-name="Table_20_Contents">
      <style:text-properties officeooo:rsid="02146a72" officeooo:paragraph-rsid="02146a72"/>
    </style:style>
    <style:style style:name="P604" style:family="paragraph" style:parent-style-name="Standard">
      <style:text-properties officeooo:rsid="021ccea5" officeooo:paragraph-rsid="021ccea5"/>
    </style:style>
    <style:style style:name="P605" style:family="paragraph" style:parent-style-name="Standard">
      <style:text-properties officeooo:rsid="022bf951" officeooo:paragraph-rsid="022bf951"/>
    </style:style>
    <style:style style:name="P606" style:family="paragraph" style:parent-style-name="Standard">
      <style:text-properties officeooo:rsid="023bfcff" officeooo:paragraph-rsid="023bfcff"/>
    </style:style>
    <style:style style:name="P607" style:family="paragraph" style:parent-style-name="Standard">
      <style:text-properties officeooo:rsid="023bfcff" officeooo:paragraph-rsid="023df61b"/>
    </style:style>
    <style:style style:name="P608" style:family="paragraph" style:parent-style-name="Standard">
      <style:text-properties officeooo:paragraph-rsid="0243bb48"/>
    </style:style>
    <style:style style:name="P609" style:family="paragraph" style:parent-style-name="Standard">
      <style:text-properties officeooo:rsid="0250d175" officeooo:paragraph-rsid="0250d175"/>
    </style:style>
    <style:style style:name="P610" style:family="paragraph" style:parent-style-name="Table_20_Contents">
      <style:text-properties officeooo:rsid="0250d175" officeooo:paragraph-rsid="0250d175"/>
    </style:style>
    <style:style style:name="P611" style:family="paragraph" style:parent-style-name="Standard">
      <style:text-properties officeooo:rsid="0257f612" officeooo:paragraph-rsid="0257f612"/>
    </style:style>
    <style:style style:name="P612" style:family="paragraph" style:parent-style-name="Standard">
      <style:text-properties officeooo:rsid="025d8cee" officeooo:paragraph-rsid="025d8cee"/>
    </style:style>
    <style:style style:name="P613" style:family="paragraph" style:parent-style-name="Standard">
      <style:text-properties officeooo:rsid="025d8cee" officeooo:paragraph-rsid="026eb1f1"/>
    </style:style>
    <style:style style:name="P614" style:family="paragraph" style:parent-style-name="Standard">
      <style:text-properties officeooo:rsid="019ac7f8" officeooo:paragraph-rsid="019ac7f8"/>
    </style:style>
    <style:style style:name="P615" style:family="paragraph" style:parent-style-name="Table_20_Contents">
      <style:text-properties officeooo:rsid="019ac7f8" officeooo:paragraph-rsid="019ac7f8"/>
    </style:style>
    <style:style style:name="P616" style:family="paragraph" style:parent-style-name="Table_20_Contents">
      <style:text-properties officeooo:rsid="019ac7f8" officeooo:paragraph-rsid="019d1dd2"/>
    </style:style>
    <style:style style:name="P617" style:family="paragraph" style:parent-style-name="Table_20_Contents">
      <style:text-properties officeooo:rsid="019ac7f8" officeooo:paragraph-rsid="019de97e"/>
    </style:style>
    <style:style style:name="P618" style:family="paragraph" style:parent-style-name="Table_20_Contents">
      <style:text-properties officeooo:rsid="019ac7f8" officeooo:paragraph-rsid="019f9353"/>
    </style:style>
    <style:style style:name="P619" style:family="paragraph" style:parent-style-name="Table_20_Contents">
      <style:text-properties officeooo:rsid="019ac7f8" officeooo:paragraph-rsid="026af2cd"/>
    </style:style>
    <style:style style:name="P620" style:family="paragraph" style:parent-style-name="Standard">
      <style:text-properties officeooo:rsid="02695b96" officeooo:paragraph-rsid="02695b96"/>
    </style:style>
    <style:style style:name="P621" style:family="paragraph" style:parent-style-name="Table_20_Contents">
      <style:text-properties officeooo:rsid="02695b96" officeooo:paragraph-rsid="02695b96"/>
    </style:style>
    <style:style style:name="P622" style:family="paragraph" style:parent-style-name="Standard">
      <style:text-properties officeooo:rsid="026af2cd" officeooo:paragraph-rsid="026af2cd"/>
    </style:style>
    <style:style style:name="P623" style:family="paragraph" style:parent-style-name="Table_20_Contents">
      <style:text-properties officeooo:rsid="026af2cd" officeooo:paragraph-rsid="026af2cd"/>
    </style:style>
    <style:style style:name="P624" style:family="paragraph" style:parent-style-name="Standard">
      <style:text-properties officeooo:rsid="026cdb12" officeooo:paragraph-rsid="026cdb12"/>
    </style:style>
    <style:style style:name="P625" style:family="paragraph" style:parent-style-name="Standard">
      <style:text-properties officeooo:rsid="02745042" officeooo:paragraph-rsid="02745042"/>
    </style:style>
    <style:style style:name="P626" style:family="paragraph" style:parent-style-name="Standard">
      <style:text-properties officeooo:rsid="017ffa92" officeooo:paragraph-rsid="0275af6c"/>
    </style:style>
    <style:style style:name="P627" style:family="paragraph" style:parent-style-name="Standard">
      <style:text-properties officeooo:rsid="0279e93f" officeooo:paragraph-rsid="0279e93f"/>
    </style:style>
    <style:style style:name="P628" style:family="paragraph" style:parent-style-name="Standard">
      <style:text-properties officeooo:paragraph-rsid="0279e93f"/>
    </style:style>
    <style:style style:name="P629" style:family="paragraph" style:parent-style-name="Table_20_Contents">
      <style:text-properties officeooo:paragraph-rsid="0279e93f"/>
    </style:style>
    <style:style style:name="P630" style:family="paragraph" style:parent-style-name="Standard">
      <style:text-properties officeooo:rsid="027bfcce" officeooo:paragraph-rsid="027bfcce"/>
    </style:style>
    <style:style style:name="P631" style:family="paragraph" style:parent-style-name="Standard">
      <style:text-properties officeooo:rsid="027c0351" officeooo:paragraph-rsid="027c0351"/>
    </style:style>
    <style:style style:name="P632" style:family="paragraph" style:parent-style-name="Standard">
      <style:text-properties officeooo:rsid="027d3b80" officeooo:paragraph-rsid="027d3b80"/>
    </style:style>
    <style:style style:name="P633" style:family="paragraph" style:parent-style-name="Standard">
      <style:text-properties officeooo:paragraph-rsid="02869b60"/>
    </style:style>
    <style:style style:name="P634" style:family="paragraph" style:parent-style-name="Standard">
      <style:text-properties officeooo:rsid="01d112b0" officeooo:paragraph-rsid="01d112b0"/>
    </style:style>
    <style:style style:name="P635" style:family="paragraph" style:parent-style-name="Table_20_Contents">
      <style:paragraph-properties fo:margin-top="0in" fo:margin-bottom="0.1701in" style:contextual-spacing="false"/>
      <style:text-properties officeooo:rsid="00013f83" officeooo:paragraph-rsid="00d4375d"/>
    </style:style>
    <style:style style:name="P636" style:family="paragraph" style:parent-style-name="Table_20_Contents">
      <style:paragraph-properties fo:margin-top="0in" fo:margin-bottom="0.1701in" style:contextual-spacing="false"/>
      <style:text-properties officeooo:paragraph-rsid="0125f0e0"/>
    </style:style>
    <style:style style:name="P637" style:family="paragraph" style:parent-style-name="Table_20_Contents">
      <style:paragraph-properties fo:margin-top="0in" fo:margin-bottom="0.1701in" style:contextual-spacing="false"/>
      <style:text-properties officeooo:rsid="0125f0e0" officeooo:paragraph-rsid="0125f0e0"/>
    </style:style>
    <style:style style:name="P638" style:family="paragraph" style:parent-style-name="Table_20_Contents">
      <style:text-properties officeooo:rsid="0125f0e0" officeooo:paragraph-rsid="0125f0e0"/>
    </style:style>
    <style:style style:name="P639" style:family="paragraph" style:parent-style-name="Table_20_Contents">
      <style:paragraph-properties fo:margin-top="0in" fo:margin-bottom="0.1701in" style:contextual-spacing="false"/>
      <style:text-properties officeooo:paragraph-rsid="01512986"/>
    </style:style>
    <style:style style:name="P640" style:family="paragraph" style:parent-style-name="pascalcode">
      <style:text-properties officeooo:paragraph-rsid="01512986"/>
    </style:style>
    <style:style style:name="P641" style:family="paragraph" style:parent-style-name="Standard">
      <style:paragraph-properties fo:margin-top="0in" fo:margin-bottom="0.1701in" style:contextual-spacing="false"/>
      <style:text-properties officeooo:rsid="000efee7" officeooo:paragraph-rsid="012c993d"/>
    </style:style>
    <style:style style:name="P642" style:family="paragraph" style:parent-style-name="Table_20_Contents">
      <style:text-properties officeooo:rsid="00f00ab7" officeooo:paragraph-rsid="00f00ab7"/>
    </style:style>
    <style:style style:name="P643" style:family="paragraph" style:parent-style-name="Table_20_Contents">
      <style:text-properties officeooo:rsid="00f00ab7" officeooo:paragraph-rsid="00fd335e"/>
    </style:style>
    <style:style style:name="P644" style:family="paragraph" style:parent-style-name="Table_20_Contents">
      <style:text-properties officeooo:rsid="00f00ab7" officeooo:paragraph-rsid="01eeca0c"/>
    </style:style>
    <style:style style:name="P645" style:family="paragraph" style:parent-style-name="Table_20_Contents">
      <style:text-properties officeooo:rsid="00f00ab7" officeooo:paragraph-rsid="01fdcac1"/>
    </style:style>
    <style:style style:name="P646" style:family="paragraph" style:parent-style-name="Table_20_Contents">
      <style:text-properties officeooo:rsid="00f00ab7" officeooo:paragraph-rsid="01feed26"/>
    </style:style>
    <style:style style:name="P647" style:family="paragraph" style:parent-style-name="Table_20_Contents">
      <style:text-properties officeooo:rsid="00f00ab7" officeooo:paragraph-rsid="00fef681"/>
    </style:style>
    <style:style style:name="P648" style:family="paragraph" style:parent-style-name="Table_20_Contents">
      <style:text-properties officeooo:rsid="00f2298f" officeooo:paragraph-rsid="00f2298f"/>
    </style:style>
    <style:style style:name="P649" style:family="paragraph" style:parent-style-name="Table_20_Contents">
      <style:text-properties officeooo:rsid="00f2298f" officeooo:paragraph-rsid="00f7ac29"/>
    </style:style>
    <style:style style:name="P650" style:family="paragraph" style:parent-style-name="Table_20_Contents">
      <style:text-properties officeooo:rsid="00f2298f" officeooo:paragraph-rsid="01eeca0c"/>
    </style:style>
    <style:style style:name="P651" style:family="paragraph" style:parent-style-name="Table_20_Contents">
      <style:text-properties officeooo:rsid="00f2298f" officeooo:paragraph-rsid="01fc4913"/>
    </style:style>
    <style:style style:name="P652" style:family="paragraph" style:parent-style-name="Table_20_Contents">
      <style:text-properties officeooo:rsid="00f2298f" officeooo:paragraph-rsid="01feed26"/>
    </style:style>
    <style:style style:name="P653" style:family="paragraph" style:parent-style-name="Table_20_Contents">
      <style:text-properties officeooo:rsid="00f2298f" officeooo:paragraph-rsid="02051d53"/>
    </style:style>
    <style:style style:name="P654" style:family="paragraph" style:parent-style-name="Table_20_Contents">
      <style:text-properties officeooo:rsid="00f2298f" officeooo:paragraph-rsid="0209da56"/>
    </style:style>
    <style:style style:name="P655" style:family="paragraph" style:parent-style-name="Table_20_Contents">
      <style:text-properties officeooo:rsid="00f7ac29" officeooo:paragraph-rsid="00f7ac29"/>
    </style:style>
    <style:style style:name="P656" style:family="paragraph" style:parent-style-name="Table_20_Contents">
      <style:text-properties officeooo:rsid="00f7ac29" officeooo:paragraph-rsid="01eeca0c"/>
    </style:style>
    <style:style style:name="P657" style:family="paragraph" style:parent-style-name="Table_20_Contents">
      <style:text-properties officeooo:rsid="00fa1101" officeooo:paragraph-rsid="01eeca0c"/>
    </style:style>
    <style:style style:name="P658" style:family="paragraph" style:parent-style-name="pascalcode">
      <style:text-properties officeooo:rsid="00fa1101" officeooo:paragraph-rsid="01eeca0c"/>
    </style:style>
    <style:style style:name="P659" style:family="paragraph" style:parent-style-name="Table_20_Contents">
      <style:text-properties officeooo:rsid="00fa1101" officeooo:paragraph-rsid="01fdcac1"/>
    </style:style>
    <style:style style:name="P660" style:family="paragraph" style:parent-style-name="pascalcode">
      <style:text-properties officeooo:rsid="00fa1101" officeooo:paragraph-rsid="00fa1101"/>
    </style:style>
    <style:style style:name="P661" style:family="paragraph" style:parent-style-name="Table_20_Contents">
      <style:text-properties officeooo:rsid="0105a189" officeooo:paragraph-rsid="0105a189"/>
    </style:style>
    <style:style style:name="P662" style:family="paragraph" style:parent-style-name="Table_20_Contents">
      <style:text-properties officeooo:rsid="0106f3d3" officeooo:paragraph-rsid="0106f3d3"/>
    </style:style>
    <style:style style:name="P663" style:family="paragraph" style:parent-style-name="Table_20_Contents">
      <style:text-properties officeooo:rsid="01076d58" officeooo:paragraph-rsid="01076d58"/>
    </style:style>
    <style:style style:name="P664" style:family="paragraph" style:parent-style-name="Table_20_Contents">
      <style:text-properties officeooo:rsid="01076d58" officeooo:paragraph-rsid="010cb508"/>
    </style:style>
    <style:style style:name="P665" style:family="paragraph" style:parent-style-name="Table_20_Contents">
      <style:text-properties officeooo:rsid="010cb508" officeooo:paragraph-rsid="010cb508"/>
    </style:style>
    <style:style style:name="P666" style:family="paragraph" style:parent-style-name="Table_20_Contents">
      <style:text-properties officeooo:rsid="010cb508" officeooo:paragraph-rsid="0110d205"/>
    </style:style>
    <style:style style:name="P667" style:family="paragraph" style:parent-style-name="Table_20_Contents">
      <style:text-properties officeooo:rsid="010cb508" officeooo:paragraph-rsid="0113982d"/>
    </style:style>
    <style:style style:name="P668" style:family="paragraph" style:parent-style-name="Table_20_Contents">
      <style:text-properties officeooo:rsid="01174121" officeooo:paragraph-rsid="01174121"/>
    </style:style>
    <style:style style:name="P669" style:family="paragraph" style:parent-style-name="Table_20_Contents">
      <style:text-properties officeooo:rsid="011c1101" officeooo:paragraph-rsid="011c1101"/>
    </style:style>
    <style:style style:name="P670" style:family="paragraph" style:parent-style-name="Table_20_Contents">
      <style:text-properties officeooo:rsid="011c1101" officeooo:paragraph-rsid="014f2a11"/>
    </style:style>
    <style:style style:name="P671" style:family="paragraph" style:parent-style-name="Table_20_Contents">
      <style:text-properties officeooo:rsid="0120505d" officeooo:paragraph-rsid="0120505d"/>
    </style:style>
    <style:style style:name="P672" style:family="paragraph" style:parent-style-name="Table_20_Contents">
      <style:text-properties officeooo:rsid="0121e124" officeooo:paragraph-rsid="0121e124"/>
    </style:style>
    <style:style style:name="P673" style:family="paragraph" style:parent-style-name="Table_20_Contents">
      <style:text-properties officeooo:rsid="0121f98e" officeooo:paragraph-rsid="0121f98e"/>
    </style:style>
    <style:style style:name="P674" style:family="paragraph" style:parent-style-name="Table_20_Contents">
      <style:text-properties officeooo:rsid="01224cde" officeooo:paragraph-rsid="01224cde"/>
    </style:style>
    <style:style style:name="P675" style:family="paragraph" style:parent-style-name="Table_20_Contents">
      <style:text-properties officeooo:rsid="00021b65" officeooo:paragraph-rsid="013d90a7"/>
    </style:style>
    <style:style style:name="P676" style:family="paragraph" style:parent-style-name="Table_20_Contents">
      <style:text-properties fo:font-style="italic" officeooo:rsid="014b359c" officeooo:paragraph-rsid="014b359c" style:font-style-asian="italic" style:font-style-complex="italic"/>
    </style:style>
    <style:style style:name="P677" style:family="paragraph" style:parent-style-name="Table_20_Contents">
      <style:text-properties officeooo:rsid="0152ec6e" officeooo:paragraph-rsid="0152ec6e"/>
    </style:style>
    <style:style style:name="P678" style:family="paragraph" style:parent-style-name="Table_20_Contents">
      <style:text-properties officeooo:rsid="0152ec6e" officeooo:paragraph-rsid="01535050"/>
    </style:style>
    <style:style style:name="P679" style:family="paragraph" style:parent-style-name="Table_20_Contents">
      <style:text-properties officeooo:rsid="0152ec6e" officeooo:paragraph-rsid="0153eee5"/>
    </style:style>
    <style:style style:name="P680" style:family="paragraph" style:parent-style-name="Table_20_Contents">
      <style:text-properties officeooo:rsid="01535050" officeooo:paragraph-rsid="01535050"/>
    </style:style>
    <style:style style:name="P681" style:family="paragraph" style:parent-style-name="Table_20_Contents">
      <style:text-properties officeooo:rsid="015d828e" officeooo:paragraph-rsid="015d828e"/>
    </style:style>
    <style:style style:name="P682" style:family="paragraph" style:parent-style-name="Table_20_Contents">
      <style:text-properties officeooo:rsid="01603609" officeooo:paragraph-rsid="01603609"/>
    </style:style>
    <style:style style:name="P683" style:family="paragraph" style:parent-style-name="Table_20_Contents">
      <style:text-properties officeooo:rsid="01783caf" officeooo:paragraph-rsid="01783caf"/>
    </style:style>
    <style:style style:name="P684" style:family="paragraph" style:parent-style-name="Table_20_Contents">
      <style:text-properties officeooo:rsid="017a1bc6" officeooo:paragraph-rsid="017a1bc6"/>
    </style:style>
    <style:style style:name="P685" style:family="paragraph" style:parent-style-name="Table_20_Contents">
      <style:text-properties officeooo:rsid="017a1bc6" officeooo:paragraph-rsid="017a6461"/>
    </style:style>
    <style:style style:name="P686" style:family="paragraph" style:parent-style-name="Table_20_Contents">
      <style:text-properties officeooo:rsid="017a1bc6" officeooo:paragraph-rsid="018b07f2"/>
    </style:style>
    <style:style style:name="P687" style:family="paragraph" style:parent-style-name="Table_20_Contents">
      <style:text-properties officeooo:rsid="017a1bc6" officeooo:paragraph-rsid="01eb2fbe"/>
    </style:style>
    <style:style style:name="P688" style:family="paragraph" style:parent-style-name="Table_20_Contents">
      <style:text-properties officeooo:rsid="017a6461" officeooo:paragraph-rsid="017a6461"/>
    </style:style>
    <style:style style:name="P689" style:family="paragraph" style:parent-style-name="Table_20_Contents">
      <style:text-properties officeooo:rsid="017e7995" officeooo:paragraph-rsid="017e7995"/>
    </style:style>
    <style:style style:name="P690" style:family="paragraph" style:parent-style-name="Table_20_Contents">
      <style:text-properties officeooo:paragraph-rsid="018740e3"/>
    </style:style>
    <style:style style:name="P691" style:family="paragraph" style:parent-style-name="Table_20_Contents">
      <style:text-properties officeooo:rsid="01883cb8" officeooo:paragraph-rsid="01883cb8"/>
    </style:style>
    <style:style style:name="P692" style:family="paragraph" style:parent-style-name="Table_20_Contents">
      <style:text-properties officeooo:paragraph-rsid="0192065a"/>
    </style:style>
    <style:style style:name="P693" style:family="paragraph" style:parent-style-name="Table_20_Contents">
      <style:text-properties officeooo:rsid="019340d0" officeooo:paragraph-rsid="019340d0"/>
    </style:style>
    <style:style style:name="P694" style:family="paragraph" style:parent-style-name="Table_20_Contents">
      <style:text-properties officeooo:paragraph-rsid="01c577cf"/>
    </style:style>
    <style:style style:name="P695" style:family="paragraph" style:parent-style-name="Table_20_Contents">
      <style:text-properties officeooo:rsid="01c85c46" officeooo:paragraph-rsid="01c85c46"/>
    </style:style>
    <style:style style:name="P696" style:family="paragraph" style:parent-style-name="Table_20_Contents">
      <style:text-properties officeooo:paragraph-rsid="01d533af"/>
    </style:style>
    <style:style style:name="P697" style:family="paragraph" style:parent-style-name="Table_20_Contents">
      <style:text-properties officeooo:rsid="01d53865" officeooo:paragraph-rsid="01d53865"/>
    </style:style>
    <style:style style:name="P698" style:family="paragraph" style:parent-style-name="Highlighted">
      <style:text-properties officeooo:rsid="01d53865" officeooo:paragraph-rsid="01d53865"/>
    </style:style>
    <style:style style:name="P699" style:family="paragraph" style:parent-style-name="Table_20_Contents">
      <style:text-properties officeooo:rsid="01d96f09" officeooo:paragraph-rsid="01d96f09"/>
    </style:style>
    <style:style style:name="P700" style:family="paragraph" style:parent-style-name="Table_20_Contents">
      <style:text-properties officeooo:rsid="01df8c35" officeooo:paragraph-rsid="01df8c35"/>
    </style:style>
    <style:style style:name="P701" style:family="paragraph" style:parent-style-name="Table_20_Contents">
      <style:text-properties officeooo:rsid="01df8c35" officeooo:paragraph-rsid="01eeca0c"/>
    </style:style>
    <style:style style:name="P702" style:family="paragraph" style:parent-style-name="Table_20_Contents">
      <style:text-properties officeooo:rsid="01e069a6" officeooo:paragraph-rsid="01e069a6"/>
    </style:style>
    <style:style style:name="P703" style:family="paragraph" style:parent-style-name="Table_20_Contents">
      <style:text-properties officeooo:rsid="01e069a6" officeooo:paragraph-rsid="01eeca0c"/>
    </style:style>
    <style:style style:name="P704" style:family="paragraph" style:parent-style-name="Table_20_Contents">
      <style:text-properties officeooo:paragraph-rsid="01e0b56d"/>
    </style:style>
    <style:style style:name="P705" style:family="paragraph" style:parent-style-name="Table_20_Contents">
      <style:text-properties officeooo:rsid="01e65964" officeooo:paragraph-rsid="01e65964"/>
    </style:style>
    <style:style style:name="P706" style:family="paragraph" style:parent-style-name="Table_20_Contents">
      <style:text-properties officeooo:rsid="01e65964" officeooo:paragraph-rsid="01eeca0c"/>
    </style:style>
    <style:style style:name="P707" style:family="paragraph" style:parent-style-name="Table_20_Contents">
      <style:text-properties officeooo:rsid="01e8dbaf" officeooo:paragraph-rsid="01e8dbaf"/>
    </style:style>
    <style:style style:name="P708" style:family="paragraph" style:parent-style-name="Table_20_Contents">
      <style:text-properties officeooo:rsid="01e8dbaf" officeooo:paragraph-rsid="01eeca0c"/>
    </style:style>
    <style:style style:name="P709" style:family="paragraph" style:parent-style-name="Table_20_Contents">
      <style:text-properties officeooo:rsid="01eb2fbe" officeooo:paragraph-rsid="01eb2fbe"/>
    </style:style>
    <style:style style:name="P710" style:family="paragraph" style:parent-style-name="Table_20_Contents">
      <style:text-properties officeooo:rsid="01eca3fc" officeooo:paragraph-rsid="01eca3fc"/>
    </style:style>
    <style:style style:name="P711" style:family="paragraph" style:parent-style-name="Table_20_Contents">
      <style:text-properties officeooo:rsid="01f724a5" officeooo:paragraph-rsid="01f724a5"/>
    </style:style>
    <style:style style:name="P712" style:family="paragraph" style:parent-style-name="Table_20_Contents">
      <style:text-properties officeooo:rsid="01f76e66" officeooo:paragraph-rsid="01f76e66"/>
    </style:style>
    <style:style style:name="P713" style:family="paragraph" style:parent-style-name="Table_20_Contents">
      <style:text-properties officeooo:rsid="0206bfbf" officeooo:paragraph-rsid="0206bfbf"/>
    </style:style>
    <style:style style:name="P714" style:family="paragraph" style:parent-style-name="Table_20_Contents">
      <style:text-properties officeooo:rsid="020b1c04" officeooo:paragraph-rsid="020b1c04"/>
    </style:style>
    <style:style style:name="P715" style:family="paragraph" style:parent-style-name="pascalcode">
      <style:text-properties officeooo:rsid="020b1c04" officeooo:paragraph-rsid="020b1c04"/>
    </style:style>
    <style:style style:name="P716" style:family="paragraph" style:parent-style-name="After_20_Table">
      <style:text-properties officeooo:rsid="020b1c04" officeooo:paragraph-rsid="020b1c04"/>
    </style:style>
    <style:style style:name="P717" style:family="paragraph" style:parent-style-name="Table_20_Contents">
      <style:text-properties officeooo:paragraph-rsid="020b1c04"/>
    </style:style>
    <style:style style:name="P718" style:family="paragraph" style:parent-style-name="Table_20_Contents">
      <style:text-properties officeooo:rsid="020bc993" officeooo:paragraph-rsid="020bc993"/>
    </style:style>
    <style:style style:name="P719" style:family="paragraph" style:parent-style-name="Table_20_Contents">
      <style:text-properties officeooo:rsid="021512a5" officeooo:paragraph-rsid="021512a5"/>
    </style:style>
    <style:style style:name="P720" style:family="paragraph" style:parent-style-name="After_20_Table">
      <style:text-properties officeooo:rsid="021512a5" officeooo:paragraph-rsid="021512a5"/>
    </style:style>
    <style:style style:name="P721" style:family="paragraph" style:parent-style-name="Table_20_Contents">
      <style:text-properties officeooo:rsid="0225fc7e" officeooo:paragraph-rsid="0225fc7e"/>
    </style:style>
    <style:style style:name="P722" style:family="paragraph" style:parent-style-name="Table_20_Contents">
      <style:text-properties officeooo:rsid="0237a105" officeooo:paragraph-rsid="0237a105"/>
    </style:style>
    <style:style style:name="P723" style:family="paragraph" style:parent-style-name="Table_20_Contents">
      <style:text-properties officeooo:rsid="023aa488" officeooo:paragraph-rsid="023aa488"/>
    </style:style>
    <style:style style:name="P724" style:family="paragraph" style:parent-style-name="Standard">
      <style:paragraph-properties fo:margin-top="0.0402in" fo:margin-bottom="0.0402in" style:contextual-spacing="false"/>
      <style:text-properties officeooo:rsid="023aa488" officeooo:paragraph-rsid="023aa488"/>
    </style:style>
    <style:style style:name="P725" style:family="paragraph" style:parent-style-name="Text_20_body">
      <style:paragraph-properties fo:margin-top="0.0402in" fo:margin-bottom="0.0402in" style:contextual-spacing="false"/>
      <style:text-properties officeooo:rsid="023aa488" officeooo:paragraph-rsid="023aa488"/>
    </style:style>
    <style:style style:name="P726" style:family="paragraph" style:parent-style-name="Table_20_Contents">
      <style:text-properties officeooo:rsid="023fbabc" officeooo:paragraph-rsid="023fbabc"/>
    </style:style>
    <style:style style:name="P727" style:family="paragraph" style:parent-style-name="Table_20_Contents">
      <style:text-properties officeooo:rsid="02428cee" officeooo:paragraph-rsid="02428cee"/>
    </style:style>
    <style:style style:name="P728" style:family="paragraph" style:parent-style-name="Highlighted">
      <style:text-properties officeooo:rsid="02428cee" officeooo:paragraph-rsid="02428cee"/>
    </style:style>
    <style:style style:name="P729" style:family="paragraph" style:parent-style-name="Table_20_Contents">
      <style:text-properties officeooo:rsid="024b38c8" officeooo:paragraph-rsid="024b38c8"/>
    </style:style>
    <style:style style:name="P730" style:family="paragraph" style:parent-style-name="Table_20_Contents">
      <style:text-properties officeooo:rsid="024b551c" officeooo:paragraph-rsid="024b551c"/>
    </style:style>
    <style:style style:name="P731" style:family="paragraph" style:parent-style-name="Table_20_Contents">
      <style:text-properties officeooo:rsid="026abbfd" officeooo:paragraph-rsid="026abbfd"/>
    </style:style>
    <style:style style:name="P732" style:family="paragraph" style:parent-style-name="Table_20_Contents">
      <style:text-properties officeooo:rsid="026cc905" officeooo:paragraph-rsid="026cc905"/>
    </style:style>
    <style:style style:name="P733" style:family="paragraph" style:parent-style-name="Table_20_Contents">
      <style:text-properties officeooo:rsid="0278912b" officeooo:paragraph-rsid="0278912b"/>
    </style:style>
    <style:style style:name="P734" style:family="paragraph" style:parent-style-name="Table_20_Contents">
      <style:text-properties style:font-name="DejaVu Sans" fo:font-size="9.5pt" style:font-size-asian="9.5pt" style:font-size-complex="9.5pt"/>
    </style:style>
    <style:style style:name="P735" style:family="paragraph" style:parent-style-name="Table_20_Contents">
      <style:text-properties style:font-name="DejaVu Sans" fo:font-size="9.5pt" officeooo:rsid="027b536a" officeooo:paragraph-rsid="027b536a" style:font-size-asian="9.5pt" style:font-size-complex="9.5pt"/>
    </style:style>
    <style:style style:name="P736" style:family="paragraph" style:parent-style-name="Table_20_Contents">
      <style:text-properties style:font-name="DejaVu Sans" fo:font-size="9pt" style:font-size-asian="9pt" style:font-size-complex="9pt"/>
    </style:style>
    <style:style style:name="P737" style:family="paragraph" style:parent-style-name="Table_20_Contents">
      <style:text-properties officeooo:paragraph-rsid="027bfcce"/>
    </style:style>
    <style:style style:name="P738" style:family="paragraph" style:parent-style-name="Table_20_Contents">
      <style:text-properties officeooo:rsid="028815de" officeooo:paragraph-rsid="028815de"/>
    </style:style>
    <style:style style:name="P739" style:family="paragraph" style:parent-style-name="Table_20_Contents">
      <style:text-properties officeooo:paragraph-rsid="028815de"/>
    </style:style>
    <style:style style:name="P740" style:family="paragraph" style:parent-style-name="SQL">
      <style:text-properties officeooo:paragraph-rsid="00d61d85"/>
    </style:style>
    <style:style style:name="P741" style:family="paragraph" style:parent-style-name="SQL">
      <style:text-properties fo:font-size="9pt" style:font-size-asian="9pt" style:font-size-complex="9pt"/>
    </style:style>
    <style:style style:name="P742" style:family="paragraph" style:parent-style-name="SQL">
      <style:text-properties fo:font-size="9pt" officeooo:rsid="017b72ac" officeooo:paragraph-rsid="017b72ac" style:font-size-asian="9pt" style:font-size-complex="9pt"/>
    </style:style>
    <style:style style:name="P743" style:family="paragraph" style:parent-style-name="SQL">
      <style:text-properties officeooo:paragraph-rsid="017b72ac"/>
    </style:style>
    <style:style style:name="P744" style:family="paragraph" style:parent-style-name="SQL">
      <style:text-properties officeooo:paragraph-rsid="01bd3bf6"/>
    </style:style>
    <style:style style:name="P745" style:family="paragraph" style:parent-style-name="pascalcode">
      <style:text-properties officeooo:rsid="00f86d29" officeooo:paragraph-rsid="01eeca0c"/>
    </style:style>
    <style:style style:name="P746" style:family="paragraph" style:parent-style-name="pascalcode">
      <style:text-properties officeooo:rsid="01e1b0ee" officeooo:paragraph-rsid="01eeca0c"/>
    </style:style>
    <style:style style:name="P747" style:family="paragraph" style:parent-style-name="pascalcode">
      <style:text-properties officeooo:rsid="02011d3d" officeooo:paragraph-rsid="02011d3d"/>
    </style:style>
    <style:style style:name="P748" style:family="paragraph" style:parent-style-name="pascalcode">
      <style:text-properties officeooo:paragraph-rsid="021254a1"/>
    </style:style>
    <style:style style:name="P749" style:family="paragraph" style:parent-style-name="pascalcode">
      <style:text-properties officeooo:rsid="021b176e" officeooo:paragraph-rsid="021b176e"/>
    </style:style>
    <style:style style:name="P750" style:family="paragraph" style:parent-style-name="pascalcode">
      <style:text-properties officeooo:paragraph-rsid="026af2cd"/>
    </style:style>
    <style:style style:name="P751" style:family="paragraph" style:parent-style-name="pascalcode">
      <style:text-properties officeooo:paragraph-rsid="0276185a"/>
    </style:style>
    <style:style style:name="P752" style:family="paragraph" style:parent-style-name="Highlighted">
      <style:text-properties officeooo:rsid="0162bcfa" officeooo:paragraph-rsid="0162bcfa"/>
    </style:style>
    <style:style style:name="P753" style:family="paragraph" style:parent-style-name="Highlighted">
      <style:text-properties officeooo:rsid="01a7e2e2" officeooo:paragraph-rsid="01a7e2e2"/>
    </style:style>
    <style:style style:name="P754" style:family="paragraph" style:parent-style-name="Highlighted">
      <style:text-properties officeooo:rsid="01ab4e00" officeooo:paragraph-rsid="01ab4e00"/>
    </style:style>
    <style:style style:name="P755" style:family="paragraph" style:parent-style-name="Highlighted">
      <style:text-properties officeooo:rsid="01d70ac8" officeooo:paragraph-rsid="01d70ac8"/>
    </style:style>
    <style:style style:name="P756" style:family="paragraph" style:parent-style-name="Highlighted">
      <style:text-properties officeooo:rsid="01985b46" officeooo:paragraph-rsid="01985b46"/>
    </style:style>
    <style:style style:name="P757" style:family="paragraph" style:parent-style-name="Highlighted">
      <style:text-properties officeooo:rsid="02045b16" officeooo:paragraph-rsid="02045b16"/>
    </style:style>
    <style:style style:name="P758" style:family="paragraph" style:parent-style-name="Text_20_body">
      <style:paragraph-properties fo:margin-top="0.0799in" fo:margin-bottom="0.1701in" style:contextual-spacing="false"/>
      <style:text-properties officeooo:rsid="02045b16" officeooo:paragraph-rsid="02045b16"/>
    </style:style>
    <style:style style:name="P759" style:family="paragraph" style:parent-style-name="Text_20_body">
      <style:paragraph-properties fo:margin-top="0.0799in" fo:margin-bottom="0.1701in" style:contextual-spacing="false"/>
      <style:text-properties officeooo:rsid="02045b16" officeooo:paragraph-rsid="020bc993"/>
    </style:style>
    <style:style style:name="P760" style:family="paragraph" style:parent-style-name="Highlighted">
      <style:text-properties officeooo:rsid="022adf11" officeooo:paragraph-rsid="022adf11"/>
    </style:style>
    <style:style style:name="P761" style:family="paragraph" style:parent-style-name="Highlighted">
      <style:text-properties officeooo:paragraph-rsid="0246fa90"/>
    </style:style>
    <style:style style:name="P762" style:family="paragraph" style:parent-style-name="Highlighted">
      <style:text-properties officeooo:rsid="01555d47" officeooo:paragraph-rsid="01555d47"/>
    </style:style>
    <style:style style:name="P763" style:family="paragraph" style:parent-style-name="Highlighted">
      <style:text-properties officeooo:rsid="0271c8e9" officeooo:paragraph-rsid="0271c8e9"/>
    </style:style>
    <style:style style:name="P764" style:family="paragraph" style:parent-style-name="Highlighted">
      <style:text-properties officeooo:rsid="0271c8e9" officeooo:paragraph-rsid="0272b432"/>
    </style:style>
    <style:style style:name="P765" style:family="paragraph" style:parent-style-name="Highlighted">
      <style:text-properties officeooo:rsid="0274ab2f" officeooo:paragraph-rsid="0274ab2f"/>
    </style:style>
    <style:style style:name="P766" style:family="paragraph" style:parent-style-name="Highlighted">
      <style:text-properties officeooo:rsid="027cc21a" officeooo:paragraph-rsid="027cc21a"/>
    </style:style>
    <style:style style:name="P767" style:family="paragraph" style:parent-style-name="SQL">
      <style:paragraph-properties fo:margin-left="1in" fo:margin-right="0in" fo:text-indent="-0.3in" style:auto-text-indent="false"/>
      <style:text-properties officeooo:rsid="0128f804" officeooo:paragraph-rsid="0128f804"/>
    </style:style>
    <style:style style:name="P768" style:family="paragraph" style:parent-style-name="SQL">
      <style:paragraph-properties fo:margin-left="1in" fo:margin-right="0in" fo:text-indent="-0.3in" style:auto-text-indent="false"/>
      <style:text-properties officeooo:rsid="0128f804" officeooo:paragraph-rsid="012a6598"/>
    </style:style>
    <style:style style:name="P769" style:family="paragraph" style:parent-style-name="Standard">
      <style:paragraph-properties fo:margin-top="0.0402in" fo:margin-bottom="0.0402in" style:contextual-spacing="false"/>
      <style:text-properties officeooo:rsid="01490134" officeooo:paragraph-rsid="01490134"/>
    </style:style>
    <style:style style:name="P770" style:family="paragraph" style:parent-style-name="Text_20_body">
      <style:paragraph-properties fo:margin-top="0.0402in" fo:margin-bottom="0.0402in" style:contextual-spacing="false"/>
      <style:text-properties officeooo:rsid="01490134" officeooo:paragraph-rsid="01490134"/>
    </style:style>
    <style:style style:name="P771" style:family="paragraph" style:parent-style-name="Table_20_Contents">
      <style:paragraph-properties fo:margin-top="0.0402in" fo:margin-bottom="0.0402in" style:contextual-spacing="false"/>
      <style:text-properties officeooo:rsid="01490134" officeooo:paragraph-rsid="01490134"/>
    </style:style>
    <style:style style:name="P772" style:family="paragraph" style:parent-style-name="Table_20_Contents">
      <style:paragraph-properties fo:margin-top="0.0402in" fo:margin-bottom="0.0402in" style:contextual-spacing="false" fo:keep-with-next="always"/>
      <style:text-properties officeooo:rsid="01490134" officeooo:paragraph-rsid="01490134"/>
    </style:style>
    <style:style style:name="P773" style:family="paragraph" style:parent-style-name="Standard">
      <style:paragraph-properties fo:margin-top="0.0402in" fo:margin-bottom="0.0402in" style:contextual-spacing="false"/>
      <style:text-properties officeooo:rsid="0191b725" officeooo:paragraph-rsid="0191b725"/>
    </style:style>
    <style:style style:name="P774" style:family="paragraph" style:parent-style-name="Text_20_body">
      <style:paragraph-properties fo:margin-top="0.0402in" fo:margin-bottom="0.0402in" style:contextual-spacing="false"/>
      <style:text-properties officeooo:rsid="0191b725" officeooo:paragraph-rsid="0191b725"/>
    </style:style>
    <style:style style:name="P775" style:family="paragraph" style:parent-style-name="Standard">
      <style:paragraph-properties fo:margin-top="0.0402in" fo:margin-bottom="0.0402in" style:contextual-spacing="false"/>
      <style:text-properties officeooo:rsid="00349edc" officeooo:paragraph-rsid="01b26728"/>
    </style:style>
    <style:style style:name="P776" style:family="paragraph" style:parent-style-name="Text_20_body">
      <style:paragraph-properties fo:margin-top="0.0402in" fo:margin-bottom="0.0402in" style:contextual-spacing="false"/>
      <style:text-properties officeooo:rsid="00349edc" officeooo:paragraph-rsid="01b26728"/>
    </style:style>
    <style:style style:name="P777" style:family="paragraph" style:parent-style-name="Table_20_Contents">
      <style:paragraph-properties fo:margin-top="0.0402in" fo:margin-bottom="0.0402in" style:contextual-spacing="false"/>
      <style:text-properties officeooo:rsid="00349edc" officeooo:paragraph-rsid="01b26728"/>
    </style:style>
    <style:style style:name="P778" style:family="paragraph" style:parent-style-name="Table_20_Contents">
      <style:paragraph-properties fo:margin-top="0.0402in" fo:margin-bottom="0.0402in" style:contextual-spacing="false"/>
      <style:text-properties officeooo:rsid="00349edc" officeooo:paragraph-rsid="0146c85e"/>
    </style:style>
    <style:style style:name="P779" style:family="paragraph" style:parent-style-name="Standard">
      <style:paragraph-properties fo:margin-top="0.0402in" fo:margin-bottom="0.0402in" style:contextual-spacing="false"/>
      <style:text-properties officeooo:rsid="01eea5ea" officeooo:paragraph-rsid="01eea5ea"/>
    </style:style>
    <style:style style:name="P780" style:family="paragraph" style:parent-style-name="Text_20_body">
      <style:paragraph-properties fo:margin-top="0.0402in" fo:margin-bottom="0.0402in" style:contextual-spacing="false"/>
      <style:text-properties officeooo:rsid="01eea5ea" officeooo:paragraph-rsid="01eea5ea"/>
    </style:style>
    <style:style style:name="P781" style:family="paragraph" style:parent-style-name="Text_20_body">
      <style:paragraph-properties fo:margin-top="0.0402in" fo:margin-bottom="0.0402in" style:contextual-spacing="false"/>
      <style:text-properties officeooo:rsid="01eea5ea" officeooo:paragraph-rsid="0222e820"/>
    </style:style>
    <style:style style:name="P782" style:family="paragraph" style:parent-style-name="Standard">
      <style:paragraph-properties fo:margin-top="0.0402in" fo:margin-bottom="0.0402in" style:contextual-spacing="false"/>
      <style:text-properties officeooo:rsid="0222e820" officeooo:paragraph-rsid="0222e820"/>
    </style:style>
    <style:style style:name="P783" style:family="paragraph" style:parent-style-name="Standard">
      <style:paragraph-properties fo:margin-top="0.0402in" fo:margin-bottom="0.0402in" style:contextual-spacing="false"/>
      <style:text-properties officeooo:rsid="02361aaf" officeooo:paragraph-rsid="02361aaf"/>
    </style:style>
    <style:style style:name="P784" style:family="paragraph" style:parent-style-name="Text_20_body">
      <style:paragraph-properties fo:margin-top="0.0402in" fo:margin-bottom="0.0402in" style:contextual-spacing="false"/>
      <style:text-properties officeooo:rsid="02361aaf" officeooo:paragraph-rsid="02361aaf"/>
    </style:style>
    <style:style style:name="P785" style:family="paragraph" style:parent-style-name="Standard">
      <style:paragraph-properties fo:margin-top="0.0402in" fo:margin-bottom="0.0402in" style:contextual-spacing="false"/>
      <style:text-properties officeooo:rsid="023ef53a" officeooo:paragraph-rsid="023ef53a"/>
    </style:style>
    <style:style style:name="P786" style:family="paragraph" style:parent-style-name="Text_20_body">
      <style:paragraph-properties fo:margin-top="0.0402in" fo:margin-bottom="0.0402in" style:contextual-spacing="false"/>
      <style:text-properties officeooo:rsid="02347ca6" officeooo:paragraph-rsid="02347ca6"/>
    </style:style>
    <style:style style:name="P787" style:family="paragraph" style:parent-style-name="Table_20_Contents">
      <style:paragraph-properties fo:margin-top="0.0402in" fo:margin-bottom="0.0402in" style:contextual-spacing="false"/>
      <style:text-properties officeooo:rsid="00346d7d" officeooo:paragraph-rsid="01490134"/>
    </style:style>
    <style:style style:name="P788" style:family="paragraph" style:parent-style-name="Table_20_Contents">
      <style:paragraph-properties fo:margin-top="0.0402in" fo:margin-bottom="0.0402in" style:contextual-spacing="false" fo:keep-with-next="always"/>
      <style:text-properties officeooo:rsid="00346d7d" officeooo:paragraph-rsid="01490134"/>
    </style:style>
    <style:style style:name="P789" style:family="paragraph" style:parent-style-name="Table_20_Contents">
      <style:paragraph-properties fo:margin-top="0.0402in" fo:margin-bottom="0.0402in" style:contextual-spacing="false"/>
      <style:text-properties officeooo:rsid="01476c08" officeooo:paragraph-rsid="01476c08"/>
    </style:style>
    <style:style style:name="P790" style:family="paragraph" style:parent-style-name="Table_20_Contents">
      <style:paragraph-properties fo:margin-top="0.0402in" fo:margin-bottom="0.0402in" style:contextual-spacing="false"/>
      <style:text-properties officeooo:paragraph-rsid="01476c08"/>
    </style:style>
    <style:style style:name="P791" style:family="paragraph" style:parent-style-name="Table_20_Contents">
      <style:paragraph-properties fo:margin-top="0.0402in" fo:margin-bottom="0.0402in" style:contextual-spacing="false"/>
      <style:text-properties officeooo:paragraph-rsid="01490134"/>
    </style:style>
    <style:style style:name="P792" style:family="paragraph" style:parent-style-name="Table_20_Contents">
      <style:paragraph-properties fo:margin-top="0.0402in" fo:margin-bottom="0.0402in" style:contextual-spacing="false"/>
      <style:text-properties officeooo:paragraph-rsid="01b26728"/>
    </style:style>
    <style:style style:name="P793" style:family="paragraph" style:parent-style-name="Table_20_Contents">
      <style:paragraph-properties fo:margin-top="0.0402in" fo:margin-bottom="0.0402in" style:contextual-spacing="false"/>
      <style:text-properties officeooo:rsid="01e50384" officeooo:paragraph-rsid="01e50384"/>
    </style:style>
    <style:style style:name="P794" style:family="paragraph" style:parent-style-name="Frame_20_contents">
      <style:paragraph-properties fo:text-align="justify" style:justify-single-word="false"/>
    </style:style>
    <style:style style:name="P795" style:family="paragraph" style:parent-style-name="SQLStatement">
      <style:text-properties officeooo:paragraph-rsid="02011d3d"/>
    </style:style>
    <style:style style:name="P796" style:family="paragraph" style:parent-style-name="Table_20_Contents">
      <style:paragraph-properties fo:margin-top="0.0827in" fo:margin-bottom="0.0827in" style:contextual-spacing="false"/>
      <style:text-properties officeooo:rsid="0032bb91" officeooo:paragraph-rsid="027ff4f9"/>
    </style:style>
    <style:style style:name="P797" style:family="paragraph" style:parent-style-name="Table_20_Contents">
      <style:paragraph-properties fo:margin-top="0.0827in" fo:margin-bottom="0.0827in" style:contextual-spacing="false"/>
      <style:text-properties officeooo:rsid="0034bf5f" officeooo:paragraph-rsid="027ff4f9"/>
    </style:style>
    <style:style style:name="P798" style:family="paragraph" style:parent-style-name="Standard">
      <style:text-properties officeooo:rsid="028ef2b2" officeooo:paragraph-rsid="028ef2b2"/>
    </style:style>
    <style:style style:name="P799" style:family="paragraph" style:parent-style-name="Standard">
      <style:text-properties officeooo:rsid="028ef2b2" officeooo:paragraph-rsid="028fd785"/>
    </style:style>
    <style:style style:name="P800" style:family="paragraph" style:parent-style-name="Table_20_Contents">
      <style:text-properties officeooo:rsid="028fd785" officeooo:paragraph-rsid="028fd785"/>
    </style:style>
    <style:style style:name="P80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80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80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80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805" style:family="paragraph" style:parent-style-name="Text_20_body">
      <style:text-properties officeooo:rsid="012b3610" officeooo:paragraph-rsid="012b3610"/>
    </style:style>
    <style:style style:name="P806" style:family="paragraph" style:parent-style-name="A2" style:list-style-name="WW8Num2"/>
    <style:style style:name="P807" style:family="paragraph" style:parent-style-name="Appendix" style:list-style-name="WW8Num2"/>
    <style:style style:name="P808" style:family="paragraph" style:parent-style-name="Contents_20_1" style:master-page-name="Front_20_Right">
      <style:paragraph-properties style:page-number="auto">
        <style:tab-stops>
          <style:tab-stop style:position="6.2701in" style:type="right"/>
        </style:tab-stops>
      </style:paragraph-properties>
    </style:style>
    <style:style style:name="P809"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810"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811"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812"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813" style:family="paragraph" style:parent-style-name="Heading_20_1" style:master-page-name="Right_20_Page">
      <style:paragraph-properties style:page-number="1" fo:break-before="auto" fo:break-after="auto"/>
      <style:text-properties officeooo:paragraph-rsid="002a495c"/>
    </style:style>
    <style:style style:name="P814" style:family="paragraph" style:parent-style-name="Heading_20_1">
      <style:text-properties officeooo:rsid="001853c4" officeooo:paragraph-rsid="02271db5"/>
    </style:style>
    <style:style style:name="P815" style:family="paragraph" style:parent-style-name="Heading_20_1">
      <style:text-properties officeooo:rsid="01387aa4" officeooo:paragraph-rsid="01387aa4"/>
    </style:style>
    <style:style style:name="P816" style:family="paragraph" style:parent-style-name="Heading_20_1">
      <style:text-properties officeooo:paragraph-rsid="00d23a81"/>
    </style:style>
    <style:style style:name="P817" style:family="paragraph" style:parent-style-name="Heading_20_1">
      <style:text-properties officeooo:paragraph-rsid="0113982d"/>
    </style:style>
    <style:style style:name="P818" style:family="paragraph" style:parent-style-name="Heading_20_1">
      <style:text-properties officeooo:rsid="013d90a7" officeooo:paragraph-rsid="019d1dd2"/>
    </style:style>
    <style:style style:name="P819" style:family="paragraph" style:parent-style-name="Heading_20_1">
      <style:text-properties officeooo:rsid="0000fe9b" officeooo:paragraph-rsid="013d90a7"/>
    </style:style>
    <style:style style:name="P820" style:family="paragraph" style:parent-style-name="Heading_20_1">
      <style:text-properties officeooo:paragraph-rsid="012ed61f"/>
    </style:style>
    <style:style style:name="P821" style:family="paragraph" style:parent-style-name="Heading_20_2">
      <style:text-properties officeooo:rsid="00c7132a" officeooo:paragraph-rsid="00c7132a"/>
    </style:style>
    <style:style style:name="P822" style:family="paragraph" style:parent-style-name="Heading_20_2">
      <style:text-properties officeooo:rsid="01896efd" officeooo:paragraph-rsid="01896efd"/>
    </style:style>
    <style:style style:name="P823" style:family="paragraph" style:parent-style-name="Heading_20_2">
      <style:text-properties officeooo:rsid="00d23a81" officeooo:paragraph-rsid="00d2a825"/>
    </style:style>
    <style:style style:name="P824" style:family="paragraph" style:parent-style-name="Heading_20_2">
      <style:text-properties officeooo:rsid="00d23a81" officeooo:paragraph-rsid="00d23a81"/>
    </style:style>
    <style:style style:name="P825" style:family="paragraph" style:parent-style-name="Heading_20_2">
      <style:text-properties officeooo:rsid="00d23a81" officeooo:paragraph-rsid="024b551c"/>
    </style:style>
    <style:style style:name="P826" style:family="paragraph" style:parent-style-name="Heading_20_2">
      <style:text-properties officeooo:rsid="00e25053" officeooo:paragraph-rsid="0173fcab"/>
    </style:style>
    <style:style style:name="P827" style:family="paragraph" style:parent-style-name="Heading_20_2">
      <style:text-properties officeooo:rsid="022bf951" officeooo:paragraph-rsid="022bf951"/>
    </style:style>
    <style:style style:name="P828" style:family="paragraph" style:parent-style-name="Heading_20_2">
      <style:text-properties officeooo:rsid="00cd912f" officeooo:paragraph-rsid="0173fcab"/>
    </style:style>
    <style:style style:name="P829" style:family="paragraph" style:parent-style-name="Heading_20_2">
      <style:text-properties officeooo:rsid="00d69792" officeooo:paragraph-rsid="00d69792"/>
    </style:style>
    <style:style style:name="P830" style:family="paragraph" style:parent-style-name="Heading_20_2">
      <style:text-properties officeooo:rsid="00d69792"/>
    </style:style>
    <style:style style:name="P831" style:family="paragraph" style:parent-style-name="Heading_20_2">
      <style:text-properties officeooo:rsid="01c4cec1" officeooo:paragraph-rsid="01c4cec1"/>
    </style:style>
    <style:style style:name="P832" style:family="paragraph" style:parent-style-name="Heading_20_2">
      <style:text-properties officeooo:rsid="01387aa4" officeooo:paragraph-rsid="01387aa4"/>
    </style:style>
    <style:style style:name="P833" style:family="paragraph" style:parent-style-name="Heading_20_2">
      <style:text-properties officeooo:rsid="013cf6fb" officeooo:paragraph-rsid="013cf6fb"/>
    </style:style>
    <style:style style:name="P834" style:family="paragraph" style:parent-style-name="Heading_20_2">
      <style:text-properties officeooo:rsid="00dad200" officeooo:paragraph-rsid="00dad200"/>
    </style:style>
    <style:style style:name="P835" style:family="paragraph" style:parent-style-name="Heading_20_2">
      <style:text-properties officeooo:rsid="015aadeb" officeooo:paragraph-rsid="015aadeb"/>
    </style:style>
    <style:style style:name="P836" style:family="paragraph" style:parent-style-name="Heading_20_2">
      <style:text-properties officeooo:rsid="02146a72" officeooo:paragraph-rsid="02146a72"/>
    </style:style>
    <style:style style:name="P837" style:family="paragraph" style:parent-style-name="Heading_20_2">
      <style:text-properties officeooo:paragraph-rsid="00d4375d"/>
    </style:style>
    <style:style style:name="P838" style:family="paragraph" style:parent-style-name="Heading_20_2">
      <style:text-properties officeooo:rsid="00de0fc1" officeooo:paragraph-rsid="00de0fc1"/>
    </style:style>
    <style:style style:name="P839" style:family="paragraph" style:parent-style-name="Heading_20_2">
      <style:text-properties officeooo:rsid="00dfea1e" officeooo:paragraph-rsid="00dfea1e"/>
    </style:style>
    <style:style style:name="P840" style:family="paragraph" style:parent-style-name="Heading_20_2">
      <style:text-properties fo:font-style="normal" officeooo:rsid="00eaf163" officeooo:paragraph-rsid="00eaf163" style:font-style-asian="normal" style:font-style-complex="normal"/>
    </style:style>
    <style:style style:name="P841" style:family="paragraph" style:parent-style-name="Heading_20_2">
      <style:text-properties officeooo:rsid="010c1eae" officeooo:paragraph-rsid="010c1eae"/>
    </style:style>
    <style:style style:name="P842" style:family="paragraph" style:parent-style-name="Heading_20_2">
      <style:text-properties officeooo:rsid="0110d205" officeooo:paragraph-rsid="0110d205"/>
    </style:style>
    <style:style style:name="P843" style:family="paragraph" style:parent-style-name="Heading_20_2">
      <style:text-properties officeooo:rsid="01128d0e" officeooo:paragraph-rsid="01128d0e"/>
    </style:style>
    <style:style style:name="P844" style:family="paragraph" style:parent-style-name="Heading_20_2">
      <style:text-properties officeooo:rsid="0116168d" officeooo:paragraph-rsid="0116168d"/>
    </style:style>
    <style:style style:name="P845" style:family="paragraph" style:parent-style-name="Heading_20_2">
      <style:text-properties officeooo:rsid="011a3ced" officeooo:paragraph-rsid="011a3ced"/>
    </style:style>
    <style:style style:name="P846" style:family="paragraph" style:parent-style-name="Heading_20_2">
      <style:text-properties officeooo:rsid="01241079" officeooo:paragraph-rsid="01241079"/>
    </style:style>
    <style:style style:name="P847" style:family="paragraph" style:parent-style-name="Heading_20_2">
      <style:text-properties officeooo:rsid="0125f0e0" officeooo:paragraph-rsid="0125f0e0"/>
    </style:style>
    <style:style style:name="P848" style:family="paragraph" style:parent-style-name="Heading_20_2">
      <style:text-properties officeooo:rsid="012d47b9" officeooo:paragraph-rsid="012d47b9"/>
    </style:style>
    <style:style style:name="P849" style:family="paragraph" style:parent-style-name="Heading_20_2">
      <style:text-properties officeooo:rsid="019a55ad" officeooo:paragraph-rsid="019a55ad"/>
    </style:style>
    <style:style style:name="P850" style:family="paragraph" style:parent-style-name="Heading_20_2">
      <style:text-properties officeooo:rsid="02174144" officeooo:paragraph-rsid="026af2cd"/>
    </style:style>
    <style:style style:name="P851" style:family="paragraph" style:parent-style-name="Heading_20_2">
      <style:text-properties officeooo:rsid="024bea25" officeooo:paragraph-rsid="024bea25"/>
    </style:style>
    <style:style style:name="P852" style:family="paragraph" style:parent-style-name="Heading_20_2">
      <style:text-properties officeooo:rsid="018740e3" officeooo:paragraph-rsid="018740e3"/>
    </style:style>
    <style:style style:name="P853" style:family="paragraph" style:parent-style-name="Heading_20_2">
      <style:text-properties officeooo:rsid="0146c85e" officeooo:paragraph-rsid="0146c85e"/>
    </style:style>
    <style:style style:name="P854" style:family="paragraph" style:parent-style-name="Heading_20_2">
      <style:text-properties officeooo:rsid="01512986" officeooo:paragraph-rsid="01512986"/>
    </style:style>
    <style:style style:name="P855" style:family="paragraph" style:parent-style-name="Heading_20_2">
      <style:text-properties officeooo:rsid="0279e93f" officeooo:paragraph-rsid="0279e93f"/>
    </style:style>
    <style:style style:name="P856" style:family="paragraph" style:parent-style-name="Heading_20_2">
      <style:text-properties officeooo:rsid="01447b13" officeooo:paragraph-rsid="01447b13"/>
    </style:style>
    <style:style style:name="P857" style:family="paragraph" style:parent-style-name="Heading_20_2">
      <style:text-properties officeooo:rsid="01455bf5" officeooo:paragraph-rsid="01455bf5"/>
    </style:style>
    <style:style style:name="P858" style:family="paragraph" style:parent-style-name="Heading_20_2">
      <style:text-properties officeooo:rsid="00016212" officeooo:paragraph-rsid="013d90a7"/>
    </style:style>
    <style:style style:name="P859" style:family="paragraph" style:parent-style-name="Heading_20_2">
      <style:text-properties officeooo:rsid="01f6ad98" officeooo:paragraph-rsid="01f6ad98"/>
    </style:style>
    <style:style style:name="P860" style:family="paragraph" style:parent-style-name="Heading_20_2">
      <style:text-properties officeooo:rsid="00ee7b1b" officeooo:paragraph-rsid="00ee7b1b"/>
    </style:style>
    <style:style style:name="P861" style:family="paragraph" style:parent-style-name="Heading_20_2">
      <style:text-properties officeooo:rsid="021254a1" officeooo:paragraph-rsid="021254a1"/>
    </style:style>
    <style:style style:name="P862" style:family="paragraph" style:parent-style-name="Heading_20_2">
      <style:text-properties officeooo:rsid="01f8de69" officeooo:paragraph-rsid="01f8de69"/>
    </style:style>
    <style:style style:name="P863" style:family="paragraph" style:parent-style-name="Heading_20_2">
      <style:text-properties officeooo:rsid="00f088cc" officeooo:paragraph-rsid="00f088cc"/>
    </style:style>
    <style:style style:name="P864" style:family="paragraph" style:parent-style-name="Heading_20_2">
      <style:text-properties officeooo:rsid="00f9ed17" officeooo:paragraph-rsid="00f9ed17"/>
    </style:style>
    <style:style style:name="P865" style:family="paragraph" style:parent-style-name="Heading_20_2">
      <style:text-properties officeooo:rsid="00fa1101" officeooo:paragraph-rsid="00fa1101"/>
    </style:style>
    <style:style style:name="P866" style:family="paragraph" style:parent-style-name="Heading_20_2">
      <style:text-properties officeooo:rsid="00fb3a7c" officeooo:paragraph-rsid="00fb3a7c"/>
    </style:style>
    <style:style style:name="P867" style:family="paragraph" style:parent-style-name="Heading_20_2">
      <style:text-properties officeooo:rsid="00fd335e" officeooo:paragraph-rsid="00fd335e"/>
    </style:style>
    <style:style style:name="P868" style:family="paragraph" style:parent-style-name="Heading_20_2">
      <style:text-properties officeooo:rsid="02011d3d" officeooo:paragraph-rsid="02011d3d"/>
    </style:style>
    <style:style style:name="P869" style:family="paragraph" style:parent-style-name="Heading_20_2">
      <style:text-properties officeooo:rsid="00fef681" officeooo:paragraph-rsid="02037047"/>
    </style:style>
    <style:style style:name="P870" style:family="paragraph" style:parent-style-name="Heading_20_2">
      <style:text-properties officeooo:rsid="01e0b56d" officeooo:paragraph-rsid="01e0b56d"/>
    </style:style>
    <style:style style:name="P871" style:family="paragraph" style:parent-style-name="Heading_20_2">
      <style:text-properties officeooo:rsid="02051d53" officeooo:paragraph-rsid="02051d53"/>
    </style:style>
    <style:style style:name="P872" style:family="paragraph" style:parent-style-name="Heading_20_2">
      <style:text-properties officeooo:rsid="020bc993" officeooo:paragraph-rsid="020bc993"/>
    </style:style>
    <style:style style:name="P873" style:family="paragraph" style:parent-style-name="Heading_20_2">
      <style:text-properties officeooo:rsid="001dbc34"/>
    </style:style>
    <style:style style:name="P874" style:family="paragraph" style:parent-style-name="Heading_20_3">
      <style:text-properties officeooo:rsid="01896efd" officeooo:paragraph-rsid="01896efd"/>
    </style:style>
    <style:style style:name="P875" style:family="paragraph" style:parent-style-name="Heading_20_3">
      <style:text-properties officeooo:rsid="0196e98b" officeooo:paragraph-rsid="0196e98b"/>
    </style:style>
    <style:style style:name="P876" style:family="paragraph" style:parent-style-name="Heading_20_3">
      <style:text-properties officeooo:rsid="01997f4b" officeooo:paragraph-rsid="01997f4b"/>
    </style:style>
    <style:style style:name="P877" style:family="paragraph" style:parent-style-name="Heading_20_3">
      <style:text-properties officeooo:rsid="020bc993" officeooo:paragraph-rsid="020bc993"/>
    </style:style>
    <style:style style:name="P878" style:family="paragraph" style:parent-style-name="Heading_20_3">
      <style:text-properties officeooo:rsid="0240e1b6" officeooo:paragraph-rsid="0240e1b6"/>
    </style:style>
    <style:style style:name="P879" style:family="paragraph" style:parent-style-name="Heading_20_3">
      <style:text-properties officeooo:rsid="02498eda" officeooo:paragraph-rsid="02498eda"/>
    </style:style>
    <style:style style:name="P880" style:family="paragraph" style:parent-style-name="Heading_20_3">
      <style:text-properties officeooo:rsid="0265f88c" officeooo:paragraph-rsid="0265f88c"/>
    </style:style>
    <style:style style:name="P881" style:family="paragraph" style:parent-style-name="Heading_20_3">
      <style:text-properties officeooo:rsid="02757961" officeooo:paragraph-rsid="02757961"/>
    </style:style>
    <style:style style:name="P882" style:family="paragraph" style:parent-style-name="Heading_20_3">
      <style:text-properties officeooo:rsid="02780062" officeooo:paragraph-rsid="02780062"/>
    </style:style>
    <style:style style:name="P883" style:family="paragraph" style:parent-style-name="Heading_20_3">
      <style:text-properties officeooo:rsid="0278912b" officeooo:paragraph-rsid="0278912b"/>
    </style:style>
    <style:style style:name="P884" style:family="paragraph" style:parent-style-name="Heading_20_3">
      <style:text-properties officeooo:rsid="028da1b2" officeooo:paragraph-rsid="028da1b2"/>
    </style:style>
    <style:style style:name="P885" style:family="paragraph" style:parent-style-name="Heading_20_3">
      <style:text-properties officeooo:rsid="029134d6" officeooo:paragraph-rsid="029134d6"/>
    </style:style>
    <style:style style:name="P886" style:family="paragraph" style:parent-style-name="Heading_20_3">
      <style:text-properties officeooo:rsid="0291d4eb" officeooo:paragraph-rsid="0291d4eb"/>
    </style:style>
    <style:style style:name="P887" style:family="paragraph" style:parent-style-name="Heading_20_3">
      <style:text-properties officeooo:rsid="01387aa4" officeooo:paragraph-rsid="01387aa4"/>
    </style:style>
    <style:style style:name="P888" style:family="paragraph" style:parent-style-name="Heading_20_3">
      <style:text-properties officeooo:rsid="0139e38d" officeooo:paragraph-rsid="0139e38d"/>
    </style:style>
    <style:style style:name="P889" style:family="paragraph" style:parent-style-name="Heading_20_3">
      <style:text-properties officeooo:rsid="013b818f" officeooo:paragraph-rsid="013b818f"/>
    </style:style>
    <style:style style:name="P890" style:family="paragraph" style:parent-style-name="Heading_20_3">
      <style:text-properties officeooo:rsid="013cf6fb" officeooo:paragraph-rsid="013cf6fb"/>
    </style:style>
    <style:style style:name="P891" style:family="paragraph" style:parent-style-name="Heading_20_3">
      <style:text-properties officeooo:rsid="013dd33d" officeooo:paragraph-rsid="013dd33d"/>
    </style:style>
    <style:style style:name="P892" style:family="paragraph" style:parent-style-name="Heading_20_3">
      <style:text-properties officeooo:rsid="0101e6fc" officeooo:paragraph-rsid="0101e6fc"/>
    </style:style>
    <style:style style:name="P893" style:family="paragraph" style:parent-style-name="Heading_20_3">
      <style:text-properties officeooo:paragraph-rsid="01dbe152"/>
    </style:style>
    <style:style style:name="P894" style:family="paragraph" style:parent-style-name="Heading_20_3">
      <style:text-properties officeooo:rsid="0108bd94" officeooo:paragraph-rsid="0108bd94"/>
    </style:style>
    <style:style style:name="P895" style:family="paragraph" style:parent-style-name="Heading_20_3">
      <style:text-properties officeooo:rsid="0109a371" officeooo:paragraph-rsid="0109a371"/>
    </style:style>
    <style:style style:name="P896" style:family="paragraph" style:parent-style-name="Heading_20_3">
      <style:text-properties officeooo:rsid="0238ad9b" officeooo:paragraph-rsid="0238ad9b"/>
    </style:style>
    <style:style style:name="P897" style:family="paragraph" style:parent-style-name="Heading_20_3">
      <style:text-properties officeooo:rsid="010c1eae" officeooo:paragraph-rsid="010c1eae"/>
    </style:style>
    <style:style style:name="P898" style:family="paragraph" style:parent-style-name="Heading_20_3">
      <style:text-properties officeooo:rsid="0243bb48" officeooo:paragraph-rsid="0243bb48"/>
    </style:style>
    <style:style style:name="P899" style:family="paragraph" style:parent-style-name="Heading_20_3">
      <style:text-properties officeooo:rsid="010cb508" officeooo:paragraph-rsid="010cb508"/>
    </style:style>
    <style:style style:name="P900" style:family="paragraph" style:parent-style-name="Heading_20_3">
      <style:text-properties officeooo:rsid="010d9fd2" officeooo:paragraph-rsid="010d9fd2"/>
    </style:style>
    <style:style style:name="P901" style:family="paragraph" style:parent-style-name="Heading_20_3">
      <style:text-properties officeooo:rsid="014ad3e5" officeooo:paragraph-rsid="014ad3e5"/>
    </style:style>
    <style:style style:name="P902" style:family="paragraph" style:parent-style-name="Heading_20_3">
      <style:text-properties officeooo:rsid="014c8d44" officeooo:paragraph-rsid="014c8d44"/>
    </style:style>
    <style:style style:name="P903" style:family="paragraph" style:parent-style-name="Heading_20_3">
      <style:text-properties officeooo:rsid="010f8efe" officeooo:paragraph-rsid="010f8efe"/>
    </style:style>
    <style:style style:name="P904" style:family="paragraph" style:parent-style-name="Heading_20_3">
      <style:text-properties officeooo:rsid="0110d205" officeooo:paragraph-rsid="0110d205"/>
    </style:style>
    <style:style style:name="P905" style:family="paragraph" style:parent-style-name="Heading_20_3">
      <style:text-properties officeooo:rsid="028ef2b2" officeooo:paragraph-rsid="028ef2b2"/>
    </style:style>
    <style:style style:name="P906" style:family="paragraph" style:parent-style-name="Heading_20_3">
      <style:text-properties officeooo:rsid="0113982d" officeooo:paragraph-rsid="0113982d"/>
    </style:style>
    <style:style style:name="P907" style:family="paragraph" style:parent-style-name="Heading_20_3">
      <style:text-properties officeooo:rsid="011414b7" officeooo:paragraph-rsid="011414b7"/>
    </style:style>
    <style:style style:name="P908" style:family="paragraph" style:parent-style-name="Heading_20_3">
      <style:text-properties officeooo:rsid="01ca1370" officeooo:paragraph-rsid="01ca1370"/>
    </style:style>
    <style:style style:name="P909" style:family="paragraph" style:parent-style-name="Heading_20_3">
      <style:text-properties officeooo:rsid="011a3ced" officeooo:paragraph-rsid="011a3ced"/>
    </style:style>
    <style:style style:name="P910" style:family="paragraph" style:parent-style-name="Heading_20_3">
      <style:text-properties officeooo:rsid="011d248c" officeooo:paragraph-rsid="011d248c"/>
    </style:style>
    <style:style style:name="P911" style:family="paragraph" style:parent-style-name="Heading_20_3">
      <style:text-properties officeooo:rsid="0121b8d8" officeooo:paragraph-rsid="0121b8d8"/>
    </style:style>
    <style:style style:name="P912" style:family="paragraph" style:parent-style-name="Heading_20_3">
      <style:text-properties officeooo:rsid="014f2a11" officeooo:paragraph-rsid="014f2a11"/>
    </style:style>
    <style:style style:name="P913" style:family="paragraph" style:parent-style-name="Heading_20_3">
      <style:text-properties officeooo:rsid="0121da82" officeooo:paragraph-rsid="0121da82"/>
    </style:style>
    <style:style style:name="P914" style:family="paragraph" style:parent-style-name="Heading_20_3">
      <style:text-properties officeooo:rsid="01241079" officeooo:paragraph-rsid="01241079"/>
    </style:style>
    <style:style style:name="P915" style:family="paragraph" style:parent-style-name="Heading_20_3">
      <style:text-properties officeooo:rsid="0125f0e0" officeooo:paragraph-rsid="0125f0e0"/>
    </style:style>
    <style:style style:name="P916" style:family="paragraph" style:parent-style-name="Heading_20_3">
      <style:text-properties officeooo:rsid="0125f0e0" officeooo:paragraph-rsid="014f2a11"/>
    </style:style>
    <style:style style:name="P917" style:family="paragraph" style:parent-style-name="Heading_20_3">
      <style:text-properties officeooo:rsid="01261b53" officeooo:paragraph-rsid="01261b53"/>
    </style:style>
    <style:style style:name="P918" style:family="paragraph" style:parent-style-name="Heading_20_3">
      <style:text-properties officeooo:rsid="01261b53" officeooo:paragraph-rsid="0127d356"/>
    </style:style>
    <style:style style:name="P919" style:family="paragraph" style:parent-style-name="Heading_20_3">
      <style:text-properties officeooo:rsid="025466e3" officeooo:paragraph-rsid="025466e3"/>
    </style:style>
    <style:style style:name="P920" style:family="paragraph" style:parent-style-name="Heading_20_3">
      <style:text-properties officeooo:rsid="0192065a" officeooo:paragraph-rsid="0192065a"/>
    </style:style>
    <style:style style:name="P921" style:family="paragraph" style:parent-style-name="Heading_20_3">
      <style:text-properties officeooo:rsid="012c993d" officeooo:paragraph-rsid="012c993d"/>
    </style:style>
    <style:style style:name="P922" style:family="paragraph" style:parent-style-name="Heading_20_3">
      <style:text-properties officeooo:rsid="012d47b9" officeooo:paragraph-rsid="012d47b9"/>
    </style:style>
    <style:style style:name="P923" style:family="paragraph" style:parent-style-name="Heading_20_3">
      <style:text-properties officeooo:rsid="019940f7" officeooo:paragraph-rsid="019940f7"/>
    </style:style>
    <style:style style:name="P924" style:family="paragraph" style:parent-style-name="Heading_20_3">
      <style:text-properties officeooo:rsid="01d112b0" officeooo:paragraph-rsid="01d112b0"/>
    </style:style>
    <style:style style:name="P925" style:family="paragraph" style:parent-style-name="Heading_20_3">
      <style:text-properties officeooo:rsid="012ed61f" officeooo:paragraph-rsid="012ed61f"/>
    </style:style>
    <style:style style:name="P926" style:family="paragraph" style:parent-style-name="Heading_20_3">
      <style:text-properties officeooo:rsid="019a55ad" officeooo:paragraph-rsid="019a55ad"/>
    </style:style>
    <style:style style:name="P927" style:family="paragraph" style:parent-style-name="Heading_20_3">
      <style:text-properties officeooo:rsid="02695b96" officeooo:paragraph-rsid="02695b96"/>
    </style:style>
    <style:style style:name="P928" style:family="paragraph" style:parent-style-name="Heading_20_3">
      <style:text-properties officeooo:rsid="019b2f55" officeooo:paragraph-rsid="019b2f55"/>
    </style:style>
    <style:style style:name="P929" style:family="paragraph" style:parent-style-name="Heading_20_3">
      <style:text-properties officeooo:rsid="02174144" officeooo:paragraph-rsid="02174144"/>
    </style:style>
    <style:style style:name="P930" style:family="paragraph" style:parent-style-name="Heading_20_3">
      <style:text-properties officeooo:rsid="021917b0" officeooo:paragraph-rsid="021b176e"/>
    </style:style>
    <style:style style:name="P931" style:family="paragraph" style:parent-style-name="Heading_20_3">
      <style:text-properties officeooo:paragraph-rsid="01675a79"/>
    </style:style>
    <style:style style:name="P932" style:family="paragraph" style:parent-style-name="Heading_20_3">
      <style:text-properties officeooo:rsid="01818f8e" officeooo:paragraph-rsid="01818f8e"/>
    </style:style>
    <style:style style:name="P933" style:family="paragraph" style:parent-style-name="Heading_20_3">
      <style:text-properties officeooo:rsid="0250d175" officeooo:paragraph-rsid="0250d175"/>
    </style:style>
    <style:style style:name="P934" style:family="paragraph" style:parent-style-name="Heading_20_3">
      <style:text-properties officeooo:rsid="000f0e4b" officeooo:paragraph-rsid="013d90a7"/>
    </style:style>
    <style:style style:name="P935" style:family="paragraph" style:parent-style-name="Heading_20_3">
      <style:text-properties officeooo:rsid="018740e3" officeooo:paragraph-rsid="018740e3"/>
    </style:style>
    <style:style style:name="P936" style:family="paragraph" style:parent-style-name="Heading_20_3">
      <style:text-properties officeooo:rsid="024b551c" officeooo:paragraph-rsid="024b551c"/>
    </style:style>
    <style:style style:name="P937" style:family="paragraph" style:parent-style-name="Heading_20_3">
      <style:text-properties officeooo:rsid="01b26728" officeooo:paragraph-rsid="01b26728"/>
    </style:style>
    <style:style style:name="P938" style:family="paragraph" style:parent-style-name="Heading_20_3">
      <style:text-properties officeooo:rsid="0222e820" officeooo:paragraph-rsid="0222e820"/>
    </style:style>
    <style:style style:name="P939" style:family="paragraph" style:parent-style-name="Heading_20_3">
      <style:text-properties officeooo:rsid="023bfcff" officeooo:paragraph-rsid="023bfcff"/>
    </style:style>
    <style:style style:name="P940" style:family="paragraph" style:parent-style-name="Heading_20_3">
      <style:text-properties officeooo:rsid="017b462c" officeooo:paragraph-rsid="017b462c"/>
    </style:style>
    <style:style style:name="P941" style:family="paragraph" style:parent-style-name="Heading_20_3">
      <style:text-properties officeooo:rsid="027bfcce" officeooo:paragraph-rsid="027bfcce"/>
    </style:style>
    <style:style style:name="P942" style:family="paragraph" style:parent-style-name="Heading_20_3" style:master-page-name="Right_20_Page">
      <style:paragraph-properties style:page-number="auto"/>
      <style:text-properties officeooo:rsid="027bfcce" officeooo:paragraph-rsid="027bfcce"/>
    </style:style>
    <style:style style:name="P943" style:family="paragraph" style:parent-style-name="Heading_20_3">
      <style:text-properties officeooo:rsid="027d3b80" officeooo:paragraph-rsid="027d3b80"/>
    </style:style>
    <style:style style:name="P944" style:family="paragraph" style:parent-style-name="Heading_20_3">
      <style:text-properties officeooo:paragraph-rsid="021254a1"/>
    </style:style>
    <style:style style:name="P945" style:family="paragraph" style:parent-style-name="Heading_20_3">
      <style:text-properties officeooo:rsid="01f8de69" officeooo:paragraph-rsid="01f8de69"/>
    </style:style>
    <style:style style:name="P946" style:family="paragraph" style:parent-style-name="Heading_20_3">
      <style:text-properties officeooo:rsid="020fc6cd" officeooo:paragraph-rsid="020fc6cd"/>
    </style:style>
    <style:style style:name="P947" style:family="paragraph" style:parent-style-name="Heading_20_3">
      <style:text-properties officeooo:rsid="00f397bc" officeooo:paragraph-rsid="00f397bc"/>
    </style:style>
    <style:style style:name="P948" style:family="paragraph" style:parent-style-name="Heading_20_3">
      <style:text-properties officeooo:rsid="00f444df" officeooo:paragraph-rsid="00f444df"/>
    </style:style>
    <style:style style:name="P949" style:family="paragraph" style:parent-style-name="Heading_20_3">
      <style:text-properties officeooo:rsid="00f86d29" officeooo:paragraph-rsid="01f9f60c"/>
    </style:style>
    <style:style style:name="P950" style:family="paragraph" style:parent-style-name="Heading_20_3">
      <style:text-properties officeooo:rsid="00f86d29" officeooo:paragraph-rsid="00f86d29"/>
    </style:style>
    <style:style style:name="P951" style:family="paragraph" style:parent-style-name="Heading_20_3">
      <style:paragraph-properties fo:margin-top="0.0799in" fo:margin-bottom="0.1701in" style:contextual-spacing="false"/>
      <style:text-properties officeooo:rsid="00fd335e" officeooo:paragraph-rsid="00fd335e"/>
    </style:style>
    <style:style style:name="P952" style:family="paragraph" style:parent-style-name="Heading_20_3">
      <style:text-properties officeooo:rsid="00fd7ad6" officeooo:paragraph-rsid="00fd7ad6"/>
    </style:style>
    <style:style style:name="P953" style:family="paragraph" style:parent-style-name="Heading_20_3">
      <style:text-properties officeooo:rsid="02011d3d" officeooo:paragraph-rsid="02011d3d"/>
    </style:style>
    <style:style style:name="P954" style:family="paragraph" style:parent-style-name="Heading_20_3">
      <style:text-properties officeooo:rsid="01e0b56d" officeooo:paragraph-rsid="01e0b56d"/>
    </style:style>
    <style:style style:name="P955" style:family="paragraph" style:parent-style-name="Heading_20_3">
      <style:text-properties officeooo:rsid="00ff6b5c" officeooo:paragraph-rsid="02051d53"/>
    </style:style>
    <style:style style:name="P956" style:family="paragraph" style:parent-style-name="Heading_20_3">
      <style:text-properties officeooo:rsid="00ff6b5c" officeooo:paragraph-rsid="01eeca0c"/>
    </style:style>
    <style:style style:name="P957" style:family="paragraph" style:parent-style-name="Heading_20_3">
      <style:text-properties officeooo:rsid="020b1c04" officeooo:paragraph-rsid="020b1c04"/>
    </style:style>
    <style:style style:name="P958" style:family="paragraph" style:parent-style-name="Heading_20_3">
      <style:paragraph-properties fo:line-height="100%"/>
      <style:text-properties officeooo:paragraph-rsid="00d4375d"/>
    </style:style>
    <style:style style:name="P959" style:family="paragraph" style:parent-style-name="Heading_20_3">
      <style:paragraph-properties fo:line-height="100%"/>
      <style:text-properties officeooo:rsid="0017c87a" officeooo:paragraph-rsid="00d4375d"/>
    </style:style>
    <style:style style:name="P960" style:family="paragraph" style:parent-style-name="Heading_20_3">
      <style:paragraph-properties fo:line-height="100%"/>
      <style:text-properties officeooo:rsid="0008c3fb" officeooo:paragraph-rsid="00d4375d"/>
    </style:style>
    <style:style style:name="P961" style:family="paragraph" style:parent-style-name="Heading_20_3">
      <style:paragraph-properties fo:line-height="100%"/>
      <style:text-properties officeooo:rsid="0011a035" officeooo:paragraph-rsid="00d4375d"/>
    </style:style>
    <style:style style:name="P962" style:family="paragraph" style:parent-style-name="Heading_20_3">
      <style:paragraph-properties fo:line-height="100%"/>
      <style:text-properties officeooo:rsid="0012b01e" officeooo:paragraph-rsid="00d4375d"/>
    </style:style>
    <style:style style:name="P963" style:family="paragraph" style:parent-style-name="Heading_20_4">
      <style:text-properties officeooo:rsid="011414b7" officeooo:paragraph-rsid="011414b7"/>
    </style:style>
    <style:style style:name="P964" style:family="paragraph" style:parent-style-name="Heading_20_4">
      <style:text-properties officeooo:rsid="0114226a" officeooo:paragraph-rsid="0114226a"/>
    </style:style>
    <style:style style:name="P965" style:family="paragraph" style:parent-style-name="Heading_20_4">
      <style:text-properties officeooo:rsid="0275af6c" officeooo:paragraph-rsid="0275af6c"/>
    </style:style>
    <style:style style:name="P966" style:family="paragraph" style:parent-style-name="Heading_20_4">
      <style:text-properties officeooo:rsid="0259f347" officeooo:paragraph-rsid="0259f347"/>
    </style:style>
    <style:style style:name="P967" style:family="paragraph" style:parent-style-name="Heading_20_4">
      <style:text-properties officeooo:rsid="019827f8" officeooo:paragraph-rsid="019827f8"/>
    </style:style>
    <style:style style:name="P968" style:family="paragraph" style:parent-style-name="Heading_20_4">
      <style:text-properties officeooo:rsid="01d760de" officeooo:paragraph-rsid="01d760de"/>
    </style:style>
    <style:style style:name="P969" style:family="paragraph" style:parent-style-name="Heading_20_4">
      <style:text-properties officeooo:paragraph-rsid="0192065a"/>
    </style:style>
    <style:style style:name="P970" style:family="paragraph" style:parent-style-name="Heading_20_4">
      <style:text-properties officeooo:rsid="01d38901" officeooo:paragraph-rsid="01d38901"/>
    </style:style>
    <style:style style:name="P971" style:family="paragraph" style:parent-style-name="Heading_20_4">
      <style:text-properties officeooo:rsid="01d66621" officeooo:paragraph-rsid="01d66621"/>
    </style:style>
    <style:style style:name="P972" style:family="paragraph" style:parent-style-name="Heading_20_4">
      <style:text-properties officeooo:rsid="019d1dd2" officeooo:paragraph-rsid="019d1dd2"/>
    </style:style>
    <style:style style:name="P973" style:family="paragraph" style:parent-style-name="Heading_20_4">
      <style:text-properties officeooo:rsid="019de97e" officeooo:paragraph-rsid="019de97e"/>
    </style:style>
    <style:style style:name="P974" style:family="paragraph" style:parent-style-name="Heading_20_4">
      <style:text-properties officeooo:rsid="019f9353" officeooo:paragraph-rsid="019f9353"/>
    </style:style>
    <style:style style:name="P975" style:family="paragraph" style:parent-style-name="Heading_20_4">
      <style:text-properties officeooo:rsid="01a04c4c" officeooo:paragraph-rsid="01a04c4c"/>
    </style:style>
    <style:style style:name="P976" style:family="paragraph" style:parent-style-name="Heading_20_4">
      <style:text-properties officeooo:rsid="026af2cd" officeooo:paragraph-rsid="026af2cd"/>
    </style:style>
    <style:style style:name="P977" style:family="paragraph" style:parent-style-name="Heading_20_4">
      <style:text-properties officeooo:rsid="026cdb12" officeooo:paragraph-rsid="026cdb12"/>
    </style:style>
    <style:style style:name="P978" style:family="paragraph" style:parent-style-name="Heading_20_4">
      <style:text-properties officeooo:rsid="027c0351" officeooo:paragraph-rsid="027c0351"/>
    </style:style>
    <style:style style:name="P979" style:family="paragraph" style:parent-style-name="Highlighted">
      <style:text-properties officeooo:rsid="0293a962" officeooo:paragraph-rsid="0293a962"/>
    </style:style>
    <style:style style:name="P980"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81"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82" style:family="paragraph" style:parent-style-name="Standard" style:list-style-name="L10">
      <style:paragraph-properties fo:text-align="start" style:justify-single-word="false"/>
      <style:text-properties officeooo:rsid="00c7132a" officeooo:paragraph-rsid="00c7132a"/>
    </style:style>
    <style:style style:name="P983" style:family="paragraph" style:parent-style-name="Standard" style:list-style-name="L10">
      <style:paragraph-properties fo:text-align="start" style:justify-single-word="false"/>
      <style:text-properties officeooo:rsid="00d23a81" officeooo:paragraph-rsid="00d23a81"/>
    </style:style>
    <style:style style:name="P984" style:family="paragraph" style:parent-style-name="Standard" style:list-style-name="L11">
      <style:text-properties officeooo:rsid="01896efd" officeooo:paragraph-rsid="01896efd"/>
    </style:style>
    <style:style style:name="P985" style:family="paragraph" style:parent-style-name="Standard" style:list-style-name="L12">
      <style:text-properties officeooo:rsid="0196e98b" officeooo:paragraph-rsid="0196e98b"/>
    </style:style>
    <style:style style:name="P986" style:family="paragraph" style:parent-style-name="Standard" style:list-style-name="L13">
      <style:text-properties officeooo:rsid="0196e98b" officeooo:paragraph-rsid="0196e98b"/>
    </style:style>
    <style:style style:name="P987" style:family="paragraph" style:parent-style-name="Standard" style:list-style-name="L14">
      <style:text-properties officeooo:rsid="0196e98b" officeooo:paragraph-rsid="0196e98b"/>
    </style:style>
    <style:style style:name="P988" style:family="paragraph" style:parent-style-name="Standard" style:list-style-name="L15">
      <style:text-properties officeooo:rsid="01997f4b" officeooo:paragraph-rsid="01997f4b"/>
    </style:style>
    <style:style style:name="P989" style:family="paragraph" style:parent-style-name="Standard" style:list-style-name="L15">
      <style:text-properties officeooo:rsid="01d760de" officeooo:paragraph-rsid="01d760de"/>
    </style:style>
    <style:style style:name="P990" style:family="paragraph" style:parent-style-name="Standard" style:list-style-name="L15">
      <style:text-properties officeooo:rsid="01a04c4c" officeooo:paragraph-rsid="01a04c4c"/>
    </style:style>
    <style:style style:name="P991" style:family="paragraph" style:parent-style-name="Standard" style:list-style-name="L15">
      <style:text-properties officeooo:rsid="01cd3b97" officeooo:paragraph-rsid="01cd3b97"/>
    </style:style>
    <style:style style:name="P992" style:family="paragraph" style:parent-style-name="Standard" style:list-style-name="L15">
      <style:text-properties officeooo:rsid="01d70ac8" officeooo:paragraph-rsid="01d70ac8"/>
    </style:style>
    <style:style style:name="P993" style:family="paragraph" style:parent-style-name="Standard" style:list-style-name="L15">
      <style:text-properties officeooo:rsid="01d7d22a" officeooo:paragraph-rsid="01d7d22a"/>
    </style:style>
    <style:style style:name="P994" style:family="paragraph" style:parent-style-name="Standard" style:list-style-name="L15">
      <style:text-properties officeooo:rsid="01bb8d30" officeooo:paragraph-rsid="01bb8d30"/>
    </style:style>
    <style:style style:name="P995" style:family="paragraph" style:parent-style-name="Standard" style:list-style-name="L15">
      <style:text-properties officeooo:rsid="01da0cd9" officeooo:paragraph-rsid="01da0cd9"/>
    </style:style>
    <style:style style:name="P996" style:family="paragraph" style:parent-style-name="Standard" style:list-style-name="L15">
      <style:text-properties officeooo:rsid="01ddd893" officeooo:paragraph-rsid="01ddd893"/>
    </style:style>
    <style:style style:name="P997" style:family="paragraph" style:parent-style-name="Standard" style:list-style-name="L15">
      <style:paragraph-properties fo:text-align="start" style:justify-single-word="false"/>
      <style:text-properties officeooo:rsid="01df824b" officeooo:paragraph-rsid="01df824b"/>
    </style:style>
    <style:style style:name="P998" style:family="paragraph" style:parent-style-name="Standard" style:list-style-name="L15">
      <style:paragraph-properties fo:text-align="start" style:justify-single-word="false"/>
      <style:text-properties officeooo:rsid="01df8c35" officeooo:paragraph-rsid="01df8c35"/>
    </style:style>
    <style:style style:name="P999" style:family="paragraph" style:parent-style-name="Standard" style:list-style-name="L15">
      <style:paragraph-properties fo:text-align="start" style:justify-single-word="false"/>
      <style:text-properties officeooo:rsid="01e069a6" officeooo:paragraph-rsid="01e069a6"/>
    </style:style>
    <style:style style:name="P1000" style:family="paragraph" style:parent-style-name="Standard" style:list-style-name="L15">
      <style:paragraph-properties fo:text-align="start" style:justify-single-word="false"/>
      <style:text-properties officeooo:rsid="01e33d2a" officeooo:paragraph-rsid="01e33d2a"/>
    </style:style>
    <style:style style:name="P1001" style:family="paragraph" style:parent-style-name="Standard" style:list-style-name="L15">
      <style:paragraph-properties fo:text-align="start" style:justify-single-word="false"/>
      <style:text-properties officeooo:rsid="01e50384" officeooo:paragraph-rsid="01e50384"/>
    </style:style>
    <style:style style:name="P1002" style:family="paragraph" style:parent-style-name="Standard" style:list-style-name="L15">
      <style:paragraph-properties fo:text-align="start" style:justify-single-word="false"/>
      <style:text-properties officeooo:rsid="01e65964" officeooo:paragraph-rsid="01e65964"/>
    </style:style>
    <style:style style:name="P1003" style:family="paragraph" style:parent-style-name="Standard" style:list-style-name="L15">
      <style:paragraph-properties fo:text-align="start" style:justify-single-word="false"/>
      <style:text-properties officeooo:rsid="01ea53fe" officeooo:paragraph-rsid="01ea53fe"/>
    </style:style>
    <style:style style:name="P1004" style:family="paragraph" style:parent-style-name="Standard" style:list-style-name="L16">
      <style:text-properties officeooo:rsid="020bc993" officeooo:paragraph-rsid="020bc993"/>
    </style:style>
    <style:style style:name="P1005" style:family="paragraph" style:parent-style-name="Standard" style:list-style-name="L16">
      <style:text-properties officeooo:rsid="02169bac" officeooo:paragraph-rsid="02169bac"/>
    </style:style>
    <style:style style:name="P1006" style:family="paragraph" style:parent-style-name="Standard" style:list-style-name="L16">
      <style:text-properties officeooo:rsid="02174144" officeooo:paragraph-rsid="02174144"/>
    </style:style>
    <style:style style:name="P1007" style:family="paragraph" style:parent-style-name="Standard" style:list-style-name="L16">
      <style:text-properties officeooo:rsid="0222e820" officeooo:paragraph-rsid="0222e820"/>
    </style:style>
    <style:style style:name="P1008" style:family="paragraph" style:parent-style-name="Standard" style:list-style-name="L16">
      <style:text-properties officeooo:rsid="022476b3" officeooo:paragraph-rsid="022476b3"/>
    </style:style>
    <style:style style:name="P1009" style:family="paragraph" style:parent-style-name="Standard" style:list-style-name="L16">
      <style:text-properties officeooo:rsid="02271db5" officeooo:paragraph-rsid="02271db5"/>
    </style:style>
    <style:style style:name="P1010" style:family="paragraph" style:parent-style-name="Standard" style:list-style-name="L16">
      <style:text-properties officeooo:rsid="022d8458" officeooo:paragraph-rsid="022d8458"/>
    </style:style>
    <style:style style:name="P1011" style:family="paragraph" style:parent-style-name="Standard" style:list-style-name="L16">
      <style:text-properties officeooo:rsid="0231657f" officeooo:paragraph-rsid="0231657f"/>
    </style:style>
    <style:style style:name="P1012" style:family="paragraph" style:parent-style-name="Standard" style:list-style-name="L16">
      <style:text-properties officeooo:rsid="02361aaf" officeooo:paragraph-rsid="02361aaf"/>
    </style:style>
    <style:style style:name="P1013" style:family="paragraph" style:parent-style-name="Standard" style:list-style-name="L16">
      <style:text-properties officeooo:rsid="0237a105" officeooo:paragraph-rsid="0237a105"/>
    </style:style>
    <style:style style:name="P1014" style:family="paragraph" style:parent-style-name="Standard" style:list-style-name="L16">
      <style:text-properties officeooo:rsid="0238ad9b" officeooo:paragraph-rsid="0238ad9b"/>
    </style:style>
    <style:style style:name="P1015" style:family="paragraph" style:parent-style-name="Standard" style:list-style-name="L16">
      <style:text-properties officeooo:rsid="023aa488" officeooo:paragraph-rsid="023aa488"/>
    </style:style>
    <style:style style:name="P1016" style:family="paragraph" style:parent-style-name="Standard" style:list-style-name="L17">
      <style:text-properties officeooo:rsid="0240e1b6" officeooo:paragraph-rsid="0240e1b6"/>
    </style:style>
    <style:style style:name="P1017" style:family="paragraph" style:parent-style-name="Standard" style:list-style-name="L17">
      <style:text-properties officeooo:rsid="0243557e" officeooo:paragraph-rsid="0243557e"/>
    </style:style>
    <style:style style:name="P1018" style:family="paragraph" style:parent-style-name="Standard" style:list-style-name="L18">
      <style:text-properties officeooo:rsid="02498eda" officeooo:paragraph-rsid="02498eda"/>
    </style:style>
    <style:style style:name="P1019" style:family="paragraph" style:parent-style-name="Standard" style:list-style-name="L18">
      <style:text-properties officeooo:rsid="024b551c" officeooo:paragraph-rsid="024b551c"/>
    </style:style>
    <style:style style:name="P1020" style:family="paragraph" style:parent-style-name="Standard" style:list-style-name="L18">
      <style:text-properties officeooo:rsid="024e858c" officeooo:paragraph-rsid="024e858c"/>
    </style:style>
    <style:style style:name="P1021" style:family="paragraph" style:parent-style-name="Standard" style:list-style-name="L18">
      <style:text-properties officeooo:rsid="024faa1a" officeooo:paragraph-rsid="024faa1a"/>
    </style:style>
    <style:style style:name="P1022" style:family="paragraph" style:parent-style-name="Standard" style:list-style-name="L18">
      <style:text-properties officeooo:rsid="025466e3" officeooo:paragraph-rsid="025466e3"/>
    </style:style>
    <style:style style:name="P1023" style:family="paragraph" style:parent-style-name="Standard" style:list-style-name="L18">
      <style:text-properties officeooo:rsid="02595e5e" officeooo:paragraph-rsid="02595e5e"/>
    </style:style>
    <style:style style:name="P1024" style:family="paragraph" style:parent-style-name="Standard" style:list-style-name="L19">
      <style:text-properties officeooo:rsid="0265f88c" officeooo:paragraph-rsid="0265f88c"/>
    </style:style>
    <style:style style:name="P1025" style:family="paragraph" style:parent-style-name="Standard" style:list-style-name="L19">
      <style:text-properties officeooo:rsid="0267c507" officeooo:paragraph-rsid="0267c507"/>
    </style:style>
    <style:style style:name="P1026" style:family="paragraph" style:parent-style-name="Standard" style:list-style-name="L19">
      <style:text-properties officeooo:rsid="026cdb12" officeooo:paragraph-rsid="026cdb12"/>
    </style:style>
    <style:style style:name="P1027" style:family="paragraph" style:parent-style-name="Standard" style:list-style-name="L19">
      <style:text-properties officeooo:rsid="026eb1f1" officeooo:paragraph-rsid="026eb1f1"/>
    </style:style>
    <style:style style:name="P1028" style:family="paragraph" style:parent-style-name="Standard" style:list-style-name="L20">
      <style:text-properties officeooo:rsid="02757961" officeooo:paragraph-rsid="02757961"/>
    </style:style>
    <style:style style:name="P1029" style:family="paragraph" style:parent-style-name="Standard" style:list-style-name="L20">
      <style:text-properties officeooo:rsid="0275cb02" officeooo:paragraph-rsid="0275cb02"/>
    </style:style>
    <style:style style:name="P1030" style:family="paragraph" style:parent-style-name="Standard" style:list-style-name="L20">
      <style:text-properties officeooo:rsid="027617de" officeooo:paragraph-rsid="027617de"/>
    </style:style>
    <style:style style:name="P1031" style:family="paragraph" style:parent-style-name="Standard" style:list-style-name="L21">
      <style:text-properties officeooo:rsid="019dd98e" officeooo:paragraph-rsid="02780062"/>
    </style:style>
    <style:style style:name="P1032" style:family="paragraph" style:parent-style-name="Standard" style:list-style-name="L22">
      <style:text-properties officeooo:paragraph-rsid="0278912b"/>
    </style:style>
    <style:style style:name="P1033" style:family="paragraph" style:parent-style-name="Standard" style:list-style-name="L22" style:master-page-name="">
      <style:paragraph-properties fo:margin-top="0in" fo:margin-bottom="0in" style:contextual-spacing="false" style:page-number="auto"/>
      <style:text-properties officeooo:paragraph-rsid="0278912b"/>
    </style:style>
    <style:style style:name="P1034" style:family="paragraph" style:parent-style-name="Standard" style:list-style-name="L22">
      <style:paragraph-properties fo:margin-top="0in" fo:margin-bottom="0in" style:contextual-spacing="false"/>
      <style:text-properties officeooo:paragraph-rsid="0278912b"/>
    </style:style>
    <style:style style:name="P1035" style:family="paragraph" style:parent-style-name="Standard" style:list-style-name="L22">
      <style:text-properties officeooo:rsid="0279e93f" officeooo:paragraph-rsid="0279e93f"/>
    </style:style>
    <style:style style:name="P1036" style:family="paragraph" style:parent-style-name="Standard" style:list-style-name="L23"/>
    <style:style style:name="P1037" style:family="paragraph" style:parent-style-name="Standard" style:list-style-name="L23">
      <style:text-properties officeooo:paragraph-rsid="028b0022"/>
    </style:style>
    <style:style style:name="P1038" style:family="paragraph" style:parent-style-name="Standard" style:list-style-name="L23">
      <style:text-properties officeooo:rsid="0287f81c" officeooo:paragraph-rsid="0287f81c"/>
    </style:style>
    <style:style style:name="P1039" style:family="paragraph" style:parent-style-name="Standard" style:list-style-name="L24">
      <style:text-properties officeooo:rsid="028da1b2" officeooo:paragraph-rsid="028da1b2"/>
    </style:style>
    <style:style style:name="P1040" style:family="paragraph" style:parent-style-name="Standard" style:list-style-name="L25">
      <style:text-properties officeooo:rsid="029134d6" officeooo:paragraph-rsid="029134d6"/>
    </style:style>
    <style:style style:name="P1041" style:family="paragraph" style:parent-style-name="Standard" style:list-style-name="L26">
      <style:text-properties officeooo:rsid="0291d4eb" officeooo:paragraph-rsid="0291d4eb"/>
    </style:style>
    <style:style style:name="P1042" style:family="paragraph" style:parent-style-name="Standard" style:list-style-name="L27">
      <style:text-properties officeooo:rsid="022bf951" officeooo:paragraph-rsid="022bf951"/>
    </style:style>
    <style:style style:name="P1043" style:family="paragraph" style:parent-style-name="Standard" style:list-style-name="L30">
      <style:text-properties officeooo:rsid="00d95c06" officeooo:paragraph-rsid="00d95c06"/>
    </style:style>
    <style:style style:name="P1044" style:family="paragraph" style:parent-style-name="Standard" style:list-style-name="L30">
      <style:text-properties officeooo:rsid="00d81db0" officeooo:paragraph-rsid="00d81db0"/>
    </style:style>
    <style:style style:name="P1045" style:family="paragraph" style:parent-style-name="Standard" style:list-style-name="L31">
      <style:text-properties officeooo:rsid="013cf6fb" officeooo:paragraph-rsid="013cf6fb"/>
    </style:style>
    <style:style style:name="P1046" style:family="paragraph" style:parent-style-name="Standard" style:list-style-name="L32">
      <style:text-properties officeooo:rsid="013f2d3b" officeooo:paragraph-rsid="013f2d3b"/>
    </style:style>
    <style:style style:name="P1047" style:family="paragraph" style:parent-style-name="Standard" style:list-style-name="L33">
      <style:text-properties officeooo:rsid="01407516" officeooo:paragraph-rsid="01407516"/>
    </style:style>
    <style:style style:name="P1048" style:family="paragraph" style:parent-style-name="Standard" style:list-style-name="L33">
      <style:text-properties officeooo:rsid="0141ab2f" officeooo:paragraph-rsid="0141ab2f"/>
    </style:style>
    <style:style style:name="P1049" style:family="paragraph" style:parent-style-name="Standard" style:list-style-name="L34">
      <style:text-properties officeooo:rsid="014202ec" officeooo:paragraph-rsid="014202ec"/>
    </style:style>
    <style:style style:name="P1050" style:family="paragraph" style:parent-style-name="Standard" style:list-style-name="L34">
      <style:text-properties officeooo:rsid="016f1a83" officeooo:paragraph-rsid="016f1a83"/>
    </style:style>
    <style:style style:name="P1051" style:family="paragraph" style:parent-style-name="Standard" style:list-style-name="L36">
      <style:paragraph-properties fo:margin-top="0in" fo:margin-bottom="0.1701in" style:contextual-spacing="true"/>
      <style:text-properties officeooo:rsid="0101e6fc" officeooo:paragraph-rsid="0101e6fc"/>
    </style:style>
    <style:style style:name="P1052" style:family="paragraph" style:parent-style-name="Standard" style:list-style-name="L38"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1053" style:family="paragraph" style:parent-style-name="Standard" style:list-style-name="L38">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1054" style:family="paragraph" style:parent-style-name="Standard" style:list-style-name="L39">
      <style:text-properties officeooo:rsid="01db6e0e" officeooo:paragraph-rsid="01db6e0e"/>
    </style:style>
    <style:style style:name="P1055" style:family="paragraph" style:parent-style-name="Standard" style:list-style-name="L40">
      <style:paragraph-properties fo:margin-top="0in" fo:margin-bottom="0.1701in" style:contextual-spacing="true"/>
      <style:text-properties officeooo:rsid="0109a371" officeooo:paragraph-rsid="0109a371"/>
    </style:style>
    <style:style style:name="P1056" style:family="paragraph" style:parent-style-name="Standard" style:list-style-name="L41" style:master-page-name="">
      <style:paragraph-properties fo:margin-top="0in" fo:margin-bottom="0.1701in" style:contextual-spacing="true" style:page-number="auto"/>
      <style:text-properties officeooo:rsid="010cb508" officeooo:paragraph-rsid="010cb508"/>
    </style:style>
    <style:style style:name="P1057" style:family="paragraph" style:parent-style-name="Standard" style:list-style-name="L41">
      <style:paragraph-properties fo:margin-top="0in" fo:margin-bottom="0.1701in" style:contextual-spacing="true"/>
      <style:text-properties officeooo:rsid="010cb508" officeooo:paragraph-rsid="010cb508"/>
    </style:style>
    <style:style style:name="P1058" style:family="paragraph" style:parent-style-name="Standard" style:list-style-name="L41" style:master-page-name="">
      <style:paragraph-properties fo:margin-top="0in" fo:margin-bottom="0.1701in" style:contextual-spacing="true" style:page-number="auto"/>
      <style:text-properties officeooo:rsid="010cb508" officeooo:paragraph-rsid="0110d205"/>
    </style:style>
    <style:style style:name="P1059" style:family="paragraph" style:parent-style-name="Standard" style:list-style-name="L41">
      <style:paragraph-properties fo:margin-top="0in" fo:margin-bottom="0.1701in" style:contextual-spacing="true"/>
      <style:text-properties officeooo:rsid="010cb508" officeooo:paragraph-rsid="0110d205"/>
    </style:style>
    <style:style style:name="P1060" style:family="paragraph" style:parent-style-name="Standard" style:list-style-name="L41" style:master-page-name="">
      <style:paragraph-properties fo:margin-top="0in" fo:margin-bottom="0.1701in" style:contextual-spacing="true" style:page-number="auto"/>
      <style:text-properties officeooo:rsid="010cb508" officeooo:paragraph-rsid="01128d0e"/>
    </style:style>
    <style:style style:name="P1061" style:family="paragraph" style:parent-style-name="Standard" style:list-style-name="L41">
      <style:paragraph-properties fo:margin-top="0in" fo:margin-bottom="0.1701in" style:contextual-spacing="true"/>
      <style:text-properties officeooo:rsid="010cb508" officeooo:paragraph-rsid="01128d0e"/>
    </style:style>
    <style:style style:name="P1062" style:family="paragraph" style:parent-style-name="Standard" style:list-style-name="L42">
      <style:text-properties officeooo:rsid="010f8efe" officeooo:paragraph-rsid="010f8efe"/>
    </style:style>
    <style:style style:name="P1063" style:family="paragraph" style:parent-style-name="Standard" style:list-style-name="L42">
      <style:text-properties officeooo:rsid="01a7e2e2" officeooo:paragraph-rsid="01a7e2e2"/>
    </style:style>
    <style:style style:name="P1064" style:family="paragraph" style:parent-style-name="Standard" style:list-style-name="L41">
      <style:paragraph-properties fo:margin-top="0in" fo:margin-bottom="0.1701in" style:contextual-spacing="true"/>
      <style:text-properties officeooo:rsid="01128d0e" officeooo:paragraph-rsid="01128d0e"/>
    </style:style>
    <style:style style:name="P1065" style:family="paragraph" style:parent-style-name="Standard" style:list-style-name="L43">
      <style:text-properties officeooo:rsid="01cc60e9" officeooo:paragraph-rsid="01cc60e9"/>
    </style:style>
    <style:style style:name="P1066" style:family="paragraph" style:parent-style-name="Standard" style:list-style-name="L43">
      <style:text-properties officeooo:rsid="01ca2bea" officeooo:paragraph-rsid="01ca2bea"/>
    </style:style>
    <style:style style:name="P1067" style:family="paragraph" style:parent-style-name="Standard" style:list-style-name="L44">
      <style:text-properties officeooo:rsid="01ca2bea" officeooo:paragraph-rsid="01ca2bea"/>
    </style:style>
    <style:style style:name="P1068" style:family="paragraph" style:parent-style-name="Standard" style:list-style-name="L45">
      <style:text-properties officeooo:rsid="01ca2bea" officeooo:paragraph-rsid="01ca2bea"/>
    </style:style>
    <style:style style:name="P1069" style:family="paragraph" style:parent-style-name="Standard" style:list-style-name="L45">
      <style:text-properties officeooo:rsid="01ca2bea" officeooo:paragraph-rsid="01cb631d"/>
    </style:style>
    <style:style style:name="P1070" style:family="paragraph" style:parent-style-name="Standard" style:list-style-name="L47">
      <style:paragraph-properties fo:margin-top="0in" fo:margin-bottom="0.1701in" style:contextual-spacing="true"/>
      <style:text-properties officeooo:rsid="01193c89" officeooo:paragraph-rsid="01193c89"/>
    </style:style>
    <style:style style:name="P1071" style:family="paragraph" style:parent-style-name="Standard" style:list-style-name="L47">
      <style:paragraph-properties fo:margin-top="0in" fo:margin-bottom="0.1701in" style:contextual-spacing="true"/>
      <style:text-properties officeooo:rsid="01193c89" officeooo:paragraph-rsid="0162bcfa"/>
    </style:style>
    <style:style style:name="P1072" style:family="paragraph" style:parent-style-name="Standard" style:list-style-name="L48">
      <style:text-properties officeooo:rsid="012406f5" officeooo:paragraph-rsid="012406f5"/>
    </style:style>
    <style:style style:name="P1073" style:family="paragraph" style:parent-style-name="Standard" style:list-style-name="L49">
      <style:text-properties officeooo:rsid="0259f347" officeooo:paragraph-rsid="0259f347"/>
    </style:style>
    <style:style style:name="P1074" style:family="paragraph" style:parent-style-name="Standard" style:list-style-name="L51">
      <style:text-properties officeooo:rsid="01241079" officeooo:paragraph-rsid="01241079"/>
    </style:style>
    <style:style style:name="P1075" style:family="paragraph" style:parent-style-name="Standard" style:list-style-name="L52">
      <style:text-properties officeooo:rsid="01241079" officeooo:paragraph-rsid="01261b53"/>
    </style:style>
    <style:style style:name="P1076" style:family="paragraph" style:parent-style-name="Standard" style:list-style-name="L51">
      <style:text-properties officeooo:rsid="01c85c46" officeooo:paragraph-rsid="01c85c46"/>
    </style:style>
    <style:style style:name="P1077" style:family="paragraph" style:parent-style-name="Standard" style:list-style-name="L52">
      <style:text-properties officeooo:rsid="01261b53" officeooo:paragraph-rsid="01261b53"/>
    </style:style>
    <style:style style:name="P1078" style:family="paragraph" style:parent-style-name="Standard" style:list-style-name="L53">
      <style:text-properties officeooo:rsid="01261b53" officeooo:paragraph-rsid="01261b53"/>
    </style:style>
    <style:style style:name="P1079" style:family="paragraph" style:parent-style-name="Standard" style:list-style-name="L53">
      <style:text-properties officeooo:paragraph-rsid="01261b53"/>
    </style:style>
    <style:style style:name="P1080" style:family="paragraph" style:parent-style-name="Standard" style:list-style-name="L55">
      <style:text-properties officeooo:rsid="0127e8e9" officeooo:paragraph-rsid="0127e8e9"/>
    </style:style>
    <style:style style:name="P1081" style:family="paragraph" style:parent-style-name="Standard" style:list-style-name="L55">
      <style:text-properties officeooo:rsid="0127e8e9" officeooo:paragraph-rsid="0163a38d"/>
    </style:style>
    <style:style style:name="P1082" style:family="paragraph" style:parent-style-name="Standard" style:list-style-name="L57">
      <style:text-properties officeooo:rsid="019827f8" officeooo:paragraph-rsid="019827f8"/>
    </style:style>
    <style:style style:name="P1083" style:family="paragraph" style:parent-style-name="Standard" style:list-style-name="L59">
      <style:text-properties officeooo:rsid="012c993d" officeooo:paragraph-rsid="012c993d"/>
    </style:style>
    <style:style style:name="P1084" style:family="paragraph" style:parent-style-name="Standard" style:list-style-name="L60">
      <style:paragraph-properties fo:margin-top="0in" fo:margin-bottom="0.1701in" style:contextual-spacing="false"/>
      <style:text-properties officeooo:rsid="012c993d" officeooo:paragraph-rsid="012c993d"/>
    </style:style>
    <style:style style:name="P1085" style:family="paragraph" style:parent-style-name="Standard" style:list-style-name="L63">
      <style:text-properties officeooo:paragraph-rsid="0285478b"/>
    </style:style>
    <style:style style:name="P1086" style:family="paragraph" style:parent-style-name="Standard" style:list-style-name="L63">
      <style:text-properties officeooo:paragraph-rsid="02869b60"/>
    </style:style>
    <style:style style:name="P1087" style:family="paragraph" style:parent-style-name="Standard" style:list-style-name="L63">
      <style:text-properties officeooo:paragraph-rsid="01d112b0"/>
    </style:style>
    <style:style style:name="P1088" style:family="paragraph" style:parent-style-name="Standard" style:list-style-name="L63">
      <style:text-properties officeooo:rsid="02869b60" officeooo:paragraph-rsid="02869b60"/>
    </style:style>
    <style:style style:name="P1089" style:family="paragraph" style:parent-style-name="Standard" style:list-style-name="L64">
      <style:text-properties officeooo:rsid="019a55ad" officeooo:paragraph-rsid="019a55ad"/>
    </style:style>
    <style:style style:name="P1090" style:family="paragraph" style:parent-style-name="Standard" style:list-style-name="L65">
      <style:text-properties officeooo:rsid="019f9353" officeooo:paragraph-rsid="019f9353"/>
    </style:style>
    <style:style style:name="P1091" style:family="paragraph" style:parent-style-name="Standard" style:list-style-name="L66">
      <style:text-properties officeooo:rsid="02626132" officeooo:paragraph-rsid="02626132"/>
    </style:style>
    <style:style style:name="P1092" style:family="paragraph" style:parent-style-name="Standard" style:list-style-name="L66">
      <style:text-properties officeooo:rsid="024bea25" officeooo:paragraph-rsid="024bea25"/>
    </style:style>
    <style:style style:name="P1093" style:family="paragraph" style:parent-style-name="Standard" style:list-style-name="L67">
      <style:text-properties officeooo:rsid="024bea25" officeooo:paragraph-rsid="024ce69e"/>
    </style:style>
    <style:style style:name="P1094" style:family="paragraph" style:parent-style-name="Standard" style:list-style-name="L67">
      <style:text-properties officeooo:rsid="024ce69e" officeooo:paragraph-rsid="024ce69e"/>
    </style:style>
    <style:style style:name="P1095" style:family="paragraph" style:parent-style-name="Standard" style:list-style-name="L74" style:master-page-name="">
      <style:paragraph-properties fo:margin-top="0in" fo:margin-bottom="0.1701in" style: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6" style:family="paragraph" style:parent-style-name="Standard" style:list-style-name="L74">
      <style:paragraph-properties fo:margin-top="0in" fo:margin-bottom="0.1701in" style: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7" style:family="paragraph" style:parent-style-name="Standard" style:list-style-name="L74">
      <style:paragraph-properties fo:margin-top="0in" fo:margin-bottom="0.1701in" style: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98" style:family="paragraph" style:parent-style-name="Standard" style:list-style-name="L75">
      <style:text-properties officeooo:rsid="0001877c" officeooo:paragraph-rsid="013d90a7"/>
    </style:style>
    <style:style style:name="P1099" style:family="paragraph" style:parent-style-name="Standard" style:list-style-name="L76">
      <style:text-properties officeooo:rsid="0006dd99" officeooo:paragraph-rsid="013d90a7"/>
    </style:style>
    <style:style style:name="P1100" style:family="paragraph" style:parent-style-name="Standard" style:list-style-name="L84">
      <style:text-properties officeooo:rsid="01447b13" officeooo:paragraph-rsid="01447b13"/>
    </style:style>
    <style:style style:name="P1101" style:family="paragraph" style:parent-style-name="Standard" style:list-style-name="L85">
      <style:text-properties officeooo:rsid="01447b13" officeooo:paragraph-rsid="01447b13"/>
    </style:style>
    <style:style style:name="P1102" style:family="paragraph" style:parent-style-name="Standard" style:list-style-name="L85">
      <style:text-properties officeooo:rsid="01447b13" officeooo:paragraph-rsid="01455bf5"/>
    </style:style>
    <style:style style:name="P1103" style:family="paragraph" style:parent-style-name="Standard" style:list-style-name="L87" style:master-page-name="">
      <style:paragraph-properties fo:margin-top="0in" fo:margin-bottom="0.1701in" style:contextual-spacing="true" style:page-number="auto"/>
      <style:text-properties officeooo:rsid="00ee7b1b" officeooo:paragraph-rsid="00ee7b1b"/>
    </style:style>
    <style:style style:name="P1104" style:family="paragraph" style:parent-style-name="Standard" style:list-style-name="L87">
      <style:paragraph-properties fo:margin-top="0in" fo:margin-bottom="0.1701in" style:contextual-spacing="true"/>
      <style:text-properties officeooo:rsid="00ee7b1b" officeooo:paragraph-rsid="00ee7b1b"/>
    </style:style>
    <style:style style:name="P1105" style:family="paragraph" style:parent-style-name="Standard" style:list-style-name="L88">
      <style:text-properties officeooo:rsid="01f6ad98" officeooo:paragraph-rsid="01f6ad98"/>
    </style:style>
    <style:style style:name="P1106" style:family="paragraph" style:parent-style-name="Standard" style:list-style-name="L88">
      <style:text-properties officeooo:rsid="01f724a5" officeooo:paragraph-rsid="01f724a5"/>
    </style:style>
    <style:style style:name="P1107" style:family="paragraph" style:parent-style-name="Standard" style:list-style-name="L89">
      <style:text-properties officeooo:rsid="021254a1" officeooo:paragraph-rsid="021254a1"/>
    </style:style>
    <style:style style:name="P1108" style:family="paragraph" style:parent-style-name="Standard" style:list-style-name="L4">
      <style:text-properties officeooo:rsid="01f9ec1c" officeooo:paragraph-rsid="01f9ec1c"/>
    </style:style>
    <style:style style:name="P1109" style:family="paragraph" style:parent-style-name="Table_20_Contents" style:list-style-name="L1">
      <style:text-properties officeooo:rsid="02146a72" officeooo:paragraph-rsid="02146a72"/>
    </style:style>
    <style:style style:name="P1110" style:family="paragraph" style:parent-style-name="Table_20_Contents" style:list-style-name="L1">
      <style:text-properties officeooo:rsid="021512a5" officeooo:paragraph-rsid="021512a5"/>
    </style:style>
    <style:style style:name="P1111" style:family="paragraph" style:parent-style-name="Table_20_Contents" style:list-style-name="L2">
      <style:text-properties officeooo:paragraph-rsid="00d4375d"/>
    </style:style>
    <style:style style:name="P1112" style:family="paragraph" style:parent-style-name="Table_20_Contents" style:list-style-name="L58">
      <style:text-properties officeooo:rsid="0192065a" officeooo:paragraph-rsid="0192065a"/>
    </style:style>
    <style:style style:name="P1113" style:family="paragraph" style:parent-style-name="Table_20_Contents" style:list-style-name="L3">
      <style:text-properties officeooo:rsid="019340d0" officeooo:paragraph-rsid="019340d0"/>
    </style:style>
    <style:style style:name="P1114" style:family="paragraph" style:parent-style-name="Table_20_Contents" style:list-style-name="L5">
      <style:paragraph-properties fo:margin-top="0.0799in" fo:margin-bottom="0.0799in" style:contextual-spacing="true"/>
      <style:text-properties officeooo:rsid="01e069a6" officeooo:paragraph-rsid="01e069a6"/>
    </style:style>
    <style:style style:name="P1115" style:family="paragraph" style:parent-style-name="Table_20_Contents" style:list-style-name="L7">
      <style:paragraph-properties fo:margin-top="0.0799in" fo:margin-bottom="0.0799in" style:contextual-spacing="true"/>
      <style:text-properties officeooo:rsid="01e069a6" officeooo:paragraph-rsid="01eeca0c"/>
    </style:style>
    <style:style style:name="P1116" style:family="paragraph" style:parent-style-name="Table_20_Contents" style:list-style-name="L91">
      <style:paragraph-properties fo:margin-top="0.0799in" fo:margin-bottom="0.0799in" style:contextual-spacing="true"/>
      <style:text-properties officeooo:rsid="00fa1101" officeooo:paragraph-rsid="00fa1101"/>
    </style:style>
    <style:style style:name="P1117" style:family="paragraph" style:parent-style-name="Table_20_Contents" style:list-style-name="L100">
      <style:paragraph-properties fo:margin-top="0.0799in" fo:margin-bottom="0.0799in" style:contextual-spacing="true"/>
      <style:text-properties officeooo:rsid="00fa1101" officeooo:paragraph-rsid="01eeca0c"/>
    </style:style>
    <style:style style:name="P1118" style:family="paragraph" style:parent-style-name="Table_20_Contents" style:list-style-name="L92" style:master-page-name="">
      <style:paragraph-properties fo:margin-top="0.0799in" fo:margin-bottom="0.0799in" style:contextual-spacing="true" style:page-number="auto"/>
      <style:text-properties officeooo:rsid="00fd335e" officeooo:paragraph-rsid="00fd335e"/>
    </style:style>
    <style:style style:name="P1119" style:family="paragraph" style:parent-style-name="Table_20_Contents" style:list-style-name="L92">
      <style:paragraph-properties fo:margin-top="0.0799in" fo:margin-bottom="0.0799in" style:contextual-spacing="true"/>
      <style:text-properties officeooo:rsid="00fd335e" officeooo:paragraph-rsid="00fd335e"/>
    </style:style>
    <style:style style:name="P1120" style:family="paragraph" style:parent-style-name="Table_20_Contents" style:list-style-name="L102" style:master-page-name="">
      <style:paragraph-properties fo:margin-top="0.0799in" fo:margin-bottom="0.0799in" style:contextual-spacing="true" style:page-number="auto"/>
      <style:text-properties officeooo:rsid="00fd335e" officeooo:paragraph-rsid="01eeca0c"/>
    </style:style>
    <style:style style:name="P1121" style:family="paragraph" style:parent-style-name="Table_20_Contents" style:list-style-name="L102">
      <style:paragraph-properties fo:margin-top="0.0799in" fo:margin-bottom="0.0799in" style:contextual-spacing="true"/>
      <style:text-properties officeooo:rsid="00fd335e" officeooo:paragraph-rsid="01eeca0c"/>
    </style:style>
    <style:style style:name="P1122" style:family="paragraph" style:parent-style-name="Table_20_Contents" style:list-style-name="L92">
      <style:paragraph-properties fo:margin-top="0.0799in" fo:margin-bottom="0.0799in" style:contextual-spacing="true"/>
      <style:text-properties officeooo:rsid="01df8c35" officeooo:paragraph-rsid="01df8c35"/>
    </style:style>
    <style:style style:name="P1123" style:family="paragraph" style:parent-style-name="Table_20_Contents" style:list-style-name="L92">
      <style:paragraph-properties fo:margin-top="0.0799in" fo:margin-bottom="0.0799in" style:contextual-spacing="true"/>
      <style:text-properties officeooo:rsid="01df8c35" officeooo:paragraph-rsid="02011d3d"/>
    </style:style>
    <style:style style:name="P1124" style:family="paragraph" style:parent-style-name="Table_20_Contents" style:list-style-name="L102">
      <style:paragraph-properties fo:margin-top="0.0799in" fo:margin-bottom="0.0799in" style:contextual-spacing="true"/>
      <style:text-properties officeooo:rsid="01df8c35" officeooo:paragraph-rsid="01eeca0c"/>
    </style:style>
    <style:style style:name="P1125" style:family="paragraph" style:parent-style-name="Table_20_Contents" style:list-style-name="L101">
      <style:text-properties officeooo:rsid="00fb3a7c" officeooo:paragraph-rsid="01eeca0c"/>
    </style:style>
    <style:style style:name="P1126" style:family="paragraph" style:parent-style-name="Text_20_body" style:list-style-name="L9">
      <style:text-properties officeooo:rsid="00d23a81" officeooo:paragraph-rsid="00d23a81"/>
    </style:style>
    <style:style style:name="P1127" style:family="paragraph" style:parent-style-name="Text_20_body" style:list-style-name="L28">
      <style:text-properties officeooo:rsid="000dc6a0" officeooo:paragraph-rsid="00d2a825"/>
    </style:style>
    <style:style style:name="P1128" style:family="paragraph" style:parent-style-name="Text_20_body" style:list-style-name="L28">
      <style:text-properties officeooo:rsid="000f9d1b" officeooo:paragraph-rsid="00d2a825"/>
    </style:style>
    <style:style style:name="P1129" style:family="paragraph" style:parent-style-name="Text_20_body" style:list-style-name="L28">
      <style:text-properties officeooo:rsid="0011be67" officeooo:paragraph-rsid="00d2a825"/>
    </style:style>
    <style:style style:name="P1130" style:family="paragraph" style:parent-style-name="Text_20_body" style:list-style-name="L28">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1131" style:family="paragraph" style:parent-style-name="Text_20_body" style:list-style-name="L28">
      <style:paragraph-properties fo:margin-left="0.5in" fo:margin-right="0in" fo:margin-top="0in" fo:margin-bottom="0.0972in" style:contextual-spacing="false" fo:line-height="120%" fo:text-indent="-0.1866in" style:auto-text-indent="false"/>
      <style:text-properties officeooo:rsid="01d7d22a" officeooo:paragraph-rsid="01d7d22a"/>
    </style:style>
    <style:style style:name="P1132" style:family="paragraph" style:parent-style-name="Text_20_body" style:list-style-name="L29">
      <style:paragraph-properties fo:margin-top="0in" fo:margin-bottom="0.0972in" style:contextual-spacing="false" fo:line-height="120%"/>
      <style:text-properties officeooo:rsid="01d7d22a" officeooo:paragraph-rsid="01d7d22a"/>
    </style:style>
    <style:style style:name="P1133" style:family="paragraph" style:parent-style-name="Text_20_body" style:list-style-name="L35">
      <style:text-properties officeooo:paragraph-rsid="00d4375d"/>
    </style:style>
    <style:style style:name="P1134" style:family="paragraph" style:parent-style-name="Text_20_body" style:list-style-name="L37">
      <style:text-properties officeooo:paragraph-rsid="0101e6fc"/>
    </style:style>
    <style:style style:name="P1135" style:family="paragraph" style:parent-style-name="Text_20_body" style:list-style-name="L46">
      <style:paragraph-properties fo:margin-top="0in" fo:margin-bottom="0.1701in" style:contextual-spacing="true"/>
      <style:text-properties officeooo:paragraph-rsid="02780062"/>
    </style:style>
    <style:style style:name="P1136" style:family="paragraph" style:parent-style-name="Text_20_body" style:list-style-name="L46" style:master-page-name="">
      <style:paragraph-properties fo:margin-top="0in" fo:margin-bottom="0.1701in" style:contextual-spacing="true" style:page-number="auto"/>
      <style:text-properties officeooo:rsid="019e9baa" officeooo:paragraph-rsid="02780062"/>
    </style:style>
    <style:style style:name="P1137" style:family="paragraph" style:parent-style-name="Text_20_body" style:list-style-name="L46">
      <style:paragraph-properties fo:margin-top="0in" fo:margin-bottom="0.1701in" style:contextual-spacing="true"/>
      <style:text-properties officeooo:rsid="019e9baa" officeooo:paragraph-rsid="02780062"/>
    </style:style>
    <style:style style:name="P1138" style:family="paragraph" style:parent-style-name="Text_20_body" style:list-style-name="L50">
      <style:text-properties officeooo:rsid="025c3edb" officeooo:paragraph-rsid="025c3edb"/>
    </style:style>
    <style:style style:name="P1139" style:family="paragraph" style:parent-style-name="Text_20_body" style:list-style-name="L54">
      <style:text-properties officeooo:paragraph-rsid="0126c516"/>
    </style:style>
    <style:style style:name="P1140" style:family="paragraph" style:parent-style-name="Text_20_body" style:list-style-name="L54">
      <style:text-properties fo:font-style="normal" officeooo:paragraph-rsid="0126c516" style:font-style-asian="normal" style:font-style-complex="normal"/>
    </style:style>
    <style:style style:name="P1141" style:family="paragraph" style:parent-style-name="Text_20_body" style:list-style-name="L56">
      <style:text-properties officeooo:paragraph-rsid="012a6598"/>
    </style:style>
    <style:style style:name="P1142" style:family="paragraph" style:parent-style-name="Text_20_body" style:list-style-name="L56">
      <style:text-properties officeooo:rsid="012a6598" officeooo:paragraph-rsid="012a6598"/>
    </style:style>
    <style:style style:name="P1143" style:family="paragraph" style:parent-style-name="Text_20_body" style:list-style-name="L61">
      <style:paragraph-properties fo:margin-top="0in" fo:margin-bottom="0.1in" style:contextual-spacing="true"/>
      <style:text-properties officeooo:rsid="000f546c" officeooo:paragraph-rsid="00d61d85"/>
    </style:style>
    <style:style style:name="P1144" style:family="paragraph" style:parent-style-name="Text_20_body" style:list-style-name="L62">
      <style:text-properties officeooo:rsid="019940f7" officeooo:paragraph-rsid="019940f7"/>
    </style:style>
    <style:style style:name="P1145" style:family="paragraph" style:parent-style-name="Text_20_body" style:list-style-name="L62">
      <style:text-properties officeooo:rsid="019a55ad" officeooo:paragraph-rsid="019a55ad"/>
    </style:style>
    <style:style style:name="P1146" style:family="paragraph" style:parent-style-name="Text_20_body" style:list-style-name="L68">
      <style:text-properties officeooo:rsid="024ce69e" officeooo:paragraph-rsid="024ce69e"/>
    </style:style>
    <style:style style:name="P1147" style:family="paragraph" style:parent-style-name="Text_20_body" style:list-style-name="L69">
      <style:text-properties officeooo:rsid="017d51f6" officeooo:paragraph-rsid="017d51f6"/>
    </style:style>
    <style:style style:name="P1148" style:family="paragraph" style:parent-style-name="Text_20_body" style:list-style-name="L69" style:master-page-name="">
      <style:paragraph-properties fo:margin-top="0in" fo:margin-bottom="0.1701in" style:contextual-spacing="true" style:page-number="auto"/>
      <style:text-properties officeooo:rsid="017d51f6" officeooo:paragraph-rsid="017d51f6"/>
    </style:style>
    <style:style style:name="P1149" style:family="paragraph" style:parent-style-name="Text_20_body" style:list-style-name="L69">
      <style:paragraph-properties fo:margin-top="0in" fo:margin-bottom="0.1701in" style:contextual-spacing="true"/>
      <style:text-properties officeooo:rsid="017d51f6" officeooo:paragraph-rsid="017d51f6"/>
    </style:style>
    <style:style style:name="P1150" style:family="paragraph" style:parent-style-name="Text_20_body" style:list-style-name="L69">
      <style:paragraph-properties fo:margin-top="0in" fo:margin-bottom="0.1701in" style:contextual-spacing="true"/>
      <style:text-properties officeooo:rsid="0265f88c" officeooo:paragraph-rsid="0265f88c"/>
    </style:style>
    <style:style style:name="P1151" style:family="paragraph" style:parent-style-name="Text_20_body" style:list-style-name="L69">
      <style:text-properties officeooo:rsid="000b99a7" officeooo:paragraph-rsid="013d90a7"/>
    </style:style>
    <style:style style:name="P1152" style:family="paragraph" style:parent-style-name="Text_20_body" style:list-style-name="L69">
      <style:text-properties officeooo:rsid="0012e047" officeooo:paragraph-rsid="013d90a7"/>
    </style:style>
    <style:style style:name="P1153" style:family="paragraph" style:parent-style-name="Text_20_body" style:list-style-name="L70">
      <style:text-properties officeooo:rsid="01adef96" officeooo:paragraph-rsid="01adef96"/>
    </style:style>
    <style:style style:name="P1154" style:family="paragraph" style:parent-style-name="Text_20_body" style:list-style-name="L71">
      <style:text-properties officeooo:rsid="000e960b" officeooo:paragraph-rsid="013d90a7"/>
    </style:style>
    <style:style style:name="P1155" style:family="paragraph" style:parent-style-name="Text_20_body" style:list-style-name="L72">
      <style:paragraph-properties fo:margin-top="0in" fo:margin-bottom="0.1701in" style:contextual-spacing="true"/>
      <style:text-properties officeooo:rsid="0181129d" officeooo:paragraph-rsid="0181129d"/>
    </style:style>
    <style:style style:name="P1156" style:family="paragraph" style:parent-style-name="Text_20_body" style:list-style-name="L73">
      <style:paragraph-properties fo:margin-top="0in" fo:margin-bottom="0.1701in" style:contextual-spacing="true"/>
      <style:text-properties officeooo:rsid="0181129d" officeooo:paragraph-rsid="0181129d"/>
    </style:style>
    <style:style style:name="P1157" style:family="paragraph" style:parent-style-name="Text_20_body" style:list-style-name="L82" style:master-page-name="">
      <style:paragraph-properties fo:margin-top="0in" fo:margin-bottom="0.1701in" style:contextual-spacing="true" style:page-number="auto"/>
      <style:text-properties officeooo:rsid="018b07f2" officeooo:paragraph-rsid="018b07f2"/>
    </style:style>
    <style:style style:name="P1158" style:family="paragraph" style:parent-style-name="Text_20_body" style:list-style-name="L82">
      <style:paragraph-properties fo:margin-top="0in" fo:margin-bottom="0.1701in" style:contextual-spacing="true"/>
      <style:text-properties officeooo:rsid="018b07f2" officeooo:paragraph-rsid="018b07f2"/>
    </style:style>
    <style:style style:name="P1159" style:family="paragraph" style:parent-style-name="Text_20_body" style:list-style-name="L82">
      <style:paragraph-properties fo:margin-top="0in" fo:margin-bottom="0.1701in" style:contextual-spacing="true"/>
      <style:text-properties officeooo:rsid="026cdb12" officeooo:paragraph-rsid="026cdb12"/>
    </style:style>
    <style:style style:name="P1160" style:family="paragraph" style:parent-style-name="Text_20_body" style:list-style-name="L82">
      <style:paragraph-properties fo:margin-top="0in" fo:margin-bottom="0.1701in" style:contextual-spacing="true"/>
      <style:text-properties officeooo:rsid="023aa488" officeooo:paragraph-rsid="023aa488"/>
    </style:style>
    <style:style style:name="P1161" style:family="paragraph" style:parent-style-name="Text_20_body" style:list-style-name="L83">
      <style:text-properties officeooo:rsid="017b72ac" officeooo:paragraph-rsid="017b72ac"/>
    </style:style>
    <style:style style:name="P1162" style:family="paragraph" style:parent-style-name="Text_20_body" style:list-style-name="L86">
      <style:text-properties officeooo:rsid="00016212" officeooo:paragraph-rsid="013d90a7"/>
    </style:style>
    <style:style style:name="P1163" style:family="paragraph" style:parent-style-name="Text_20_body" style:list-style-name="L90">
      <style:text-properties officeooo:rsid="020fc6cd" officeooo:paragraph-rsid="020fc6cd"/>
    </style:style>
    <style:style style:name="P1164" style:family="paragraph" style:parent-style-name="Text_20_body" style:list-style-name="L90">
      <style:text-properties officeooo:rsid="024b3141" officeooo:paragraph-rsid="024b3141"/>
    </style:style>
    <style:style style:name="P1165" style:family="paragraph" style:parent-style-name="Text_20_body" style:list-style-name="L93">
      <style:text-properties officeooo:rsid="02045b16" officeooo:paragraph-rsid="02045b16"/>
    </style:style>
    <style:style style:name="P1166" style:family="paragraph" style:parent-style-name="Text_20_body" style:list-style-name="L93">
      <style:text-properties officeooo:rsid="02045b16" officeooo:paragraph-rsid="020bc993"/>
    </style:style>
    <style:style style:name="P1167" style:family="paragraph" style:parent-style-name="Text_20_body" style:list-style-name="L94"/>
    <style:style style:name="P1168" style:family="paragraph" style:parent-style-name="Text_20_body" style:list-style-name="L94">
      <style:text-properties officeooo:rsid="01e0b56d" officeooo:paragraph-rsid="01e0b56d"/>
    </style:style>
    <style:style style:name="P1169" style:family="paragraph" style:parent-style-name="Text_20_body" style:list-style-name="L103">
      <style:text-properties officeooo:rsid="01e0b56d" officeooo:paragraph-rsid="01eeca0c"/>
    </style:style>
    <style:style style:name="P1170" style:family="paragraph" style:parent-style-name="Text_20_body" style:list-style-name="L93">
      <style:text-properties officeooo:rsid="020bc993" officeooo:paragraph-rsid="020bc993"/>
    </style:style>
    <style:style style:name="P1171" style:family="paragraph" style:parent-style-name="Text_20_body" style:list-style-name="L93">
      <style:text-properties officeooo:rsid="020d9364" officeooo:paragraph-rsid="020d9364"/>
    </style:style>
    <style:style style:name="P1172" style:family="paragraph" style:parent-style-name="Text_20_body" style:list-style-name="L95">
      <style:paragraph-properties fo:line-height="100%"/>
      <style:text-properties officeooo:rsid="0008c3fb" officeooo:paragraph-rsid="00d4375d"/>
    </style:style>
    <style:style style:name="P1173" style:family="paragraph" style:parent-style-name="Text_20_body" style:list-style-name="L6">
      <style:paragraph-properties fo:margin-left="0.5in" fo:margin-right="0in" fo:line-height="100%" fo:text-indent="-0.25in" style:auto-text-indent="false"/>
      <style:text-properties officeooo:rsid="000993e7" officeooo:paragraph-rsid="0168ee95"/>
    </style:style>
    <style:style style:name="P1174" style:family="paragraph" style:parent-style-name="Text_20_body" style:list-style-name="L97">
      <style:paragraph-properties fo:line-height="100%"/>
      <style:text-properties officeooo:rsid="000993e7" officeooo:paragraph-rsid="00d4375d"/>
    </style:style>
    <style:style style:name="P1175" style:family="paragraph" style:parent-style-name="Text_20_body" style:list-style-name="L6">
      <style:paragraph-properties fo:margin-left="0.5in" fo:margin-right="0in" fo:margin-top="0in" fo:margin-bottom="0.1in" style:contextual-spacing="true" fo:line-height="100%" fo:text-indent="-0.25in" style:auto-text-indent="false"/>
      <style:text-properties officeooo:rsid="001439de" officeooo:paragraph-rsid="0168ee95"/>
    </style:style>
    <style:style style:name="P1176" style:family="paragraph" style:parent-style-name="Text_20_body" style:list-style-name="L96">
      <style:paragraph-properties fo:line-height="100%"/>
      <style:text-properties officeooo:rsid="0017c87a" officeooo:paragraph-rsid="00d4375d"/>
    </style:style>
    <style:style style:name="P1177" style:family="paragraph" style:parent-style-name="Text_20_body" style:list-style-name="L98">
      <style:paragraph-properties fo:line-height="100%"/>
      <style:text-properties officeooo:paragraph-rsid="00d4375d"/>
    </style:style>
    <style:style style:name="P1178" style:family="paragraph" style:parent-style-name="Text_20_body" style:list-style-name="L98">
      <style:paragraph-properties fo:line-height="100%"/>
      <style:text-properties officeooo:rsid="0019c221" officeooo:paragraph-rsid="00d4375d"/>
    </style:style>
    <style:style style:name="P1179" style:family="paragraph" style:parent-style-name="Text_20_body" style:list-style-name="L99">
      <style:paragraph-properties fo:line-height="100%"/>
      <style:text-properties officeooo:rsid="000700b6" officeooo:paragraph-rsid="00d4375d"/>
    </style:style>
    <style:style style:name="P1180" style:family="paragraph" style:parent-style-name="Text_20_body" style:list-style-name="L103">
      <style:text-properties officeooo:paragraph-rsid="01eeca0c"/>
    </style:style>
    <style:style style:name="P1181" style:family="paragraph" style:parent-style-name="Text_20_body" style:list-style-name="L104">
      <style:text-properties officeooo:paragraph-rsid="027ff4f9"/>
    </style:style>
    <style:style style:name="P1182" style:family="paragraph" style:parent-style-name="Text_20_body" style:list-style-name="L104">
      <style:text-properties officeooo:rsid="00114cb0" officeooo:paragraph-rsid="027ff4f9"/>
    </style:style>
    <style:style style:name="P1183" style:family="paragraph" style:parent-style-name="Text_20_body" style:list-style-name="L105">
      <style:text-properties officeooo:rsid="0017c3a5" officeooo:paragraph-rsid="027ff4f9"/>
    </style:style>
    <style:style style:name="P1184" style:family="paragraph" style:parent-style-name="Text_20_body" style:list-style-name="L106">
      <style:text-properties officeooo:paragraph-rsid="027ff4f9"/>
    </style:style>
    <style:style style:name="P1185" style:family="paragraph" style:parent-style-name="Text_20_body" style:list-style-name="L106">
      <style:text-properties officeooo:rsid="0023d2cc" officeooo:paragraph-rsid="027ff4f9"/>
    </style:style>
    <style:style style:name="P1186" style:family="paragraph" style:parent-style-name="Text_20_body" style:list-style-name="L106">
      <style:text-properties officeooo:rsid="002ed9d5" officeooo:paragraph-rsid="027ff4f9"/>
    </style:style>
    <style:style style:name="P1187" style:family="paragraph" style:parent-style-name="Text_20_body" style:list-style-name="L107">
      <style:text-properties officeooo:rsid="0030faf7" officeooo:paragraph-rsid="027ff4f9"/>
    </style:style>
    <style:style style:name="P1188" style:family="paragraph" style:parent-style-name="Text_20_body" style:list-style-name="L8">
      <loext:graphic-properties draw:fill="none"/>
      <style:paragraph-properties fo:margin-left="0.3118in" fo:margin-right="0in" fo:margin-top="0.0827in" fo:margin-bottom="0.0827in" style:contextual-spacing="false" fo:line-height="115%" fo:text-indent="-0.25in" style:auto-text-indent="false" fo:background-color="transparent"/>
      <style:text-properties officeooo:rsid="0030faf7" officeooo:paragraph-rsid="027ff4f9"/>
    </style:style>
    <style:style style:name="P1189" style:family="paragraph" style:parent-style-name="pascalcode" style:list-style-name="L77">
      <style:text-properties officeooo:paragraph-rsid="013d90a7"/>
    </style:style>
    <style:style style:name="P1190" style:family="paragraph" style:parent-style-name="pascalcode" style:list-style-name="L78">
      <style:text-properties officeooo:paragraph-rsid="013d90a7"/>
    </style:style>
    <style:style style:name="P1191" style:family="paragraph" style:parent-style-name="pascalcode" style:list-style-name="L79">
      <style:text-properties officeooo:paragraph-rsid="013d90a7"/>
    </style:style>
    <style:style style:name="P1192" style:family="paragraph" style:parent-style-name="pascalcode" style:list-style-name="L80">
      <style:text-properties officeooo:paragraph-rsid="013d90a7"/>
    </style:style>
    <style:style style:name="P1193" style:family="paragraph" style:parent-style-name="pascalcode" style:list-style-name="L81">
      <style:text-properties officeooo:paragraph-rsid="013d90a7"/>
    </style:style>
    <style:style style:name="P1194" style:family="paragraph">
      <loext:graphic-properties draw:fill="none" draw:fill-color="#ffffff"/>
      <style:text-properties style:font-name="Liberation Sans"/>
    </style:style>
    <style:style style:name="P1195" style:family="paragraph">
      <style:paragraph-properties fo:text-align="center"/>
    </style:style>
    <style:style style:name="P1196" style:family="paragraph">
      <loext:graphic-properties draw:fill="solid" draw:fill-color="#ffff99"/>
      <style:paragraph-properties fo:text-align="center"/>
      <style:text-properties style:font-name="Liberation Sans"/>
    </style:style>
    <style:style style:name="P1197" style:family="paragraph">
      <loext:graphic-properties draw:fill="solid" draw:fill-color="#66ffff"/>
      <style:paragraph-properties fo:text-align="center"/>
      <style:text-properties style:font-name="Liberation Sans"/>
    </style:style>
    <style:style style:name="P1198" style:family="paragraph">
      <loext:graphic-properties draw:fill="solid" draw:fill-color="#3399ff"/>
      <style:paragraph-properties fo:text-align="center"/>
      <style:text-properties style:font-name="Liberation Sans"/>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style:font-name="Arial" officeooo:rsid="0285478b"/>
    </style:style>
    <style:style style:name="T11" style:family="text">
      <style:text-properties fo:font-variant="normal" fo:text-transform="none" style:font-name="Arial"/>
    </style:style>
    <style:style style:name="T12" style:family="text">
      <style:text-properties fo:font-style="italic" style:font-style-asian="italic" style:font-style-complex="italic"/>
    </style:style>
    <style:style style:name="T13" style:family="text">
      <style:text-properties fo:font-style="italic" officeooo:rsid="00d03d2f" style:font-style-asian="italic" style:font-style-complex="italic"/>
    </style:style>
    <style:style style:name="T14" style:family="text">
      <style:text-properties fo:font-style="italic" officeooo:rsid="00d69792" style:font-style-asian="italic" style:font-style-complex="italic"/>
    </style:style>
    <style:style style:name="T15" style:family="text">
      <style:text-properties fo:font-style="italic" officeooo:rsid="0101e6fc" style:font-style-asian="italic" style:font-style-complex="italic"/>
    </style:style>
    <style:style style:name="T16" style:family="text">
      <style:text-properties fo:font-style="italic" officeooo:rsid="0127d356" style:font-style-asian="italic" style:font-style-complex="italic"/>
    </style:style>
    <style:style style:name="T17" style:family="text">
      <style:text-properties fo:font-style="italic" officeooo:rsid="0139e38d" style:font-style-asian="italic" style:font-style-complex="italic"/>
    </style:style>
    <style:style style:name="T18" style:family="text">
      <style:text-properties fo:font-style="italic" officeooo:rsid="01596760" style:font-style-asian="italic" style:font-style-complex="italic"/>
    </style:style>
    <style:style style:name="T19" style:family="text">
      <style:text-properties fo:font-style="italic" officeooo:rsid="000a917a" style:font-style-asian="italic" style:font-style-complex="italic"/>
    </style:style>
    <style:style style:name="T20" style:family="text">
      <style:text-properties fo:font-style="italic" officeooo:rsid="016f1a83" style:font-style-asian="italic" style:font-style-complex="italic"/>
    </style:style>
    <style:style style:name="T21" style:family="text">
      <style:text-properties fo:font-style="italic" officeooo:rsid="00d23a81" style:font-style-asian="italic" style:font-style-complex="italic"/>
    </style:style>
    <style:style style:name="T22" style:family="text">
      <style:text-properties fo:font-style="italic" officeooo:rsid="000d7b2d" style:font-style-asian="italic" style:font-style-complex="italic"/>
    </style:style>
    <style:style style:name="T23" style:family="text">
      <style:text-properties fo:font-style="italic" officeooo:rsid="0285478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1fc4913" style:font-weight-asian="bold" style:font-weight-complex="bold"/>
    </style:style>
    <style:style style:name="T27" style:family="text">
      <style:text-properties fo:font-weight="bold" officeooo:rsid="0252bab6" style:font-weight-asian="bold" style:font-weight-complex="bold"/>
    </style:style>
    <style:style style:name="T28" style:family="text">
      <style:text-properties fo:font-weight="bold" officeooo:rsid="02749ad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993e7" style:font-weight-asian="normal" style:font-weight-complex="normal"/>
    </style:style>
    <style:style style:name="T31" style:family="text">
      <style:text-properties fo:font-weight="normal" officeooo:rsid="000f9d34" style:font-weight-asian="normal" style:font-weight-complex="normal"/>
    </style:style>
    <style:style style:name="T32" style:family="text">
      <style:text-properties fo:font-weight="normal" officeooo:rsid="00108c22" style:font-weight-asian="normal" style:font-weight-complex="normal"/>
    </style:style>
    <style:style style:name="T33" style:family="text">
      <style:text-properties fo:font-weight="normal" officeooo:rsid="000df0bc" style:font-weight-asian="normal" style:font-weight-complex="normal"/>
    </style:style>
    <style:style style:name="T34" style:family="text">
      <style:text-properties fo:font-weight="normal" officeooo:rsid="0015d523" style:font-weight-asian="normal" style:font-weight-complex="normal"/>
    </style:style>
    <style:style style:name="T35" style:family="text">
      <style:text-properties fo:font-weight="normal" officeooo:rsid="0012b01e" style:font-weight-asian="normal" style:font-weight-complex="normal"/>
    </style:style>
    <style:style style:name="T36" style:family="text">
      <style:text-properties fo:font-weight="normal" officeooo:rsid="0017dc1b" style:font-weight-asian="normal" style:font-weight-complex="normal"/>
    </style:style>
    <style:style style:name="T37" style:family="text">
      <style:text-properties fo:font-weight="normal" officeooo:rsid="0019c221" style:font-weight-asian="normal" style:font-weight-complex="normal"/>
    </style:style>
    <style:style style:name="T38" style:family="text">
      <style:text-properties fo:font-weight="normal" officeooo:rsid="018f61f6" style:font-weight-asian="normal" style:font-weight-complex="normal"/>
    </style:style>
    <style:style style:name="T39" style:family="text">
      <style:text-properties fo:font-weight="normal" officeooo:rsid="01fc4913" style:font-weight-asian="normal" style:font-weight-complex="normal"/>
    </style:style>
    <style:style style:name="T40" style:family="text">
      <style:text-properties fo:font-weight="normal" officeooo:rsid="0250d175" style:font-weight-asian="normal" style:font-weight-complex="normal"/>
    </style:style>
    <style:style style:name="T41" style:family="text">
      <style:text-properties fo:font-weight="normal" officeooo:rsid="0252bab6" style:font-weight-asian="normal" style:font-weight-complex="normal"/>
    </style:style>
    <style:style style:name="T42" style:family="text">
      <style:text-properties fo:font-weight="normal" officeooo:rsid="02749ade" style:font-weight-asian="normal" style:font-weight-complex="normal"/>
    </style:style>
    <style:style style:name="T43" style:family="text">
      <style:text-properties fo:font-weight="normal" officeooo:rsid="028957dc" style:font-weight-asian="normal" style:font-weight-complex="normal"/>
    </style:style>
    <style:style style:name="T44" style:family="text">
      <style:text-properties officeooo:rsid="00d03d2f"/>
    </style:style>
    <style:style style:name="T45" style:family="text">
      <style:text-properties officeooo:rsid="00d23a81"/>
    </style:style>
    <style:style style:name="T46" style:family="text">
      <style:text-properties officeooo:rsid="000045ee"/>
    </style:style>
    <style:style style:name="T47" style:family="text">
      <style:text-properties officeooo:rsid="0002d179"/>
    </style:style>
    <style:style style:name="T48" style:family="text">
      <style:text-properties officeooo:rsid="0013c321"/>
    </style:style>
    <style:style style:name="T49" style:family="text">
      <style:text-properties officeooo:rsid="00111271"/>
    </style:style>
    <style:style style:name="T50" style:family="text">
      <style:text-properties officeooo:rsid="0015b02f"/>
    </style:style>
    <style:style style:name="T51" style:family="text">
      <style:text-properties officeooo:rsid="001243d1"/>
    </style:style>
    <style:style style:name="T52" style:family="text">
      <style:text-properties officeooo:rsid="000a33b9"/>
    </style:style>
    <style:style style:name="T53" style:family="text">
      <style:text-properties officeooo:rsid="00099004"/>
    </style:style>
    <style:style style:name="T54" style:family="text">
      <style:text-properties officeooo:rsid="0001877c"/>
    </style:style>
    <style:style style:name="T55" style:family="text">
      <style:text-properties officeooo:rsid="0001abbe"/>
    </style:style>
    <style:style style:name="T56" style:family="text">
      <style:text-properties officeooo:rsid="0006dd99"/>
    </style:style>
    <style:style style:name="T57" style:family="text">
      <style:text-properties officeooo:rsid="000902da"/>
    </style:style>
    <style:style style:name="T58" style:family="text">
      <style:text-properties style:font-name="Liberation Mono"/>
    </style:style>
    <style:style style:name="T59" style:family="text">
      <style:text-properties style:font-name="Liberation Mono" officeooo:rsid="000902da"/>
    </style:style>
    <style:style style:name="T60" style:family="text">
      <style:text-properties style:font-name="Liberation Serif" officeooo:rsid="000902da"/>
    </style:style>
    <style:style style:name="T61" style:family="text">
      <style:text-properties officeooo:rsid="00109172"/>
    </style:style>
    <style:style style:name="T62" style:family="text">
      <style:text-properties officeooo:rsid="0012b941"/>
    </style:style>
    <style:style style:name="T63" style:family="text">
      <style:text-properties fo:font-size="10pt" style:font-size-asian="10pt" style:font-size-complex="10pt"/>
    </style:style>
    <style:style style:name="T64" style:family="text">
      <style:text-properties officeooo:rsid="001439de"/>
    </style:style>
    <style:style style:name="T65" style:family="text">
      <style:text-properties officeooo:rsid="001dbc34"/>
    </style:style>
    <style:style style:name="T66" style:family="text">
      <style:text-properties officeooo:rsid="001c48d9"/>
    </style:style>
    <style:style style:name="T67" style:family="text">
      <style:text-properties officeooo:rsid="000993e7"/>
    </style:style>
    <style:style style:name="T68" style:family="text">
      <style:text-properties officeooo:rsid="000df0bc"/>
    </style:style>
    <style:style style:name="T69" style:family="text">
      <style:text-properties officeooo:rsid="000f9d34"/>
    </style:style>
    <style:style style:name="T70" style:family="text">
      <style:text-properties officeooo:rsid="0017dc1b"/>
    </style:style>
    <style:style style:name="T71" style:family="text">
      <style:text-properties officeooo:rsid="0017c87a"/>
    </style:style>
    <style:style style:name="T72" style:family="text">
      <style:text-properties officeooo:rsid="0015d523"/>
    </style:style>
    <style:style style:name="T73" style:family="text">
      <style:text-properties officeooo:rsid="0012b01e"/>
    </style:style>
    <style:style style:name="T74" style:family="text">
      <style:text-properties officeooo:rsid="001b9191"/>
    </style:style>
    <style:style style:name="T75" style:family="text">
      <style:text-properties officeooo:rsid="0019c221"/>
    </style:style>
    <style:style style:name="T76" style:family="text">
      <style:text-properties officeooo:rsid="000a917a"/>
    </style:style>
    <style:style style:name="T77" style:family="text">
      <style:text-properties officeooo:rsid="00021b65"/>
    </style:style>
    <style:style style:name="T78" style:family="text">
      <style:text-properties officeooo:rsid="0010c3c7"/>
    </style:style>
    <style:style style:name="T79" style:family="text">
      <style:text-properties officeooo:rsid="00d69792"/>
    </style:style>
    <style:style style:name="T80" style:family="text">
      <style:text-properties officeooo:rsid="00d95c06"/>
    </style:style>
    <style:style style:name="T81" style:family="text">
      <style:text-properties officeooo:rsid="00dad200"/>
    </style:style>
    <style:style style:name="T82" style:family="text">
      <style:text-properties fo:font-style="normal" style:font-style-asian="normal" style:font-style-complex="normal"/>
    </style:style>
    <style:style style:name="T83" style:family="text">
      <style:text-properties fo:font-style="normal" officeooo:rsid="00dad200" style:font-style-asian="normal" style:font-style-complex="normal"/>
    </style:style>
    <style:style style:name="T84" style:family="text">
      <style:text-properties fo:font-style="normal" officeooo:rsid="0103b5ed" style:font-style-asian="normal" style:font-style-complex="normal"/>
    </style:style>
    <style:style style:name="T85" style:family="text">
      <style:text-properties fo:font-style="normal" officeooo:rsid="01596760" style:font-style-asian="normal" style:font-style-complex="normal"/>
    </style:style>
    <style:style style:name="T86" style:family="text">
      <style:text-properties fo:font-style="normal" officeooo:rsid="01db6e0e" style:font-style-asian="normal" style:font-style-complex="normal"/>
    </style:style>
    <style:style style:name="T87" style:family="text">
      <style:text-properties fo:font-style="normal" officeooo:rsid="00d23a81" style:font-style-asian="normal" style:font-style-complex="normal"/>
    </style:style>
    <style:style style:name="T88" style:family="text">
      <style:text-properties fo:font-style="normal" officeooo:rsid="000d7b2d" style:font-style-asian="normal" style:font-style-complex="normal"/>
    </style:style>
    <style:style style:name="T89" style:family="text">
      <style:text-properties fo:font-style="normal" officeooo:rsid="0010656b" style:font-style-asian="normal" style:font-style-complex="normal"/>
    </style:style>
    <style:style style:name="T90" style:family="text">
      <style:text-properties fo:font-style="normal" officeooo:rsid="0025ba1b" style:font-style-asian="normal" style:font-style-complex="normal"/>
    </style:style>
    <style:style style:name="T91" style:family="text">
      <style:text-properties fo:font-style="normal" officeooo:rsid="00114cb0" style:font-style-asian="normal" style:font-style-complex="normal"/>
    </style:style>
    <style:style style:name="T92" style:family="text">
      <style:text-properties fo:font-style="normal" officeooo:rsid="0012db39" style:font-style-asian="normal" style:font-style-complex="normal"/>
    </style:style>
    <style:style style:name="T93" style:family="text">
      <style:text-properties fo:font-style="normal" officeooo:rsid="001458cf" style:font-style-asian="normal" style:font-style-complex="normal"/>
    </style:style>
    <style:style style:name="T94" style:family="text">
      <style:text-properties fo:font-style="normal" officeooo:rsid="0026f561" style:font-style-asian="normal" style:font-style-complex="normal"/>
    </style:style>
    <style:style style:name="T95" style:family="text">
      <style:text-properties fo:font-style="normal" officeooo:rsid="027ff4f9" style:font-style-asian="normal" style:font-style-complex="normal"/>
    </style:style>
    <style:style style:name="T96" style:family="text">
      <style:text-properties fo:font-style="normal" officeooo:rsid="000ee136"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243bb48"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243bb48" style:font-style-asian="normal" style:font-weight-asian="normal" style:font-style-complex="normal" style:font-weight-complex="normal"/>
    </style:style>
    <style:style style:name="T101" style:family="text">
      <style:text-properties fo:font-style="normal" fo:font-weight="normal" officeooo:rsid="0246fa90" style:font-style-asian="normal" style:font-weight-asian="normal" style:font-style-complex="normal" style:font-weight-complex="normal"/>
    </style:style>
    <style:style style:name="T102" style:family="text">
      <style:text-properties fo:font-style="normal" fo:font-weight="normal" officeooo:rsid="027b536a" style:font-style-asian="normal" style:font-weight-asian="normal" style:font-style-complex="normal" style:font-weight-complex="normal"/>
    </style:style>
    <style:style style:name="T103" style:family="text">
      <style:text-properties officeooo:rsid="00dc83f0"/>
    </style:style>
    <style:style style:name="T104" style:family="text">
      <style:text-properties officeooo:rsid="00e1db9e"/>
    </style:style>
    <style:style style:name="T105" style:family="text">
      <style:text-properties style:font-name="Courier New1"/>
    </style:style>
    <style:style style:name="T106" style:family="text">
      <style:text-properties officeooo:rsid="00ec8dc4"/>
    </style:style>
    <style:style style:name="T107" style:family="text">
      <style:text-properties officeooo:rsid="00f00ab7"/>
    </style:style>
    <style:style style:name="T108" style:family="text">
      <style:text-properties officeooo:rsid="00f088cc"/>
    </style:style>
    <style:style style:name="T109" style:family="text">
      <style:text-properties officeooo:rsid="00f2298f"/>
    </style:style>
    <style:style style:name="T110" style:family="text">
      <style:text-properties officeooo:rsid="00f444df"/>
    </style:style>
    <style:style style:name="T111" style:family="text">
      <style:text-properties officeooo:rsid="00f624c0"/>
    </style:style>
    <style:style style:name="T112" style:family="text">
      <style:text-properties officeooo:rsid="00f7ac29"/>
    </style:style>
    <style:style style:name="T113" style:family="text">
      <style:text-properties officeooo:rsid="00f86d29"/>
    </style:style>
    <style:style style:name="T114" style:family="text">
      <style:text-properties officeooo:rsid="00f9ed17"/>
    </style:style>
    <style:style style:name="T115" style:family="text">
      <style:text-properties officeooo:rsid="00fa1101"/>
    </style:style>
    <style:style style:name="T116" style:family="text">
      <style:text-properties officeooo:rsid="00fb3a7c"/>
    </style:style>
    <style:style style:name="T117" style:family="text">
      <style:text-properties officeooo:rsid="00fd335e"/>
    </style:style>
    <style:style style:name="T118" style:family="text">
      <style:text-properties officeooo:rsid="00fef681"/>
    </style:style>
    <style:style style:name="T119" style:family="text">
      <style:text-properties officeooo:rsid="0101e6fc"/>
    </style:style>
    <style:style style:name="T120" style:family="text">
      <style:text-properties officeooo:rsid="0103b5ed"/>
    </style:style>
    <style:style style:name="T121" style:family="text">
      <style:text-properties officeooo:rsid="0105a189"/>
    </style:style>
    <style:style style:name="T122" style:family="text">
      <style:text-properties officeooo:rsid="010cb508"/>
    </style:style>
    <style:style style:name="T123" style:family="text">
      <style:text-properties officeooo:rsid="010f8efe"/>
    </style:style>
    <style:style style:name="T124" style:family="text">
      <style:text-properties officeooo:rsid="0110d205"/>
    </style:style>
    <style:style style:name="T125" style:family="text">
      <style:text-properties officeooo:rsid="01128d0e"/>
    </style:style>
    <style:style style:name="T126" style:family="text">
      <style:text-properties officeooo:rsid="0113982d"/>
    </style:style>
    <style:style style:name="T127" style:family="text">
      <style:text-properties officeooo:rsid="011414b7"/>
    </style:style>
    <style:style style:name="T128" style:family="text">
      <style:text-properties officeooo:rsid="0114226a"/>
    </style:style>
    <style:style style:name="T129" style:family="text">
      <style:text-properties officeooo:rsid="011d248c"/>
    </style:style>
    <style:style style:name="T130" style:family="text">
      <style:text-properties officeooo:rsid="011f4539"/>
    </style:style>
    <style:style style:name="T131" style:family="text">
      <style:text-properties officeooo:rsid="0120505d"/>
    </style:style>
    <style:style style:name="T132" style:family="text">
      <style:text-properties officeooo:rsid="0121e124"/>
    </style:style>
    <style:style style:name="T133" style:family="text">
      <style:text-properties officeooo:rsid="012406f5"/>
    </style:style>
    <style:style style:name="T134" style:family="text">
      <style:text-properties officeooo:rsid="01241079"/>
    </style:style>
    <style:style style:name="T135" style:family="text">
      <style:text-properties officeooo:rsid="01243f87"/>
    </style:style>
    <style:style style:name="T136" style:family="text">
      <style:text-properties officeooo:rsid="0125f0e0"/>
    </style:style>
    <style:style style:name="T137" style:family="text">
      <style:text-properties officeooo:rsid="01261b53"/>
    </style:style>
    <style:style style:name="T138" style:family="text">
      <style:text-properties officeooo:rsid="0126c516"/>
    </style:style>
    <style:style style:name="T139" style:family="text">
      <style:text-properties officeooo:rsid="0127d356"/>
    </style:style>
    <style:style style:name="T140" style:family="text">
      <style:text-properties officeooo:rsid="0128f804"/>
    </style:style>
    <style:style style:name="T141" style:family="text">
      <style:text-properties officeooo:rsid="012a6598"/>
    </style:style>
    <style:style style:name="T142" style:family="text">
      <style:text-properties officeooo:rsid="012c993d"/>
    </style:style>
    <style:style style:name="T143" style:family="text">
      <style:text-properties officeooo:rsid="012d47b9"/>
    </style:style>
    <style:style style:name="T144" style:family="text">
      <style:text-properties officeooo:rsid="012ed61f"/>
    </style:style>
    <style:style style:name="T145" style:family="text">
      <style:text-properties officeooo:rsid="011c1101"/>
    </style:style>
    <style:style style:name="T146" style:family="text">
      <style:text-properties officeooo:rsid="012f893f"/>
    </style:style>
    <style:style style:name="T147" style:family="text">
      <style:text-properties officeooo:rsid="012fd71c"/>
    </style:style>
    <style:style style:name="T148" style:family="text">
      <style:text-properties officeooo:rsid="0116168d"/>
    </style:style>
    <style:style style:name="T149" style:family="text">
      <style:text-properties officeooo:rsid="013119b1"/>
    </style:style>
    <style:style style:name="T150" style:family="text">
      <style:text-properties officeooo:rsid="01328434"/>
    </style:style>
    <style:style style:name="T151" style:family="text">
      <style:text-properties officeooo:rsid="0133e009"/>
    </style:style>
    <style:style style:name="T152" style:family="text">
      <style:text-properties officeooo:rsid="01348bc2"/>
    </style:style>
    <style:style style:name="T153" style:family="text">
      <style:text-properties officeooo:rsid="0134a357"/>
    </style:style>
    <style:style style:name="T154" style:family="text">
      <style:text-properties officeooo:rsid="013714dd"/>
    </style:style>
    <style:style style:name="T155" style:family="text">
      <style:text-properties officeooo:rsid="0139e38d"/>
    </style:style>
    <style:style style:name="T156" style:family="text">
      <style:text-properties officeooo:rsid="013cf6fb"/>
    </style:style>
    <style:style style:name="T157" style:family="text">
      <style:text-properties officeooo:rsid="013d90a7"/>
    </style:style>
    <style:style style:name="T158" style:family="text">
      <style:text-properties officeooo:rsid="013dd33d"/>
    </style:style>
    <style:style style:name="T159" style:family="text">
      <style:text-properties officeooo:rsid="013f2d3b"/>
    </style:style>
    <style:style style:name="T160" style:family="text">
      <style:text-properties officeooo:rsid="01407516"/>
    </style:style>
    <style:style style:name="T161" style:family="text">
      <style:text-properties officeooo:rsid="0141ab2f"/>
    </style:style>
    <style:style style:name="T162" style:family="text">
      <style:text-properties officeooo:rsid="0141fb09"/>
    </style:style>
    <style:style style:name="T163" style:family="text">
      <style:text-properties officeooo:rsid="01445b72"/>
    </style:style>
    <style:style style:name="T164" style:family="text">
      <style:text-properties officeooo:rsid="006faa57"/>
    </style:style>
    <style:style style:name="T165" style:family="text">
      <style:text-properties officeooo:rsid="00703ed5"/>
    </style:style>
    <style:style style:name="T166" style:family="text">
      <style:text-properties officeooo:rsid="01447b13"/>
    </style:style>
    <style:style style:name="T167" style:family="text">
      <style:text-properties officeooo:rsid="01455bf5"/>
    </style:style>
    <style:style style:name="T168" style:family="text">
      <style:text-properties officeooo:rsid="0145ff04"/>
    </style:style>
    <style:style style:name="T169" style:family="text">
      <style:text-properties officeooo:rsid="0146c85e"/>
    </style:style>
    <style:style style:name="T170" style:family="text">
      <style:text-properties officeooo:rsid="00349edc"/>
    </style:style>
    <style:style style:name="T171" style:family="text">
      <style:text-properties officeooo:rsid="01476c08"/>
    </style:style>
    <style:style style:name="T172" style:family="text">
      <style:text-properties officeooo:rsid="01490134"/>
    </style:style>
    <style:style style:name="T173" style:family="text">
      <style:text-properties officeooo:rsid="014b359c"/>
    </style:style>
    <style:style style:name="T174" style:family="text">
      <style:text-properties officeooo:rsid="014c8d44"/>
    </style:style>
    <style:style style:name="T175" style:family="text">
      <style:text-properties officeooo:rsid="014f2a11"/>
    </style:style>
    <style:style style:name="T176" style:family="text">
      <style:text-properties officeooo:rsid="01512986"/>
    </style:style>
    <style:style style:name="T177" style:family="text">
      <style:text-properties officeooo:rsid="0152ec6e"/>
    </style:style>
    <style:style style:name="T178" style:family="text">
      <style:text-properties officeooo:rsid="01535050"/>
    </style:style>
    <style:style style:name="T179" style:family="text">
      <style:text-properties officeooo:rsid="0153eee5"/>
    </style:style>
    <style:style style:name="T180" style:family="text">
      <style:text-properties officeooo:rsid="0156fbcd"/>
    </style:style>
    <style:style style:name="T181" style:family="text">
      <style:text-properties officeooo:rsid="0157ef0d"/>
    </style:style>
    <style:style style:name="T182" style:family="text">
      <style:text-properties officeooo:rsid="0159282f"/>
    </style:style>
    <style:style style:name="T183" style:family="text">
      <style:text-properties officeooo:rsid="01596760"/>
    </style:style>
    <style:style style:name="T184" style:family="text">
      <style:text-properties officeooo:rsid="015aadeb"/>
    </style:style>
    <style:style style:name="T185" style:family="text">
      <style:text-properties officeooo:rsid="015d828e"/>
    </style:style>
    <style:style style:name="T186" style:family="text">
      <style:text-properties officeooo:rsid="015e44b6"/>
    </style:style>
    <style:style style:name="T187" style:family="text">
      <style:text-properties officeooo:rsid="015ecf95"/>
    </style:style>
    <style:style style:name="T188" style:family="text">
      <style:text-properties officeooo:rsid="0135a4b6"/>
    </style:style>
    <style:style style:name="T189" style:family="text">
      <style:text-properties officeooo:rsid="01603609"/>
    </style:style>
    <style:style style:name="T190" style:family="text">
      <style:text-properties officeooo:rsid="0161a329"/>
    </style:style>
    <style:style style:name="T191" style:family="text">
      <style:text-properties officeooo:rsid="0162bcfa"/>
    </style:style>
    <style:style style:name="T192" style:family="text">
      <style:text-properties officeooo:rsid="0122a9b6"/>
    </style:style>
    <style:style style:name="T193" style:family="text">
      <style:text-properties officeooo:rsid="0163a38d"/>
    </style:style>
    <style:style style:name="T194" style:family="text">
      <style:text-properties officeooo:rsid="01657b8b"/>
    </style:style>
    <style:style style:name="T195" style:family="text">
      <style:text-properties officeooo:rsid="01675a79"/>
    </style:style>
    <style:style style:name="T196" style:family="text">
      <style:text-properties officeooo:rsid="016815a3"/>
    </style:style>
    <style:style style:name="T197" style:family="text">
      <style:text-properties officeooo:rsid="00e81ef6"/>
    </style:style>
    <style:style style:name="T198" style:family="text">
      <style:text-properties officeooo:rsid="01684044"/>
    </style:style>
    <style:style style:name="T199" style:family="text">
      <style:text-properties officeooo:rsid="0168bc8b"/>
    </style:style>
    <style:style style:name="T200" style:family="text">
      <style:text-properties officeooo:rsid="0168ee95"/>
    </style:style>
    <style:style style:name="T201" style:family="text">
      <style:text-properties officeooo:rsid="016f1a83"/>
    </style:style>
    <style:style style:name="T202" style:family="text">
      <style:text-properties officeooo:rsid="0170f57a"/>
    </style:style>
    <style:style style:name="T203" style:family="text">
      <style:text-properties style:font-name="DejaVu Sans Mono" fo:font-size="9pt" style:font-size-asian="9pt" style:font-size-complex="9pt"/>
    </style:style>
    <style:style style:name="T204" style:family="text">
      <style:text-properties style:font-name="DejaVu Sans Mono" fo:font-size="9.5pt" officeooo:rsid="02428cee" style:font-size-asian="8.30000019073486pt" style:font-size-complex="9.5pt"/>
    </style:style>
    <style:style style:name="T205" style:family="text">
      <style:text-properties officeooo:rsid="0173fcab"/>
    </style:style>
    <style:style style:name="T206" style:family="text">
      <style:text-properties officeooo:rsid="01783caf"/>
    </style:style>
    <style:style style:name="T207" style:family="text">
      <style:text-properties officeooo:rsid="017a6461"/>
    </style:style>
    <style:style style:name="T208" style:family="text">
      <style:text-properties officeooo:rsid="017b531c"/>
    </style:style>
    <style:style style:name="T209" style:family="text">
      <style:text-properties fo:font-size="9pt" style:font-size-asian="9pt" style:font-size-complex="9pt"/>
    </style:style>
    <style:style style:name="T210" style:family="text">
      <style:text-properties fo:font-size="9pt" officeooo:rsid="017b72ac" style:font-size-asian="9pt" style:font-size-complex="9pt"/>
    </style:style>
    <style:style style:name="T211" style:family="text">
      <style:text-properties officeooo:rsid="017b72ac"/>
    </style:style>
    <style:style style:name="T212" style:family="text">
      <style:text-properties officeooo:rsid="017b8635"/>
    </style:style>
    <style:style style:name="T213" style:family="text">
      <style:text-properties officeooo:rsid="0181129d"/>
    </style:style>
    <style:style style:name="T214" style:family="text">
      <style:text-properties officeooo:rsid="018321cd"/>
    </style:style>
    <style:style style:name="T215" style:family="text">
      <style:text-properties officeooo:rsid="01863bfa"/>
    </style:style>
    <style:style style:name="T216" style:family="text">
      <style:text-properties officeooo:rsid="0186b18a"/>
    </style:style>
    <style:style style:name="T217" style:family="text">
      <style:text-properties officeooo:rsid="018740e3"/>
    </style:style>
    <style:style style:name="T218" style:family="text">
      <style:text-properties officeooo:rsid="01895f1e"/>
    </style:style>
    <style:style style:name="T219" style:family="text">
      <style:text-properties officeooo:rsid="018b07f2"/>
    </style:style>
    <style:style style:name="T220" style:family="text">
      <style:text-properties officeooo:rsid="018c98ab"/>
    </style:style>
    <style:style style:name="T221" style:family="text">
      <style:text-properties officeooo:rsid="018e1cb3"/>
    </style:style>
    <style:style style:name="T222" style:family="text">
      <style:text-properties officeooo:rsid="018f61f6"/>
    </style:style>
    <style:style style:name="T223" style:family="text">
      <style:text-properties officeooo:rsid="0190c2c9"/>
    </style:style>
    <style:style style:name="T224" style:family="text">
      <style:text-properties officeooo:rsid="0192065a"/>
    </style:style>
    <style:style style:name="T225" style:family="text">
      <style:text-properties officeooo:rsid="019340d0"/>
    </style:style>
    <style:style style:name="T226" style:family="text">
      <style:text-properties officeooo:rsid="0193d7ce"/>
    </style:style>
    <style:style style:name="T227" style:family="text">
      <style:text-properties officeooo:rsid="0193e2b4"/>
    </style:style>
    <style:style style:name="T228" style:family="text">
      <style:text-properties officeooo:rsid="01945d08"/>
    </style:style>
    <style:style style:name="T229" style:family="text">
      <style:text-properties officeooo:rsid="019940f7"/>
    </style:style>
    <style:style style:name="T230" style:family="text">
      <style:text-properties officeooo:rsid="019ac7f8"/>
    </style:style>
    <style:style style:name="T231" style:family="text">
      <style:text-properties officeooo:rsid="019d1dd2"/>
    </style:style>
    <style:style style:name="T232" style:family="text">
      <style:text-properties officeooo:rsid="019de97e"/>
    </style:style>
    <style:style style:name="T233" style:family="text">
      <style:text-properties officeooo:rsid="01a04c4c"/>
    </style:style>
    <style:style style:name="T234" style:family="text">
      <style:text-properties officeooo:rsid="01a39b56"/>
    </style:style>
    <style:style style:name="T235" style:family="text">
      <style:text-properties officeooo:rsid="01a50cd5"/>
    </style:style>
    <style:style style:name="T236" style:family="text">
      <style:text-properties officeooo:rsid="01a63f46"/>
    </style:style>
    <style:style style:name="T237" style:family="text">
      <style:text-properties officeooo:rsid="01a70ad9"/>
    </style:style>
    <style:style style:name="T238" style:family="text">
      <style:text-properties officeooo:rsid="01a7e2e2"/>
    </style:style>
    <style:style style:name="T239" style:family="text">
      <style:text-properties officeooo:rsid="01a80602"/>
    </style:style>
    <style:style style:name="T240" style:family="text">
      <style:text-properties officeooo:rsid="01a8ded8"/>
    </style:style>
    <style:style style:name="T241" style:family="text">
      <style:text-properties officeooo:rsid="01a9736a"/>
    </style:style>
    <style:style style:name="T242" style:family="text">
      <style:text-properties officeooo:rsid="01ab4e00"/>
    </style:style>
    <style:style style:name="T243" style:family="text">
      <style:text-properties officeooo:rsid="01ad6673"/>
    </style:style>
    <style:style style:name="T244" style:family="text">
      <style:text-properties officeooo:rsid="01afb46e"/>
    </style:style>
    <style:style style:name="T245" style:family="text">
      <style:text-properties officeooo:rsid="01b0cdde"/>
    </style:style>
    <style:style style:name="T246" style:family="text">
      <style:text-properties officeooo:rsid="01b26728"/>
    </style:style>
    <style:style style:name="T247" style:family="text">
      <style:text-properties officeooo:rsid="01b28d31"/>
    </style:style>
    <style:style style:name="T248" style:family="text">
      <style:text-properties officeooo:rsid="01b35b40"/>
    </style:style>
    <style:style style:name="T249" style:family="text">
      <style:text-properties officeooo:rsid="01b51166"/>
    </style:style>
    <style:style style:name="T250" style:family="text">
      <style:text-properties officeooo:rsid="01b5c096"/>
    </style:style>
    <style:style style:name="T251" style:family="text">
      <style:text-properties officeooo:rsid="01b5d904"/>
    </style:style>
    <style:style style:name="T252" style:family="text">
      <style:text-properties officeooo:rsid="01b77a3d"/>
    </style:style>
    <style:style style:name="T253" style:family="text">
      <style:text-properties officeooo:rsid="01b82c8f"/>
    </style:style>
    <style:style style:name="T254" style:family="text">
      <style:text-properties officeooo:rsid="0008c3fb"/>
    </style:style>
    <style:style style:name="T255" style:family="text">
      <style:text-properties officeooo:rsid="01b92132"/>
    </style:style>
    <style:style style:name="T256" style:family="text">
      <style:text-properties officeooo:rsid="01be5d11"/>
    </style:style>
    <style:style style:name="T257" style:family="text">
      <style:text-properties officeooo:rsid="01bf22a6"/>
    </style:style>
    <style:style style:name="T258" style:family="text">
      <style:text-properties officeooo:rsid="01c0b2bd"/>
    </style:style>
    <style:style style:name="T259" style:family="text">
      <style:text-properties officeooo:rsid="01c2966e"/>
    </style:style>
    <style:style style:name="T260" style:family="text">
      <style:text-properties officeooo:rsid="01c3285e"/>
    </style:style>
    <style:style style:name="T261" style:family="text">
      <style:text-properties officeooo:rsid="01c3efbe"/>
    </style:style>
    <style:style style:name="T262" style:family="text">
      <style:text-properties officeooo:rsid="01c577cf"/>
    </style:style>
    <style:style style:name="T263" style:family="text">
      <style:text-properties officeooo:rsid="01c7be54"/>
    </style:style>
    <style:style style:name="T264" style:family="text">
      <style:text-properties officeooo:rsid="01c85c46"/>
    </style:style>
    <style:style style:name="T265" style:family="text">
      <style:text-properties officeooo:rsid="01c9e743"/>
    </style:style>
    <style:style style:name="T266" style:family="text">
      <style:text-properties officeooo:rsid="01caac69"/>
    </style:style>
    <style:style style:name="T267" style:family="text">
      <style:text-properties officeooo:rsid="01cb631d"/>
    </style:style>
    <style:style style:name="T268" style:family="text">
      <style:text-properties officeooo:rsid="01cc60e9"/>
    </style:style>
    <style:style style:name="T269" style:family="text">
      <style:text-properties officeooo:rsid="01cd3b97"/>
    </style:style>
    <style:style style:name="T270" style:family="text">
      <style:text-properties officeooo:rsid="01cf2619"/>
    </style:style>
    <style:style style:name="T271" style:family="text">
      <style:text-properties officeooo:rsid="01d05b05"/>
    </style:style>
    <style:style style:name="T272" style:family="text">
      <style:text-properties officeooo:rsid="01d112b0"/>
    </style:style>
    <style:style style:name="T273" style:family="text">
      <style:text-properties officeooo:rsid="01d2c2b3"/>
    </style:style>
    <style:style style:name="T274" style:family="text">
      <style:text-properties officeooo:rsid="01d37fd7"/>
    </style:style>
    <style:style style:name="T275" style:family="text">
      <style:text-properties officeooo:rsid="01d38901"/>
    </style:style>
    <style:style style:name="T276" style:family="text">
      <style:text-properties officeooo:rsid="01d533af"/>
    </style:style>
    <style:style style:name="T277" style:family="text">
      <style:text-properties officeooo:rsid="01d70ac8"/>
    </style:style>
    <style:style style:name="T278" style:family="text">
      <style:text-properties officeooo:rsid="01db6e0e"/>
    </style:style>
    <style:style style:name="T279" style:family="text">
      <style:text-properties officeooo:rsid="01dbe152"/>
    </style:style>
    <style:style style:name="T280" style:family="text">
      <style:text-properties officeooo:rsid="01df8c35"/>
    </style:style>
    <style:style style:name="T281" style:family="text">
      <style:text-properties officeooo:rsid="01e0b56d"/>
    </style:style>
    <style:style style:name="T282" style:family="text">
      <style:text-properties officeooo:rsid="01e1b0ee"/>
    </style:style>
    <style:style style:name="T283" style:family="text">
      <style:text-properties style:font-name="serif" fo:font-size="12pt" officeooo:rsid="01e693d6"/>
    </style:style>
    <style:style style:name="T284" style:family="text">
      <style:text-properties officeooo:rsid="01e65964"/>
    </style:style>
    <style:style style:name="T285" style:family="text">
      <style:text-properties officeooo:rsid="01e7eefc"/>
    </style:style>
    <style:style style:name="T286" style:family="text">
      <style:text-properties officeooo:rsid="01eb2fbe"/>
    </style:style>
    <style:style style:name="T287" style:family="text">
      <style:text-properties officeooo:rsid="01ed265e"/>
    </style:style>
    <style:style style:name="T288" style:family="text">
      <style:text-properties officeooo:rsid="01eeca0c"/>
    </style:style>
    <style:style style:name="T289" style:family="text">
      <style:text-properties officeooo:rsid="01ef6a91"/>
    </style:style>
    <style:style style:name="T290" style:family="text">
      <style:text-properties officeooo:rsid="01f2e64c"/>
    </style:style>
    <style:style style:name="T291" style:family="text">
      <style:text-properties officeooo:rsid="01f724a5"/>
    </style:style>
    <style:style style:name="T292" style:family="text">
      <style:text-properties officeooo:rsid="01f8de69"/>
    </style:style>
    <style:style style:name="T293" style:family="text">
      <style:text-properties officeooo:rsid="01076d58"/>
    </style:style>
    <style:style style:name="T294" style:family="text">
      <style:text-properties officeooo:rsid="01f9ec1c"/>
    </style:style>
    <style:style style:name="T295" style:family="text">
      <style:text-properties officeooo:rsid="01f9f60c"/>
    </style:style>
    <style:style style:name="T296" style:family="text">
      <style:text-properties officeooo:rsid="01fabe1d"/>
    </style:style>
    <style:style style:name="T297" style:family="text">
      <style:text-properties officeooo:rsid="01fc4913"/>
    </style:style>
    <style:style style:name="T298" style:family="text">
      <style:text-properties officeooo:rsid="01fdcac1"/>
    </style:style>
    <style:style style:name="T299" style:family="text">
      <style:text-properties officeooo:rsid="02011d3d"/>
    </style:style>
    <style:style style:name="T300" style:family="text">
      <style:text-properties officeooo:rsid="01539785"/>
    </style:style>
    <style:style style:name="T301" style:family="text">
      <style:text-properties officeooo:rsid="02037047"/>
    </style:style>
    <style:style style:name="T302" style:family="text">
      <style:text-properties officeooo:rsid="02051d53"/>
    </style:style>
    <style:style style:name="T303" style:family="text">
      <style:text-properties officeooo:rsid="0206bfbf"/>
    </style:style>
    <style:style style:name="T304" style:family="text">
      <style:text-properties officeooo:rsid="02085f05"/>
    </style:style>
    <style:style style:name="T305" style:family="text">
      <style:text-properties officeooo:rsid="0209da56"/>
    </style:style>
    <style:style style:name="T306" style:family="text">
      <style:text-properties officeooo:rsid="0209f0cf"/>
    </style:style>
    <style:style style:name="T307" style:family="text">
      <style:text-properties officeooo:rsid="020b1c04"/>
    </style:style>
    <style:style style:name="T308" style:family="text">
      <style:text-properties officeooo:rsid="020bc993"/>
    </style:style>
    <style:style style:name="T309" style:family="text">
      <style:text-properties officeooo:rsid="020e2e35"/>
    </style:style>
    <style:style style:name="T310" style:family="text">
      <style:text-properties officeooo:rsid="020fbc60"/>
    </style:style>
    <style:style style:name="T311" style:family="text">
      <style:text-properties officeooo:rsid="021254a1"/>
    </style:style>
    <style:style style:name="T312" style:family="text">
      <style:text-properties officeooo:rsid="021416fd"/>
    </style:style>
    <style:style style:name="T313" style:family="text">
      <style:text-properties officeooo:rsid="02146a72"/>
    </style:style>
    <style:style style:name="T314" style:family="text">
      <style:text-properties officeooo:rsid="021512a5"/>
    </style:style>
    <style:style style:name="T315" style:family="text">
      <style:text-properties officeooo:rsid="02169bac"/>
    </style:style>
    <style:style style:name="T316" style:family="text">
      <style:text-properties officeooo:rsid="0216a2e5"/>
    </style:style>
    <style:style style:name="T317" style:family="text">
      <style:text-properties officeooo:rsid="0216e3ed"/>
    </style:style>
    <style:style style:name="T318" style:family="text">
      <style:text-properties officeooo:rsid="021917b0"/>
    </style:style>
    <style:style style:name="T319" style:family="text">
      <style:text-properties officeooo:rsid="021b176e"/>
    </style:style>
    <style:style style:name="T320" style:family="text">
      <style:text-properties officeooo:rsid="02174144"/>
    </style:style>
    <style:style style:name="T321" style:family="text">
      <style:text-properties officeooo:rsid="021ccea5"/>
    </style:style>
    <style:style style:name="T322" style:family="text">
      <style:text-properties officeooo:rsid="021d8c31"/>
    </style:style>
    <style:style style:name="T323" style:family="text">
      <style:text-properties officeooo:rsid="021e1bd5"/>
    </style:style>
    <style:style style:name="T324" style:family="text">
      <style:text-properties officeooo:rsid="021fdcfe"/>
    </style:style>
    <style:style style:name="T325" style:family="text">
      <style:text-properties officeooo:rsid="0220f28f"/>
    </style:style>
    <style:style style:name="T326" style:family="text">
      <style:text-properties officeooo:rsid="0222e820"/>
    </style:style>
    <style:style style:name="T327" style:family="text">
      <style:text-properties officeooo:rsid="0121f98e"/>
    </style:style>
    <style:style style:name="T328" style:family="text">
      <style:text-properties officeooo:rsid="022a432d"/>
    </style:style>
    <style:style style:name="T329" style:family="text">
      <style:text-properties officeooo:rsid="022d8458"/>
    </style:style>
    <style:style style:name="T330" style:family="text">
      <style:text-properties style:font-name="Liberation Sans" officeooo:rsid="022d8458"/>
    </style:style>
    <style:style style:name="T331" style:family="text">
      <style:text-properties style:font-name="Liberation Sans" officeooo:rsid="022f4b38"/>
    </style:style>
    <style:style style:name="T332" style:family="text">
      <style:text-properties style:font-name="Liberation Sans" fo:font-size="11pt" style:font-size-asian="11pt" style:font-size-complex="11pt"/>
    </style:style>
    <style:style style:name="T333" style:family="text">
      <style:text-properties officeooo:rsid="022f4b38"/>
    </style:style>
    <style:style style:name="T334" style:family="text">
      <style:text-properties officeooo:rsid="0231657f"/>
    </style:style>
    <style:style style:name="T335" style:family="text">
      <style:text-properties officeooo:rsid="023226ab"/>
    </style:style>
    <style:style style:name="T336" style:family="text">
      <style:text-properties officeooo:rsid="02326807"/>
    </style:style>
    <style:style style:name="T337" style:family="text">
      <style:text-properties officeooo:rsid="02329aeb"/>
    </style:style>
    <style:style style:name="T338" style:family="text">
      <style:text-properties officeooo:rsid="02345eab"/>
    </style:style>
    <style:style style:name="T339" style:family="text">
      <style:text-properties officeooo:rsid="0238ad9b"/>
    </style:style>
    <style:style style:name="T340" style:family="text">
      <style:text-properties officeooo:rsid="02361aaf"/>
    </style:style>
    <style:style style:name="T341" style:family="text">
      <style:text-properties officeooo:rsid="023df61b"/>
    </style:style>
    <style:style style:name="T342" style:family="text">
      <style:text-properties officeooo:rsid="023fbabc"/>
    </style:style>
    <style:style style:name="T343" style:family="text">
      <style:text-properties officeooo:rsid="0240b6bb"/>
    </style:style>
    <style:style style:name="T344" style:family="text">
      <style:text-properties officeooo:rsid="0240e1b6"/>
    </style:style>
    <style:style style:name="T345" style:family="text">
      <style:text-properties officeooo:rsid="0242ae0b"/>
    </style:style>
    <style:style style:name="T346" style:family="text">
      <style:text-properties officeooo:rsid="0243bb48"/>
    </style:style>
    <style:style style:name="T347" style:family="text">
      <style:text-properties officeooo:rsid="02444497"/>
    </style:style>
    <style:style style:name="T348" style:family="text">
      <style:text-properties officeooo:rsid="02498eda"/>
    </style:style>
    <style:style style:name="T349" style:family="text">
      <style:text-properties officeooo:rsid="024b551c"/>
    </style:style>
    <style:style style:name="T350" style:family="text">
      <style:text-properties officeooo:rsid="024bea25"/>
    </style:style>
    <style:style style:name="T351" style:family="text">
      <style:text-properties officeooo:rsid="024ce69e"/>
    </style:style>
    <style:style style:name="T352" style:family="text">
      <style:text-properties officeooo:rsid="024e858c"/>
    </style:style>
    <style:style style:name="T353" style:family="text">
      <style:text-properties officeooo:rsid="0250d175"/>
    </style:style>
    <style:style style:name="T354" style:family="text">
      <style:text-properties officeooo:rsid="0252bab6"/>
    </style:style>
    <style:style style:name="T355" style:family="text">
      <style:text-properties officeooo:rsid="025b6c2e"/>
    </style:style>
    <style:style style:name="T356" style:family="text">
      <style:text-properties officeooo:rsid="025d8cee"/>
    </style:style>
    <style:style style:name="T357" style:family="text">
      <style:text-properties officeooo:rsid="025466e3"/>
    </style:style>
    <style:style style:name="T358" style:family="text">
      <style:text-properties officeooo:rsid="02612a86"/>
    </style:style>
    <style:style style:name="T359" style:family="text">
      <style:text-properties officeooo:rsid="02626132"/>
    </style:style>
    <style:style style:name="T360" style:family="text">
      <style:text-properties officeooo:rsid="02644807"/>
    </style:style>
    <style:style style:name="T361" style:family="text">
      <style:text-properties officeooo:rsid="019b2f55"/>
    </style:style>
    <style:style style:name="T362" style:family="text">
      <style:text-properties officeooo:rsid="026af2cd"/>
    </style:style>
    <style:style style:name="T363" style:family="text">
      <style:text-properties officeooo:rsid="026cdb12"/>
    </style:style>
    <style:style style:name="T364" style:family="text">
      <style:text-properties officeooo:rsid="026eb1f1"/>
    </style:style>
    <style:style style:name="T365" style:family="text">
      <style:text-properties officeooo:rsid="027046d6"/>
    </style:style>
    <style:style style:name="T366" style:family="text">
      <style:text-properties officeooo:rsid="0271c8e9"/>
    </style:style>
    <style:style style:name="T367" style:family="text">
      <style:text-properties officeooo:rsid="0259f347"/>
    </style:style>
    <style:style style:name="T368"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369" style:family="text">
      <style:text-properties style:use-window-font-color="true" loext:opacity="0%" style:font-name="Liberation Sans2" fo:font-size="11pt" fo:language="en" fo:country="GB" officeooo:rsid="0271c8e9" style:font-name-asian="Times New Roman" style:font-size-asian="11pt" style:font-name-complex="CG Times" style:font-size-complex="10pt" style:language-complex="ar" style:country-complex="SA"/>
    </style:style>
    <style:style style:name="T370" style:family="text">
      <style:text-properties style:use-window-font-color="true" loext:opacity="0%" style:font-name="Liberation Sans2" fo:font-size="11pt" fo:language="en" fo:country="GB" officeooo:rsid="027bfcce" style:font-name-asian="Times New Roman" style:font-size-asian="11pt" style:font-name-complex="CG Times" style:font-size-complex="10pt" style:language-complex="ar" style:country-complex="SA"/>
    </style:style>
    <style:style style:name="T371" style:family="text">
      <style:text-properties style:use-window-font-color="true" loext:opacity="0%" style:font-name="Liberation Sans2" fo:font-size="11pt" fo:language="en" fo:country="GB" officeooo:rsid="027dd631" style:font-name-asian="Times New Roman" style:font-size-asian="11pt" style:font-name-complex="CG Times" style:font-size-complex="10pt" style:language-complex="ar" style:country-complex="SA"/>
    </style:style>
    <style:style style:name="T372" style:family="text">
      <style:text-properties style:use-window-font-color="true" loext:opacity="0%" style:font-name="Liberation Sans2" fo:font-size="11pt" fo:language="en" fo:country="GB" officeooo:rsid="02869b60" style:font-name-asian="Times New Roman" style:font-size-asian="11pt" style:font-name-complex="CG Times" style:font-size-complex="10pt" style:language-complex="ar" style:country-complex="SA"/>
    </style:style>
    <style:style style:name="T373" style:family="text">
      <style:text-properties style:use-window-font-color="true" loext:opacity="0%" style:font-name="Liberation Sans2" fo:font-size="11pt" fo:language="en" fo:country="GB" officeooo:rsid="028815de" style:font-name-asian="Times New Roman" style:font-size-asian="11pt" style:font-name-complex="CG Times" style:font-size-complex="10pt" style:language-complex="ar" style:country-complex="SA"/>
    </style:style>
    <style:style style:name="T374" style:family="text">
      <style:text-properties style:use-window-font-color="true" loext:opacity="0%" style:font-name="Liberation Mono1" fo:font-size="9pt" fo:language="en" fo:country="GB" officeooo:rsid="0276185a" style:font-name-asian="Times New Roman" style:font-size-asian="10.5pt" style:font-name-complex="CG Times" style:font-size-complex="10pt" style:language-complex="ar" style:country-complex="SA"/>
    </style:style>
    <style:style style:name="T375" style:family="text">
      <style:text-properties officeooo:rsid="0272b432"/>
    </style:style>
    <style:style style:name="T376" style:family="text">
      <style:text-properties officeooo:rsid="0186c76b"/>
    </style:style>
    <style:style style:name="T377" style:family="text">
      <style:text-properties officeooo:rsid="01838866"/>
    </style:style>
    <style:style style:name="T378" style:family="text">
      <style:text-properties officeooo:rsid="02780062"/>
    </style:style>
    <style:style style:name="T379" style:family="text">
      <style:text-properties officeooo:rsid="019e9baa"/>
    </style:style>
    <style:style style:name="T380" style:family="text">
      <style:text-properties fo:color="#000000" loext:opacity="100%" style:font-name="Liberation Sans2" fo:font-size="11pt" fo:language="en" fo:country="GB" officeooo:rsid="019e9baa" style:font-name-asian="Arial" style:font-size-asian="12pt" style:font-name-complex="CG Times" style:font-size-complex="10pt" style:language-complex="ar" style:country-complex="SA"/>
    </style:style>
    <style:style style:name="T381" style:family="text">
      <style:text-properties fo:color="#000000" loext:opacity="100%" style:font-name="Liberation Sans2" fo:font-size="11pt" fo:language="en" fo:country="GB" officeooo:rsid="02780062" style:font-name-asian="Arial" style:font-size-asian="12pt" style:font-name-complex="CG Times" style:font-size-complex="10pt" style:language-complex="ar" style:country-complex="SA"/>
    </style:style>
    <style:style style:name="T382" style:family="text">
      <style:text-properties fo:color="#000000" loext:opacity="100%" style:font-name="Liberation Sans2" fo:font-size="11pt" fo:language="en" fo:country="GB" officeooo:rsid="02821d5a" style:font-name-asian="Arial" style:font-size-asian="12pt" style:font-name-complex="CG Times" style:font-size-complex="10pt" style:language-complex="ar" style:country-complex="SA"/>
    </style:style>
    <style:style style:name="T383" style:family="text">
      <style:text-properties fo:color="#000000" loext:opacity="100%" style:font-name="Liberation Sans2" fo:font-size="11pt" fo:language="en" fo:country="GB" officeooo:rsid="02839d44" style:font-name-asian="Arial" style:font-size-asian="12pt" style:font-name-complex="CG Times" style:font-size-complex="10pt" style:language-complex="ar" style:country-complex="SA"/>
    </style:style>
    <style:style style:name="T384" style:family="text">
      <style:text-properties fo:color="#000000" loext:opacity="100%" style:font-name="Liberation Sans2" fo:font-size="11pt" fo:language="en" fo:country="GB" fo:font-style="normal" officeooo:rsid="027ff4f9" style:font-name-asian="Arial" style:font-size-asian="12pt" style:font-style-asian="normal" style:font-name-complex="CG Times" style:font-size-complex="10pt" style:language-complex="ar" style:country-complex="SA" style:font-style-complex="normal"/>
    </style:style>
    <style:style style:name="T385" style:family="text">
      <style:text-properties fo:color="#000000" loext:opacity="100%" style:font-name="Liberation Sans2" fo:font-size="11pt" fo:language="en" fo:country="GB" fo:font-style="normal" officeooo:rsid="02821d5a" style:font-name-asian="Arial" style:font-size-asian="12pt" style:font-style-asian="normal" style:font-name-complex="CG Times" style:font-size-complex="10pt" style:language-complex="ar" style:country-complex="SA" style:font-style-complex="normal"/>
    </style:style>
    <style:style style:name="T386" style:family="text">
      <style:text-properties officeooo:rsid="0278912b"/>
    </style:style>
    <style:style style:name="T387" style:family="text">
      <style:text-properties officeooo:rsid="0279e93f"/>
    </style:style>
    <style:style style:name="T388" style:family="text">
      <style:text-properties officeooo:rsid="027b536a"/>
    </style:style>
    <style:style style:name="T389" style:family="text">
      <style:text-properties officeooo:rsid="027bfcce"/>
    </style:style>
    <style:style style:name="T390" style:family="text">
      <style:text-properties officeooo:rsid="027dd631"/>
    </style:style>
    <style:style style:name="T391" style:family="text">
      <style:text-properties officeooo:rsid="027edc23"/>
    </style:style>
    <style:style style:name="T392" style:family="text">
      <style:text-properties officeooo:rsid="0008350d"/>
    </style:style>
    <style:style style:name="T393" style:family="text">
      <style:text-properties officeooo:rsid="000f37c3"/>
    </style:style>
    <style:style style:name="T394" style:family="text">
      <style:text-properties officeooo:rsid="00258136"/>
    </style:style>
    <style:style style:name="T395" style:family="text">
      <style:text-properties officeooo:rsid="000857f9"/>
    </style:style>
    <style:style style:name="T396" style:family="text">
      <style:text-properties officeooo:rsid="00096270"/>
    </style:style>
    <style:style style:name="T397" style:family="text">
      <style:text-properties officeooo:rsid="0025b3dc"/>
    </style:style>
    <style:style style:name="T398" style:family="text">
      <style:text-properties officeooo:rsid="000d7b2d"/>
    </style:style>
    <style:style style:name="T399" style:family="text">
      <style:text-properties officeooo:rsid="00163149"/>
    </style:style>
    <style:style style:name="T400" style:family="text">
      <style:text-properties officeooo:rsid="00282b24"/>
    </style:style>
    <style:style style:name="T401" style:family="text">
      <style:text-properties officeooo:rsid="0016370b"/>
    </style:style>
    <style:style style:name="T402" style:family="text">
      <style:text-properties officeooo:rsid="0018ee44"/>
    </style:style>
    <style:style style:name="T403" style:family="text">
      <style:text-properties officeooo:rsid="0028b199"/>
    </style:style>
    <style:style style:name="T404" style:family="text">
      <style:text-properties officeooo:rsid="0019a7f9"/>
    </style:style>
    <style:style style:name="T405" style:family="text">
      <style:text-properties officeooo:rsid="00298528"/>
    </style:style>
    <style:style style:name="T406" style:family="text">
      <style:text-properties officeooo:rsid="001ba169"/>
    </style:style>
    <style:style style:name="T407" style:family="text">
      <style:text-properties officeooo:rsid="0017c3a5"/>
    </style:style>
    <style:style style:name="T408" style:family="text">
      <style:text-properties officeooo:rsid="0017c83d"/>
    </style:style>
    <style:style style:name="T409" style:family="text">
      <style:text-properties officeooo:rsid="001820b1"/>
    </style:style>
    <style:style style:name="T410" style:family="text">
      <style:text-properties officeooo:rsid="002b264b"/>
    </style:style>
    <style:style style:name="T411" style:family="text">
      <style:text-properties officeooo:rsid="001cd093"/>
    </style:style>
    <style:style style:name="T412" style:family="text">
      <style:text-properties officeooo:rsid="002b682e"/>
    </style:style>
    <style:style style:name="T413" style:family="text">
      <style:text-properties officeooo:rsid="002c66bb"/>
    </style:style>
    <style:style style:name="T414" style:family="text">
      <style:text-properties officeooo:rsid="0021d45f"/>
    </style:style>
    <style:style style:name="T415" style:family="text">
      <style:text-properties officeooo:rsid="0021176c"/>
    </style:style>
    <style:style style:name="T416" style:family="text">
      <style:text-properties officeooo:rsid="0023d2cc"/>
    </style:style>
    <style:style style:name="T417" style:family="text">
      <style:text-properties officeooo:rsid="002ee441"/>
    </style:style>
    <style:style style:name="T418" style:family="text">
      <style:text-properties officeooo:rsid="002f8143"/>
    </style:style>
    <style:style style:name="T419" style:family="text">
      <style:text-properties officeooo:rsid="0037bd01"/>
    </style:style>
    <style:style style:name="T420" style:family="text">
      <style:text-properties officeooo:rsid="00333b79"/>
    </style:style>
    <style:style style:name="T421" style:family="text">
      <style:text-properties officeooo:rsid="0030faf7"/>
    </style:style>
    <style:style style:name="T422" style:family="text">
      <style:text-properties officeooo:rsid="0034bf5f"/>
    </style:style>
    <style:style style:name="T423" style:family="text">
      <style:text-properties officeooo:rsid="00360856"/>
    </style:style>
    <style:style style:name="T424" style:family="text">
      <style:text-properties officeooo:rsid="00114cb0"/>
    </style:style>
    <style:style style:name="T425" style:family="text">
      <style:text-properties officeooo:rsid="0012db39"/>
    </style:style>
    <style:style style:name="T426" style:family="text">
      <style:text-properties officeooo:rsid="027ff4f9"/>
    </style:style>
    <style:style style:name="T427" style:family="text">
      <style:text-properties officeooo:rsid="02821d5a"/>
    </style:style>
    <style:style style:name="T428" style:family="text">
      <style:text-properties officeooo:rsid="02839d44"/>
    </style:style>
    <style:style style:name="T429" style:family="text">
      <style:text-properties officeooo:rsid="0285478b"/>
    </style:style>
    <style:style style:name="T430" style:family="text">
      <style:text-properties officeooo:rsid="02869b60"/>
    </style:style>
    <style:style style:name="T431" style:family="text">
      <style:text-properties officeooo:rsid="028815de"/>
    </style:style>
    <style:style style:name="T432" style:family="text">
      <style:text-properties officeooo:rsid="028b0022"/>
    </style:style>
    <style:style style:name="T433" style:family="text">
      <style:text-properties officeooo:rsid="028bbdb6"/>
    </style:style>
    <style:style style:name="T434" style:family="text">
      <style:text-properties officeooo:rsid="028ef2b2"/>
    </style:style>
    <style:style style:name="T435" style:family="text">
      <style:text-properties officeooo:rsid="028fd785"/>
    </style:style>
    <style:style style:name="T436" style:family="text">
      <style:text-properties officeooo:rsid="02909ff9"/>
    </style:style>
    <style:style style:name="T437" style:family="text">
      <style:text-properties officeooo:rsid="0291d4eb"/>
    </style:style>
    <style:style style:name="T438" style:family="text">
      <style:text-properties style:font-name="Liberation San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content" style:horizontal-pos="from-left" style:horizontal-rel="pag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311in" draw:visible-area-height="1.2343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7"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980"><draw:frame draw:style-name="fr8" draw:name="Frame3" text:anchor-type="paragraph" svg:x="5.011in" svg:y="0.0008in" draw:z-index="1"><draw:text-box fo:min-height="0.1457in" fo:min-width="0.0161in"><text:p text:style-name="P31"><text:bookmark text:name="_1229237248"/></text:p></draw:text-box></draw:frame></text:p>
      <text:p text:style-name="P29"><draw:frame draw:style-name="fr7" draw:name="Frame1" text:anchor-type="paragraph" svg:x="0.0327in" svg:y="1.9in" svg:width="6.5055in" svg:height="4.45in" draw:z-index="2"><draw:text-box><text:p text:style-name="P383">MWA Software</text:p><text:p text:style-name="P21"><text:span text:style-name="T3"><text:line-break/></text:span><text:span text:style-name="T6">IBX for Lazarus</text:span><text:span text:style-name="T5"><text:line-break/></text:span><text:span text:style-name="T7">User </text:span><text:span text:style-name="T5">Guide</text:span></text:p><text:p text:style-name="P9"/><text:p text:style-name="P9"><text:subject/></text:p><text:p text:style-name="P30"><text:span text:style-name="T2"><text:user-defined style:data-style-name="N0" text:name="IssueNo">Issue 1.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120">06 May 2026</text:modification-date></text:span></text:p></draw:text-box></draw:frame><draw:frame draw:style-name="fr6" draw:name="Frame2" text:anchor-type="paragraph" svg:y="8.6602in" svg:width="6.5173in" svg:height="1.0681in" draw:z-index="0"><draw:text-box><text:p text:style-name="P12"><text:user-defined style:data-style-name="N0" text:name="IssueNo">Issue 1.16</text:user-defined>, </text:p><text:p text:style-name="P12"><text:date style:data-style-name="N41" text:date-value="2026-05-06T10:07:49.388981536">6 May 2026</text:date></text:p><text:p text:style-name="P10"/><text:p text:style-name="P10"><text:user-defined style:data-style-name="N0" text:name="Company">McCallum Whyman Associates Ltd</text:user-defined></text:p><text:p text:style-name="P11"/><text:p text:style-name="P10">EMail: info@ mccallumwhyman.com, http://www.mccallumwhyman.com</text:p></draw:text-box></draw:frame></text:p>
      <text:p text:style-name="P981"/>
      <text:p text:style-name="P5"/>
      <text:p text:style-name="P5"/>
      <text:p text:style-name="P5"/>
      <text:p text:style-name="P5"/>
      <text:p text:style-name="P5"/>
      <text:p text:style-name="P5"/>
      <text:p text:style-name="P5"/>
      <text:p text:style-name="P5"/>
      <text:p text:style-name="P13">COPYRIGHT</text:p>
      <text:p text:style-name="P14"/>
      <text:p text:style-name="P4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9">2016</text:creation-date></text:span><text:span text:style-name="T2"> </text:span><text:span text:style-name="T10">to </text:span><text:span text:style-name="T10"><text:date style:data-style-name="N119" text:date-value="2026-05-06T10:07:49.404625310">2026</text:date></text:span><text:span text:style-name="T2">) </text:span><text:span text:style-name="T8"><text:line-break/>trading as MWA Software.</text:span></text:p>
      <text:p text:style-name="P2"/>
      <text:p text:style-name="P3">Disclaimer</text:p>
      <text:p text:style-name="P2"/>
      <text:p text:style-name="P6"><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08"><text:span text:style-name="T2">CONTENTS<text:tab/></text:span><text:span text:style-name="T11">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09">1 <text:s/>Introduction<text:tab/>1</text:p>
          <text:p text:style-name="P810">1.1 <text:s/>References<text:tab/>2</text:p>
          <text:p text:style-name="P810">1.2 <text:s/>Change History<text:tab/>2</text:p>
          <text:p text:style-name="P811">1.2.1 <text:s/>Version 1.1<text:tab/>2</text:p>
          <text:p text:style-name="P811">1.2.2 <text:s/>Version 1.2<text:tab/>2</text:p>
          <text:p text:style-name="P811">1.2.3 <text:s/>Version 1.3<text:tab/>2</text:p>
          <text:p text:style-name="P811">1.2.4 <text:s/>Version 1.4<text:tab/>3</text:p>
          <text:p text:style-name="P811">1.2.5 <text:s/>Version 1.5<text:tab/>3</text:p>
          <text:p text:style-name="P811">1.2.6 <text:s/>Version 1.6<text:tab/>4</text:p>
          <text:p text:style-name="P811">1.2.7 <text:s/>Version 1.7<text:tab/>4</text:p>
          <text:p text:style-name="P811">1.2.8 <text:s/>Version 1.8<text:tab/>4</text:p>
          <text:p text:style-name="P811">1.2.9 <text:s/>Version 1.9<text:tab/>5</text:p>
          <text:p text:style-name="P811">1.2.10 <text:s/>Version 1.10<text:tab/>5</text:p>
          <text:p text:style-name="P811">1.2.11 <text:s/>Version 1.11<text:tab/>5</text:p>
          <text:p text:style-name="P811">1.2.12 <text:s/>Version 1.12<text:tab/>5</text:p>
          <text:p text:style-name="P811">1.2.13 <text:s/>Version 1.13<text:tab/>5</text:p>
          <text:p text:style-name="P811">1.2.14 <text:s/>Version 1.14<text:tab/>6</text:p>
          <text:p text:style-name="P811">1.2.15 <text:s/>Version 1.15<text:tab/>6</text:p>
          <text:p text:style-name="P811">1.2.16 <text:s/>Version 1.16<text:tab/>6</text:p>
          <text:p text:style-name="P809">2 <text:s/>Installation and Preparation for Use<text:tab/>7</text:p>
          <text:p text:style-name="P810">2.1 <text:s/>Minimum Requirements<text:tab/>7</text:p>
          <text:p text:style-name="P810">2.2 <text:s/>Installation under Lazarus<text:tab/>7</text:p>
          <text:p text:style-name="P810">2.3 <text:s/>Console Mode IBX<text:tab/>8</text:p>
          <text:p text:style-name="P810">2.4 <text:s/>Multi-threading Support<text:tab/>8</text:p>
          <text:p text:style-name="P810">2.5 <text:s/>Installing Firebird<text:tab/>9</text:p>
          <text:p text:style-name="P810">2.6 <text:s/>Upgrading from IBX 1.x<text:tab/>9</text:p>
          <text:p text:style-name="P810">2.7 <text:s/>New Features with IBX2<text:tab/>11</text:p>
          <text:p text:style-name="P810">2.8 <text:s/>Uninstalling IBX<text:tab/>11</text:p>
          <text:p text:style-name="P809">3 <text:s/>An Introduction to Databases, SQL and Firebird<text:tab/>13</text:p>
          <text:p text:style-name="P810">3.1 <text:s/>What is a Database?<text:tab/>13</text:p>
          <text:p text:style-name="P811">3.1.1 <text:s/>In the Beginning<text:tab/>13</text:p>
          <text:p text:style-name="P811">3.1.2 <text:s/>The Arrival of Random Access Storage<text:tab/>14</text:p>
          <text:p text:style-name="P811">3.1.3 <text:s/>Indexes<text:tab/>14</text:p>
          <text:p text:style-name="P811">3.1.4 <text:s/>Multiple Indexes and Datasets<text:tab/>14</text:p>
          <text:p text:style-name="P811">3.1.5 <text:s/>The Need for Middleware<text:tab/>15</text:p>
          <text:p text:style-name="P811">3.1.6 <text:s/>Enter the RDBMS<text:tab/>15</text:p>
          <text:p text:style-name="P811">3.1.7 <text:s/>Multi-user Access<text:tab/>15</text:p>
          <text:p text:style-name="P810">3.2 <text:s/>The Structured Query Language (SQL)<text:tab/>16</text:p>
          <text:p text:style-name="P810">3.3 <text:s/>The Firebird RDBMS<text:tab/>17</text:p>
          <text:p text:style-name="P810">3.4 <text:s/>And then there was IBX<text:tab/>18</text:p>
          <text:p text:style-name="P809">4 <text:s/>IBX Overview<text:tab/>21</text:p>
          <text:p text:style-name="P810">4.1 <text:s/>Conversion From Delphi IBX<text:tab/>21</text:p>
          <text:p text:style-name="P810">4.2 <text:s/>IBX in Context<text:tab/>22</text:p>
          <text:p text:style-name="P810">4.3 <text:s/>IBX Lazarus Packages<text:tab/>22</text:p>
          <text:p text:style-name="P810">4.4 <text:s/>Component Overview<text:tab/>23</text:p>
          <text:p text:style-name="P810">4.5 <text:s/>Databases and Transactions<text:tab/>26</text:p>
          <text:p text:style-name="P810">4.6 <text:s/>Datasets<text:tab/>27</text:p>
          <text:p text:style-name="P811">4.6.1 <text:s/>Datasets and Transactions<text:tab/>27</text:p>
          <text:p text:style-name="P811">4.6.2 <text:s/>Single Table Datasets<text:tab/>28</text:p>
          <text:p text:style-name="P811">4.6.3 <text:s/>SQL Defined Datasets<text:tab/>28</text:p>
          <text:p text:style-name="P810">4.7 <text:s/>Examples<text:tab/>29</text:p>
          <text:p text:style-name="P809">5 <text:s/>The Database Access Components<text:tab/>31</text:p>
          <text:p text:style-name="P810">5.1 <text:s/>TIBDatabase<text:tab/>31</text:p>
          <text:p text:style-name="P811">5.1.1 <text:s/><text:span text:style-name="T82">Highlighted</text:span><text:span text:style-name="T82"> Properties</text:span><text:tab/>31</text:p>
          <text:p text:style-name="P811">5.1.2 <text:s/>DatabaseName Macros<text:tab/>33</text:p>
          <text:p text:style-name="P811">5.1.3 <text:s/>Parameter Keywords<text:tab/>34</text:p>
          <text:p text:style-name="P811"><text:soft-page-break/>5.1.4 <text:s/>Highlighted Events<text:tab/>34</text:p>
          <text:p text:style-name="P811">5.1.5 <text:s/>Connecting to a Database<text:tab/>34</text:p>
          <text:p text:style-name="P811">5.1.6 <text:s/>Database Disconnect<text:tab/>35</text:p>
          <text:p text:style-name="P811">5.1.7 <text:s/>Reconnecting<text:tab/>35</text:p>
          <text:p text:style-name="P811">5.1.8 <text:s/>Creating a new Database<text:tab/>35</text:p>
          <text:p text:style-name="P811">5.1.9 <text:s/>Dropping a Database<text:tab/>36</text:p>
          <text:p text:style-name="P811">5.1.10 <text:s/>Using the Attachment Interface<text:tab/>36</text:p>
          <text:p text:style-name="P811">5.1.11 <text:s/>Using the AllowStreamConnected Property<text:tab/>36</text:p>
          <text:p text:style-name="P811">5.1.12 <text:s/>Using a Firebird DLL or Shared Object Library in a non-default Location<text:tab/>37</text:p>
          <text:p text:style-name="P810">5.2 <text:s/>TIBTransaction<text:tab/>37</text:p>
          <text:p text:style-name="P811">5.2.1 <text:s/>Highlighted Properties<text:tab/>38</text:p>
          <text:p text:style-name="P811">5.2.2 <text:s/>Events<text:tab/>38</text:p>
          <text:p text:style-name="P811">5.2.3 <text:s/>Transactions and Databases<text:tab/>39</text:p>
          <text:p text:style-name="P811">5.2.4 <text:s/>Starting a Transaction<text:tab/>39</text:p>
          <text:p text:style-name="P811">5.2.5 <text:s/>Transaction Parameters<text:tab/>39</text:p>
          <text:p text:style-name="P811">5.2.6 <text:s/>The Transaction Editor<text:tab/>41</text:p>
          <text:p text:style-name="P811">5.2.7 <text:s/>Closing a Transaction<text:tab/>42</text:p>
          <text:p text:style-name="P811">5.2.8 <text:s/>Retaining Transaction State after Closure<text:tab/>42</text:p>
          <text:p text:style-name="P810">5.3 <text:s/>TIBEvent<text:tab/>43</text:p>
          <text:p text:style-name="P811">5.3.1 <text:s/>Highlighted Properties<text:tab/>43</text:p>
          <text:p text:style-name="P811">5.3.2 <text:s/>Events<text:tab/>43</text:p>
          <text:p text:style-name="P811">5.3.3 <text:s/>Using Events<text:tab/>43</text:p>
          <text:p text:style-name="P811">5.3.4 <text:s/>Event Handling and Multithreaded Applications<text:tab/>44</text:p>
          <text:p text:style-name="P810">5.4 <text:s/>TIBSQL<text:tab/>44</text:p>
          <text:p text:style-name="P811">5.4.1 <text:s/>Highlighted Published Properties<text:tab/>44</text:p>
          <text:p text:style-name="P811">5.4.2 <text:s/>Using TIBSQL<text:tab/>45</text:p>
          <text:p text:style-name="P812">5.4.2.1 Executing a Stored Procedure<text:tab/>45</text:p>
          <text:p text:style-name="P812">5.4.2.2 A Stored Procedure that returns Output<text:tab/>46</text:p>
          <text:p text:style-name="P812">5.4.2.3 Executing a Select Statement<text:tab/>46</text:p>
          <text:p text:style-name="P812">5.4.2.4 Batched Queries<text:tab/>47</text:p>
          <text:p text:style-name="P811">5.4.3 <text:s/>The TIBSQL SQL Property Editor<text:tab/>47</text:p>
          <text:p text:style-name="P811">5.4.4 <text:s/>Scrollable Cursors<text:tab/>50</text:p>
          <text:p text:style-name="P809">6 <text:s/>The DataSet Components<text:tab/>51</text:p>
          <text:p text:style-name="P810">6.1 <text:s/>IBX Datasets<text:tab/>51</text:p>
          <text:p text:style-name="P810">6.2 <text:s/>Common Concepts<text:tab/>52</text:p>
          <text:p text:style-name="P811">6.2.1 <text:s/>Common Properties<text:tab/>52</text:p>
          <text:p text:style-name="P811">6.2.2 <text:s/>Common Events<text:tab/>53</text:p>
          <text:p text:style-name="P811">6.2.3 <text:s/>Exception Handling<text:tab/>55</text:p>
          <text:p text:style-name="P811">6.2.4 <text:s/>Character Sets and Code Pages<text:tab/>55</text:p>
          <text:p text:style-name="P810">6.3 <text:s/>TIBTable<text:tab/>55</text:p>
          <text:p text:style-name="P811">6.3.1 <text:s/>Highlighted Properties<text:tab/>55</text:p>
          <text:p text:style-name="P811">6.3.2 <text:s/>Using TIBTable<text:tab/>56</text:p>
          <text:p text:style-name="P812">6.3.2.1 Master/Detail Tables<text:tab/>56</text:p>
          <text:p text:style-name="P812">6.3.2.2 Filtered Datasets<text:tab/>57</text:p>
          <text:p text:style-name="P810">6.4 <text:s/>TIBStoredProc<text:tab/>58</text:p>
          <text:p text:style-name="P811">6.4.1 <text:s/>Highlighted Properties<text:tab/>58</text:p>
          <text:p text:style-name="P811">6.4.2 <text:s/>Using TIBStoredProc<text:tab/>59</text:p>
          <text:p text:style-name="P810">6.5 <text:s/>TIBQuery<text:tab/>60</text:p>
          <text:p text:style-name="P811">6.5.1 <text:s/>Highlighted Properties<text:tab/>60</text:p>
          <text:p text:style-name="P811">6.5.2 <text:s/>Using TIBQuery<text:tab/>61</text:p>
          <text:p text:style-name="P811">6.5.3 <text:s/>The Select SQL Property Editor<text:tab/>61</text:p>
          <text:p text:style-name="P811">6.5.4 <text:s/>Parameterised Queries<text:tab/>63</text:p>
          <text:p text:style-name="P811">6.5.5 <text:s/>Filters<text:tab/>64</text:p>
          <text:p text:style-name="P810">6.6 <text:s/>Update Objects<text:tab/>64</text:p>
          <text:p text:style-name="P811">6.6.1 <text:s/>TIBUpdateSQL<text:tab/>64</text:p>
          <text:p text:style-name="P812">6.6.1.1 Highlighted Properties<text:tab/>65</text:p>
          <text:p text:style-name="P812">6.6.1.2 SQL Syntax for Update Object Queries<text:tab/>65</text:p>
          <text:p text:style-name="P812">6.6.1.3 OLD and NEW Parameters<text:tab/>66</text:p>
          <text:p text:style-name="P812">6.6.1.4 Insert and Update Returning Clauses<text:tab/>67</text:p>
          <text:p text:style-name="P812">6.6.1.5 Delete Returning Clauses<text:tab/>67</text:p>
          <text:p text:style-name="P812">6.6.1.6 Using Stored Procedures for Insert, Update or Delete<text:tab/>68</text:p>
          <text:p text:style-name="P811"><text:soft-page-break/>6.6.2 <text:s/>TIBUpdate<text:tab/>68</text:p>
          <text:p text:style-name="P812">6.6.2.1 Highlighted Properties<text:tab/>68</text:p>
          <text:p text:style-name="P811">6.6.3 <text:s/>Generators<text:tab/>69</text:p>
          <text:p text:style-name="P811">6.6.4 <text:s/>Updating Datasets<text:tab/>69</text:p>
          <text:p text:style-name="P811">6.6.5 <text:s/>Automatic Posting<text:tab/>70</text:p>
          <text:p text:style-name="P811">6.6.6 <text:s/>The OnValidatePost Event<text:tab/>70</text:p>
          <text:p text:style-name="P811">6.6.7 <text:s/>Cached Updates<text:tab/>71</text:p>
          <text:p text:style-name="P812">6.6.7.1 Cached Updates using OnUpdateRecord<text:tab/>71</text:p>
          <text:p text:style-name="P812">6.6.7.2 The OnUpdateError Event<text:tab/>72</text:p>
          <text:p text:style-name="P811">6.6.8 <text:s/>Identity Columns<text:tab/>72</text:p>
          <text:p text:style-name="P811">6.6.9 <text:s/>Row Refresh<text:tab/>73</text:p>
          <text:p text:style-name="P810">6.7 <text:s/>TIBDataSet<text:tab/>74</text:p>
          <text:p text:style-name="P811">6.7.1 <text:s/>Highlighted Properties<text:tab/>74</text:p>
          <text:p text:style-name="P810">6.8 <text:s/>Dataset Fields<text:tab/>75</text:p>
          <text:p text:style-name="P811">6.8.1 <text:s/>FieldDefs<text:tab/>75</text:p>
          <text:p text:style-name="P811">6.8.2 <text:s/>Field Subclasses<text:tab/>76</text:p>
          <text:p text:style-name="P811">6.8.3 <text:s/>IBX Fields<text:tab/>77</text:p>
          <text:p text:style-name="P812">6.8.3.1 TIBBCDField, TIBSmallintField, TIBIntegerField and TIBLargeIntField<text:tab/>77</text:p>
          <text:p text:style-name="P812">6.8.3.2 TIBStringField<text:tab/>77</text:p>
          <text:p text:style-name="P812">6.8.3.3 TIBMemoField<text:tab/>77</text:p>
          <text:p text:style-name="P812">6.8.3.4 TIBArrayField<text:tab/>78</text:p>
          <text:p text:style-name="P812">6.8.3.5 TIBDateTimeField<text:tab/>78</text:p>
          <text:p text:style-name="P812">6.8.3.6 TIBTimeField<text:tab/>79</text:p>
          <text:p text:style-name="P810">6.9 <text:s/>Query Statistics<text:tab/>79</text:p>
          <text:p text:style-name="P811">6.9.1 <text:s/>Select Query Statistics<text:tab/>79</text:p>
          <text:p text:style-name="P811">6.9.2 <text:s/>Insert, Update and Delete Query Statistics<text:tab/>80</text:p>
          <text:p text:style-name="P811">6.9.3 <text:s/>GetRowsAffected for Select Queries<text:tab/>80</text:p>
          <text:p text:style-name="P810">6.10 <text:s/>User Permissions<text:tab/>80</text:p>
          <text:p text:style-name="P809">7 <text:s/>IBX Support Components<text:tab/>83</text:p>
          <text:p text:style-name="P810">7.1 <text:s/>The IBX Script Engine<text:tab/>83</text:p>
          <text:p text:style-name="P811">7.1.1 <text:s/>Properties:<text:tab/>84</text:p>
          <text:p text:style-name="P811">7.1.2 <text:s/>Events:<text:tab/>85</text:p>
          <text:p text:style-name="P811">7.1.3 <text:s/>Usage<text:tab/>85</text:p>
          <text:p text:style-name="P811">7.1.4 <text:s/>Processing a Create Database Statement<text:tab/>85</text:p>
          <text:p text:style-name="P811">7.1.5 <text:s/>Examples<text:tab/>86</text:p>
          <text:p text:style-name="P812">7.1.5.1 The Script Engine Example<text:tab/>86</text:p>
          <text:p text:style-name="P811">7.1.6 <text:s/>The fbsql Console Mode Application<text:tab/>87</text:p>
          <text:p text:style-name="P810">7.2 <text:s/>The Data Output Formatters<text:tab/>89</text:p>
          <text:p text:style-name="P811">7.2.1 <text:s/>Usage<text:tab/>89</text:p>
          <text:p text:style-name="P811">7.2.2 <text:s/>Properties<text:tab/>90</text:p>
          <text:p text:style-name="P811">7.2.3 <text:s/>Events<text:tab/>91</text:p>
          <text:p text:style-name="P810">7.3 <text:s/>The SQL Parser<text:tab/>91</text:p>
          <text:p text:style-name="P811">7.3.1 <text:s/>The Parser<text:tab/>91</text:p>
          <text:p text:style-name="P811">7.3.2 <text:s/>Use with IBControls<text:tab/>93</text:p>
          <text:p text:style-name="P811">7.3.3 <text:s/>Example<text:tab/>93</text:p>
          <text:p text:style-name="P811">7.3.4 <text:s/>TSelectSQLParser Reference<text:tab/>94</text:p>
          <text:p text:style-name="P810">7.4 <text:s/>ISQL Monitor<text:tab/>95</text:p>
          <text:p text:style-name="P811">7.4.1 <text:s/>TIBISQLMonitor<text:tab/>95</text:p>
          <text:p text:style-name="P812">7.4.1.1 Selecting what to monitor<text:tab/>95</text:p>
          <text:p text:style-name="P812">7.4.1.2 SQL Reports<text:tab/>95</text:p>
          <text:p text:style-name="P812">7.4.1.3 Application Monitoring<text:tab/>95</text:p>
          <text:p text:style-name="P811">7.4.2 <text:s/>Examples<text:tab/>96</text:p>
          <text:p text:style-name="P812">7.4.2.1 Integrated Monitoring<text:tab/>96</text:p>
          <text:p text:style-name="P812">7.4.2.2 Remote Monitoring<text:tab/>96</text:p>
          <text:p text:style-name="P810">7.5 <text:s/>TIBDatabaseInfo<text:tab/>96</text:p>
          <text:p text:style-name="P811">7.5.1 <text:s/>Per Table Counts<text:tab/>98</text:p>
          <text:p text:style-name="P810">7.6 <text:s/>TIBExtract<text:tab/>98</text:p>
          <text:p text:style-name="P811">7.6.1 <text:s/>Properties<text:tab/>98</text:p>
          <text:p text:style-name="P811">7.6.2 <text:s/>Usage<text:tab/>99</text:p>
          <text:p text:style-name="P811">7.6.3 <text:s/>Listing Database Objects<text:tab/>102</text:p>
          <text:p text:style-name="P811">7.6.4 <text:s/>Extract of Binary Blobs<text:tab/>102</text:p>
          <text:p text:style-name="P811"><text:soft-page-break/>7.6.5 <text:s/>Extract of Array Data<text:tab/>103</text:p>
          <text:p text:style-name="P810">7.7 <text:s/>TIBJournal<text:tab/>104</text:p>
          <text:p text:style-name="P811">7.7.1 <text:s/>Properties<text:tab/>104</text:p>
          <text:p text:style-name="P811">7.7.2 <text:s/>Events<text:tab/>104</text:p>
          <text:p text:style-name="P811">7.7.3 <text:s/>Usage<text:tab/>105</text:p>
          <text:p text:style-name="P811">7.7.4 <text:s/>Playback<text:tab/>105</text:p>
          <text:p text:style-name="P812">7.7.4.1 Generators<text:tab/>105</text:p>
          <text:p text:style-name="P811">7.7.5 <text:s/>Playback in a Client Program<text:tab/>105</text:p>
          <text:p text:style-name="P809">8 <text:s/>Using Firebird Blobs<text:tab/>107</text:p>
          <text:p text:style-name="P810">8.1 <text:s/>Blob Types<text:tab/>107</text:p>
          <text:p text:style-name="P811">8.1.1 <text:s/>Text Mode Blobs<text:tab/>107</text:p>
          <text:p text:style-name="P811">8.1.2 <text:s/>Binary Blobs<text:tab/>108</text:p>
          <text:p text:style-name="P810">8.2 <text:s/>Stream Mode access to Blobs<text:tab/>108</text:p>
          <text:p text:style-name="P809">9 <text:s/>Using Firebird Arrays<text:tab/>109</text:p>
          <text:p text:style-name="P810">9.1 <text:s/>Defining an Array Element<text:tab/>109</text:p>
          <text:p text:style-name="P810">9.2 <text:s/>TIBArrayField<text:tab/>110</text:p>
          <text:p text:style-name="P809">10 <text:s/>Using Firebird Services<text:tab/>111</text:p>
          <text:p text:style-name="P810">10.1 <text:s/>Introducing the new IBX Services Components<text:tab/>111</text:p>
          <text:p text:style-name="P810">10.2 <text:s/>Firebird Admin Component Overview<text:tab/>112</text:p>
          <text:p text:style-name="P810">10.3 <text:s/>Common Concepts<text:tab/>113</text:p>
          <text:p text:style-name="P811">10.3.1 <text:s/>Common Reporting and Event Handling<text:tab/>114</text:p>
          <text:p text:style-name="P810">10.4 <text:s/>The TIBXServicesConnection<text:tab/>114</text:p>
          <text:p text:style-name="P811">10.4.1 <text:s/>Properties<text:tab/>114</text:p>
          <text:p text:style-name="P811">10.4.2 <text:s/>Event handling<text:tab/>115</text:p>
          <text:p text:style-name="P811">10.4.3 <text:s/>Connecting to the Services Manager<text:tab/>116</text:p>
          <text:p text:style-name="P810">10.5 <text:s/>The Backup Service<text:tab/>117</text:p>
          <text:p text:style-name="P811">10.5.1 <text:s/>Server Side Backup<text:tab/>118</text:p>
          <text:p text:style-name="P811">10.5.2 <text:s/>Client Side Backup<text:tab/>118</text:p>
          <text:p text:style-name="P810">10.6 <text:s/>The Restore Service<text:tab/>118</text:p>
          <text:p text:style-name="P811">10.6.1 <text:s/>Server Side Restores<text:tab/>119</text:p>
          <text:p text:style-name="P811">10.6.2 <text:s/>Client Side Restores<text:tab/>119</text:p>
          <text:p text:style-name="P810">10.7 <text:s/>The Configuration Services<text:tab/>119</text:p>
          <text:p text:style-name="P810">10.8 <text:s/>The Server Properties Service<text:tab/>120</text:p>
          <text:p text:style-name="P810">10.9 <text:s/>The Log Service<text:tab/>121</text:p>
          <text:p text:style-name="P810">10.10 <text:s/>The Database Statistics Services<text:tab/>121</text:p>
          <text:p text:style-name="P810">10.11 <text:s/>The Security Service<text:tab/>122</text:p>
          <text:p text:style-name="P811">10.11.1 <text:s/>Listing all User Names<text:tab/>122</text:p>
          <text:p text:style-name="P811">10.11.2 <text:s/>Adding a User<text:tab/>123</text:p>
          <text:p text:style-name="P811">10.11.3 <text:s/>Updating User Details<text:tab/>123</text:p>
          <text:p text:style-name="P811">10.11.4 <text:s/>Deleting a User<text:tab/>124</text:p>
          <text:p text:style-name="P811">10.11.5 <text:s/>Setting the Auto Admin State<text:tab/>124</text:p>
          <text:p text:style-name="P810">10.12 <text:s/>The User List DataSet<text:tab/>124</text:p>
          <text:p text:style-name="P810">10.13 <text:s/>The Validation Service<text:tab/>125</text:p>
          <text:p text:style-name="P810">10.14 <text:s/>The Online Validation Service<text:tab/>126</text:p>
          <text:p text:style-name="P811">10.14.1 <text:s/>Properties<text:tab/>127</text:p>
          <text:p text:style-name="P810">10.15 <text:s/>The Limbo Transaction Resolution Service<text:tab/>127</text:p>
          <text:p text:style-name="P811">10.15.1 <text:s/>Listing the In Limbo Transactions<text:tab/>128</text:p>
          <text:p text:style-name="P811">10.15.2 <text:s/>Fixing the In Limbo Transactions<text:tab/>129</text:p>
          <text:p text:style-name="P810">10.16 <text:s/>The Limbo Transaction List Dataset<text:tab/>129</text:p>
          <text:p text:style-name="P809">11 <text:s/>Personal Databases<text:tab/>131</text:p>
          <text:p text:style-name="P810">11.1 <text:s/>TIBLocalDBSupport<text:tab/>131</text:p>
          <text:p text:style-name="P811">11.1.1 <text:s/>Properties<text:tab/>132</text:p>
          <text:p text:style-name="P811">11.1.2 <text:s/>Events:<text:tab/>133</text:p>
          <text:p text:style-name="P811">11.1.3 <text:s/>Shared Data Directory<text:tab/>133</text:p>
          <text:p text:style-name="P811">11.1.4 <text:s/>DatabaseName, and login parameters management<text:tab/>134</text:p>
          <text:p text:style-name="P811">11.1.5 <text:s/>Database Initialisation<text:tab/>134</text:p>
          <text:p text:style-name="P811">11.1.6 <text:s/>Saving the Current Database<text:tab/>135</text:p>
          <text:p text:style-name="P811">11.1.7 <text:s/>Restoring the Database from an Archive<text:tab/>135</text:p>
          <text:p text:style-name="P811"><text:soft-page-break/>11.1.8 <text:s/>Database Schema Upgrade<text:tab/>135</text:p>
          <text:p text:style-name="P810">11.2 <text:s/>Local EmployeeDB Example<text:tab/>137</text:p>
          <text:p text:style-name="P811">11.2.1 <text:s/>Running the application<text:tab/>137</text:p>
          <text:p text:style-name="P811">11.2.2 <text:s/>Console Mode<text:tab/>137</text:p>
          <text:p text:style-name="P809">Appendix A. <text:s/>The Legacy IBX Services Components<text:tab/>139</text:p>
          <text:p text:style-name="P810">A.1 <text:s/>Firebird Legacy Admin Component Overview<text:tab/>139</text:p>
          <text:p text:style-name="P810">A.2 <text:s/>Common Service Properties<text:tab/>140</text:p>
          <text:p text:style-name="P810">A.3 <text:s/>The Backup Service<text:tab/>141</text:p>
          <text:p text:style-name="P811">A.3.1 <text:s/>Server Side Backup<text:tab/>141</text:p>
          <text:p text:style-name="P811">A.3.2 <text:s/>Client Side Backup<text:tab/>142</text:p>
          <text:p text:style-name="P810">A.4 <text:s/>The Restore Service<text:tab/>142</text:p>
          <text:p text:style-name="P811">A.4.1 <text:s/>Server Side Restores<text:tab/>143</text:p>
          <text:p text:style-name="P811">A.4.2 <text:s/>Client Side Restores<text:tab/>143</text:p>
          <text:p text:style-name="P810">A.5 <text:s/>The Configuration Services<text:tab/>143</text:p>
          <text:p text:style-name="P810">A.6 <text:s/>The Server Properties Service<text:tab/>144</text:p>
          <text:p text:style-name="P810">A.7 <text:s/>The Log Service<text:tab/>145</text:p>
          <text:p text:style-name="P810">A.8 <text:s/>The Database Statistics Services<text:tab/>145</text:p>
          <text:p text:style-name="P810">A.9 <text:s/>The Security Service<text:tab/>146</text:p>
          <text:p text:style-name="P811">A.9.1 <text:s/>Listing all User Names<text:tab/>146</text:p>
          <text:p text:style-name="P811">A.9.2 <text:s/>Adding a User<text:tab/>146</text:p>
          <text:p text:style-name="P811">A.9.3 <text:s/>Updating User Details<text:tab/>147</text:p>
          <text:p text:style-name="P811">A.9.4 <text:s/>Deleting a User<text:tab/>147</text:p>
          <text:p text:style-name="P810">A.10 <text:s/>The Validation Service<text:tab/>148</text:p>
          <text:p text:style-name="P811">A.10.1 <text:s/>Database Repair<text:tab/>148</text:p>
          <text:p text:style-name="P811">11.2.3 <text:s/>Resolving Limbo Transactions<text:tab/>149</text:p>
          <text:p text:style-name="P810">A.11 <text:s/>The Online Validation Service<text:tab/>150</text:p>
          <text:p text:style-name="P811">A.11.1 <text:s/>Properties<text:tab/>150</text:p>
          <text:p text:style-name="P811">A.11.2 <text:s/>Usage<text:tab/>151</text:p>
          <text:p text:style-name="P809">Appendix B. IBX Buffer Management<text:tab/>153</text:p>
          <text:p text:style-name="P810">B.1 <text:s/>TDataset<text:tab/>153</text:p>
          <text:p text:style-name="P810">B.1.1 <text:s/>TDataset Buffers<text:tab/>153</text:p>
          <text:p text:style-name="P810">B.1.2 <text:s/>Buffer Pool Initialisation<text:tab/>154</text:p>
          <text:p text:style-name="P810">B.1.3 <text:s/>Buffer Pool Destruction<text:tab/>154</text:p>
          <text:p text:style-name="P810">B.1.4 <text:s/>Scrolling Through a Dataset<text:tab/>154</text:p>
          <text:p text:style-name="P810">B.1.5 <text:s/>Row Editing<text:tab/>155</text:p>
          <text:p text:style-name="P810">B.1.6 <text:s/>Row Deletion<text:tab/>155</text:p>
          <text:p text:style-name="P810">B.1.7 <text:s/>Row Insert/Append<text:tab/>155</text:p>
          <text:p text:style-name="P810">B.1.8 <text:s/>Accessing Fields<text:tab/>156</text:p>
          <text:p text:style-name="P810">B.1.9 <text:s/>Calculated Fields<text:tab/>156</text:p>
          <text:p text:style-name="P810">B.1.10 <text:s/>Blob Support<text:tab/>156</text:p>
          <text:p text:style-name="P810">B.2 <text:s/>Legacy IBX<text:tab/>156</text:p>
          <text:p text:style-name="P810">B.3 <text:s/>IBX: Improved Buffer Management<text:tab/>157</text:p>
          <text:p text:style-name="P811">B.3.1 <text:s/>The Display Buffer<text:tab/>157</text:p>
          <text:p text:style-name="P810">B.3.2 <text:s/>The Buffer Cache<text:tab/>157</text:p>
          <text:p text:style-name="P810">B.4 <text:s/>Implementation<text:tab/>158</text:p>
        </text:index-body>
      </text:table-of-content>
      <text:p text:style-name="P4"/>
      <text:h text:style-name="P813" text:outline-level="1" text:restart-numbering="true" text:start-value="-1"><text:bookmark-start text:name="__RefHeading__1226_1812826207"/><text:bookmark-start text:name="__RefNumPara__16569_2667734427"/><text:line-break/>Introduction<text:bookmark-end text:name="__RefHeading__1226_1812826207"/><text:bookmark-end text:name="__RefNumPara__16569_2667734427"/></text:h>
      <text:p text:style-name="P44">The <text:span text:style-name="T13">IBX for Lazarus</text:span> Guide is a guide to the <text:span text:style-name="T44">IBX fork created by MWA Software for Lazarus.</text:span></text:p>
      <text:p text:style-name="P48"><text:span text:style-name="T12">IBX for Lazarus</text:span> is derived from the Open Source edition of IBX published by Borland/Inprise in 2000 under the InterBase Public License. <text:span text:style-name="T45">In 2011, the Open Source edition of IBX</text:span> <text:span text:style-name="T4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46">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45">Support for generators has also been added compatible with the generator support added to IBX after the Open Source edition was published, supporting both “On New Record” and “On Post” generators. <text:span text:style-name="T45">There are also many new data aware controls distributed as part of the package, plus a scripting engine. TIBExtract has also been brought up-to-date.</text:span></text:p>
      <text:p text:style-name="P47">From version 2 onwards, IBX uses the <text:span text:style-name="T12">fbintf</text:span> package to use either the new Firebird 3 API or the legacy Firebird API. The <text:span text:style-name="T12">fbintf</text:span> package is partly derived from IBX and automatically loads the Firebird 3 API, if available, the legacy API if not. <text:span text:style-name="T20">fbintf</text:span><text:span text:style-name="T201"> is distributed with IBX. </text:span>The Firebird Pascal API Guide provided with the <text:span text:style-name="T12">fbintf</text:span> package provides important information on the installation for the Firebird Server for development system and guidelines for deployment.</text:p>
      <text:p text:style-name="P410"><text:soft-page-break/>See <text:span text:style-name="T201">also </text:span>the <text:span text:style-name="T44">Firebird Pascal API Guide </text:span>for information on:</text:p>
      <text:list text:style-name="L9">
        <text:list-item>
          <text:p text:style-name="P1126">Using the API interfaces exposed by IBX</text:p>
        </text:list-item>
        <text:list-item>
          <text:p text:style-name="P1126">Character sets and their relation to AnsiString Code Pages</text:p>
        </text:list-item>
        <text:list-item>
          <text:p text:style-name="P1126">Deployment of applications using the Firebird Client library.</text:p>
        </text:list-item>
      </text:list>
      <text:p text:style-name="P194">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0">).</text:span></text:p>
      <text:h text:style-name="P821" text:outline-level="2"><text:bookmark-start text:name="__RefHeading___Toc15516_148275515"/>References<text:bookmark-end text:name="__RefHeading___Toc15516_148275515"/></text:h>
      <text:list text:style-name="L10">
        <text:list-item>
          <text:p text:style-name="P982">InterBase 6 API Guide (<text:a xlink:type="simple" xlink:href="http://www.ibphoenix.com/files/60ApiGuide.zip" text:style-name="Internet_20_link" text:visited-style-name="Visited_20_Internet_20_Link">http://www.ibphoenix.com/files/60ApiGuide.zip</text:a>)</text:p>
        </text:list-item>
        <text:list-item>
          <text:p text:style-name="P982"><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82">InterBase 6 Data Definition Guide (<text:a xlink:type="simple" xlink:href="http://www.ibphoenix.com/files/60DataDef.zip" text:style-name="Internet_20_link" text:visited-style-name="Visited_20_Internet_20_Link">http://www.ibphoenix.com/files/60DataDef.zip</text:a>)</text:p>
        </text:list-item>
        <text:list-item>
          <text:p text:style-name="P98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82">IBX for Lazarus (MWA Software – <text:a xlink:type="simple" xlink:href="http://www.mwasoftware.co.uk/ibx" text:style-name="Internet_20_link" text:visited-style-name="Visited_20_Internet_20_Link">http://www.mwasoftware.co.uk/ibx</text:a>)</text:p>
        </text:list-item>
        <text:list-item>
          <text:p text:style-name="P983"><text:bookmark-start text:name="__RefNumPara__23913_622456310"/>Firebird Pascal API Guide – MWA Software, 2016-<text:span text:style-name="T387">2022</text:span><text:bookmark-end text:name="__RefNumPara__23913_622456310"/></text:p>
        </text:list-item>
      </text:list>
      <text:h text:style-name="P822" text:outline-level="2"><text:bookmark-start text:name="__RefHeading___Toc15518_148275515"/>Change History<text:bookmark-end text:name="__RefHeading___Toc15518_148275515"/></text:h>
      <text:h text:style-name="P874" text:outline-level="3"><text:bookmark-start text:name="__RefHeading___Toc15520_148275515"/>Version 1.1<text:bookmark-end text:name="__RefHeading___Toc15520_148275515"/></text:h>
      <text:p text:style-name="P539">This version has been updated to include:</text:p>
      <text:list text:style-name="L11">
        <text:list-item>
          <text:p text:style-name="P984">Extended TIBExtract functionality for output of data, including the simple XML formats for binary blobs and arrays, and privileges (grants) given to Triggers and Stored Procedures.</text:p>
        </text:list-item>
        <text:list-item>
          <text:p text:style-name="P984">Extended TIBXScript functionality in order to process XML format data exported by TIBExtract and embedded in INSERT Statements.</text:p>
        </text:list-item>
        <text:list-item>
          <text:p text:style-name="P984">Documentation of Data Output Formatters (see <text:bookmark-ref text:reference-format="number" text:ref-name="__RefHeading___Toc10934_867646742">7.2</text:bookmark-ref>).</text:p>
        </text:list-item>
        <text:list-item>
          <text:p text:style-name="P984">Minor Typos and corrections.</text:p>
        </text:list-item>
      </text:list>
      <text:h text:style-name="P875" text:outline-level="3"><text:bookmark-start text:name="__RefHeading___Toc15522_148275515"/>Version 1.2 <text:bookmark-end text:name="__RefHeading___Toc15522_148275515"/></text:h>
      <text:list text:style-name="L12">
        <text:list-item>
          <text:p text:style-name="P985">Minor typos and corrections</text:p>
        </text:list-item>
      </text:list>
      <text:h text:style-name="P875" text:outline-level="3"><text:bookmark-start text:name="__RefHeading___Toc15524_148275515"/>Version 1.3<text:bookmark-end text:name="__RefHeading___Toc15524_148275515"/></text:h>
      <text:list text:style-name="L13">
        <text:list-item>
          <text:p text:style-name="P986">Introduces TIBUpdate</text:p>
        </text:list-item>
      </text:list>
      <text:h text:style-name="P875" text:outline-level="3"><text:bookmark-start text:name="__RefHeading___Toc15526_148275515"/><text:soft-page-break/>Version 1.4<text:bookmark-end text:name="__RefHeading___Toc15526_148275515"/></text:h>
      <text:list text:style-name="L14">
        <text:list-item>
          <text:p text:style-name="P987">Removal of ReadOnly as a common property of IBX TDatasets. This was never true.</text:p>
        </text:list-item>
      </text:list>
      <text:h text:style-name="P876" text:outline-level="3"><text:bookmark-start text:name="__RefHeading___Toc15528_148275515"/>Version 1.5<text:bookmark-end text:name="__RefHeading___Toc15528_148275515"/></text:h>
      <text:list text:style-name="L15">
        <text:list-item>
          <text:p text:style-name="P988">Support for Insert and Update query RETURNING clauses added (see <text:bookmark-ref text:reference-format="number" text:ref-name="__RefHeading___Toc9861_600433823">6.6.1.4</text:bookmark-ref>)</text:p>
        </text:list-item>
        <text:list-item>
          <text:p text:style-name="P989">Support for Delete query RETURING clauses added (see <text:bookmark-ref text:reference-format="number" text:ref-name="__RefHeading___Toc10846_1038461802">6.6.1.5</text:bookmark-ref>).</text:p>
        </text:list-item>
        <text:list-item>
          <text:p text:style-name="P988">Support for Firebird 3 Identity Columns added (see <text:bookmark-ref text:reference-format="number" text:ref-name="__RefHeading___Toc10610_600433823">6.6.8</text:bookmark-ref>).</text:p>
        </text:list-item>
        <text:list-item>
          <text:p text:style-name="P990">A new section on IBX TField subclasses is provided as section <text:bookmark-ref text:reference-format="number" text:ref-name="__RefHeading___Toc11725_27826370">6.8</text:bookmark-ref>.</text:p>
        </text:list-item>
        <text:list-item>
          <text:p text:style-name="P991">The description of TIBStoredProc has been updated to include support for Firebird 3 Packages (see <text:bookmark-ref text:reference-format="number" text:ref-name="__RefHeading__24569_1844166745">6.4</text:bookmark-ref>).</text:p>
        </text:list-item>
        <text:list-item>
          <text:p text:style-name="P991">A new section on the TIBSQL Property Editor has been added (see <text:bookmark-ref text:reference-format="number" text:ref-name="__RefHeading___Toc12469_559740817">5.4.3</text:bookmark-ref>).</text:p>
        </text:list-item>
        <text:list-item>
          <text:p text:style-name="P992">A new section on row refresh has been added (see <text:bookmark-ref text:reference-format="number" text:ref-name="__RefHeading___Toc11258_67450469">6.6.9</text:bookmark-ref>).</text:p>
        </text:list-item>
        <text:list-item>
          <text:p text:style-name="P992">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993">Missing migration issue added to “Upgrading From Earlier Versions” on additional TIBSQL error checks (See <text:bookmark-ref text:reference-format="number" text:ref-name="__RefHeading___Toc10863_2037760975">2.6</text:bookmark-ref>) </text:p>
        </text:list-item>
        <text:list-item>
          <text:p text:style-name="P994">Text reviewed and corrected for typos and other minor errors.</text:p>
        </text:list-item>
        <text:list-item>
          <text:p text:style-name="P995">Removal of TIBTable FieldDefs as a published property.</text:p>
        </text:list-item>
        <text:list-item>
          <text:p text:style-name="P996">Expected_db parameter added to Services API support (see <text:bookmark-ref text:reference-format="number" text:ref-name="__RefHeading___Toc14611_1530645906">10.4</text:bookmark-ref>).</text:p>
        </text:list-item>
        <text:list-item>
          <text:p text:style-name="P997">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998">TIBSecurityService support of Admin Role from Firebird 2.5 onwards (see <text:bookmark-ref text:reference-format="number" text:ref-name="__RefHeading___Toc10959_2048614072">10.11</text:bookmark-ref>).</text:p>
        </text:list-item>
        <text:list-item>
          <text:p text:style-name="P999">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00">TIBOnlineValidationService added to Firebird Admin Palette (see <text:bookmark-ref text:reference-format="number" text:ref-name="__RefHeading___Toc11667_1476524025">10.14</text:bookmark-ref>).</text:p>
        </text:list-item>
        <text:list-item>
          <text:p text:style-name="P1001">PagesFree and PagesUsed properties added to TIBDatabaseInfo (see <text:bookmark-ref text:reference-format="number" text:ref-name="__RefHeading__24365_1844166745">7.5</text:bookmark-ref>)</text:p>
        </text:list-item>
        <text:list-item>
          <text:p text:style-name="P1002">A SetNoLinger method added to the Database Configuration Service (see <text:bookmark-ref text:reference-format="number" text:ref-name="__RefHeading___Toc11153_1779155875">10.7</text:bookmark-ref>).</text:p>
        </text:list-item>
        <text:list-item>
          <text:p text:style-name="P1003">ImageIndex<text:span text:style-name="T287">Field and SelectedImageIndexField</text:span> propert<text:span text:style-name="T287">ies</text:span> added to TIBTreeView (see <text:bookmark-ref text:reference-format="number" text:ref-name="__RefHeading___Toc11188_519836994">Error: Reference source not found</text:bookmark-ref>).</text:p>
        </text:list-item>
      </text:list>
      <text:h text:style-name="P877" text:outline-level="3"><text:bookmark-start text:name="__RefHeading___Toc15530_148275515"/><text:soft-page-break/>Version 1.6<text:bookmark-end text:name="__RefHeading___Toc15530_148275515"/></text:h>
      <text:list text:style-name="L16">
        <text:list-item>
          <text:p text:style-name="P1004">Chapter 10 updated for new and re-architectured Services API components. The previous text of chapter 10 is <text:span text:style-name="T322">still</text:span> available as <text:bookmark-ref text:reference-format="number" text:ref-name="__RefHeading___Toc28823_2092659162">Appendix A</text:bookmark-ref></text:p>
        </text:list-item>
        <text:list-item>
          <text:p text:style-name="P1005">New section added on IBX <text:span text:style-name="T322">Lazarus </text:span>Packages (see <text:bookmark-ref text:reference-format="number" text:ref-name="__RefHeading___Toc15343_252590906">4.3</text:bookmark-ref>).</text:p>
        </text:list-item>
        <text:list-item>
          <text:p text:style-name="P1006">TIBDataSet, TIBQuery and TIBTable can now all return performance statistics (see <text:bookmark-ref text:reference-format="number" text:ref-name="__RefHeading___Toc23916_622456310">6.9</text:bookmark-ref>).</text:p>
        </text:list-item>
        <text:list-item>
          <text:p text:style-name="P1007">AlwaysQuoteIdentifiers property added to TIBExtract (see <text:bookmark-ref text:reference-format="number" text:ref-name="__RefHeading___Toc13642_905972085">7.6.1</text:bookmark-ref>)</text:p>
        </text:list-item>
        <text:list-item>
          <text:p text:style-name="P1008">Clarification at end of introduction to chapter <text:bookmark-ref text:reference-format="number" text:ref-name="__RefHeading__16255_274617472">Error: Reference source not found</text:bookmark-ref><text:s/>as regards the correct place to set query parameter values when using the IBX Dynamic Controls <text:span text:style-name="T328">(see also </text:span><text:span text:style-name="T328"><text:bookmark-ref text:reference-format="number" text:ref-name="__RefHeading___Toc14075_1490739412">Error: Reference source not found</text:bookmark-ref></text:span><text:span text:style-name="T328">, </text:span><text:span text:style-name="T328"><text:bookmark-ref text:reference-format="number" text:ref-name="__RefHeading___Toc14077_1490739412">Error: Reference source not found</text:bookmark-ref></text:span><text:span text:style-name="T328"><text:s/>and </text:span><text:span text:style-name="T328"><text:bookmark-ref text:reference-format="number" text:ref-name="__RefHeading___Toc14079_1490739412">Error: Reference source not found</text:bookmark-ref></text:span><text:span text:style-name="T328">)</text:span></text:p>
        </text:list-item>
        <text:list-item>
          <text:p text:style-name="P1009">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28">to IBDataset</text:span>).</text:p>
        </text:list-item>
        <text:list-item>
          <text:p text:style-name="P1010">Text added describing IBX use in multi-threaded applications (see <text:bookmark-ref text:reference-format="number" text:ref-name="__RefHeading___Toc14210_811369602">2.4</text:bookmark-ref>).</text:p>
        </text:list-item>
        <text:list-item>
          <text:p text:style-name="P1011">TIBExtract updated to include eoPackage in list of extract objects (see <text:bookmark-ref text:reference-format="number" text:ref-name="__RefHeading___Toc13841_1632266307">7.6.2</text:bookmark-ref>)</text:p>
        </text:list-item>
        <text:list-item>
          <text:p text:style-name="P1012">TIBExtract. New property CaseSensitiveObjectNames (see <text:bookmark-ref text:reference-format="number" text:ref-name="__RefHeading___Toc13642_905972085">7.6.1</text:bookmark-ref>).</text:p>
        </text:list-item>
        <text:list-item>
          <text:p text:style-name="P1013">TIBExtract: additional Extract Types etDatabaseTriggers and etDDLTrigger <text:span text:style-name="T334">(see </text:span><text:span text:style-name="T334"><text:bookmark-ref text:reference-format="number" text:ref-name="__RefHeading___Toc13841_1632266307">7.6.2</text:bookmark-ref></text:span><text:span text:style-name="T334">)</text:span></text:p>
        </text:list-item>
        <text:list-item>
          <text:p text:style-name="P1014">TIBDatabase.Reconnect added (See <text:bookmark-ref text:reference-format="number" text:ref-name="__RefHeading___Toc13953_1132224903">5.1.7</text:bookmark-ref>).</text:p>
        </text:list-item>
        <text:list-item>
          <text:p text:style-name="P1015">TIBExtract: New Property IncludeMetaDataComments (see <text:span text:style-name="T340"><text:bookmark-ref text:reference-format="number" text:ref-name="__RefHeading___Toc13642_905972085">7.6.1</text:bookmark-ref></text:span><text:span text:style-name="T340">) </text:span>and new ExtractObject eoComments (see <text:span text:style-name="T334"><text:bookmark-ref text:reference-format="number" text:ref-name="__RefHeading___Toc13841_1632266307">7.6.2</text:bookmark-ref></text:span><text:span text:style-name="T334">). New method ListObjectNames added (see </text:span><text:span text:style-name="T334"><text:bookmark-ref text:reference-format="number" text:ref-name="__RefHeading___Toc14753_634109342">7.6.3</text:bookmark-ref></text:span><text:span text:style-name="T334">).</text:span></text:p>
        </text:list-item>
      </text:list>
      <text:h text:style-name="P878" text:outline-level="3"><text:bookmark-start text:name="__RefHeading___Toc15532_148275515"/>Version 1.7<text:bookmark-end text:name="__RefHeading___Toc15532_148275515"/></text:h>
      <text:list text:style-name="L17">
        <text:list-item>
          <text:p text:style-name="P1016">Correction to discussion on thread safety to note that the Firebird API itself has been thread safet from Firebird 2.5 onwards.</text:p>
        </text:list-item>
        <text:list-item>
          <text:p text:style-name="P1017">FirebirdLibraryPathName and FirebirdAPI properties added to both TIBDatabase and TIBXServicesConnection. <text:span text:style-name="T347">See also </text:span><text:span text:style-name="T347"><text:bookmark-ref text:reference-format="number" text:ref-name="__RefHeading___Toc22717_858839226">5.1.12</text:bookmark-ref></text:span><text:span text:style-name="T347">.</text:span></text:p>
        </text:list-item>
      </text:list>
      <text:h text:style-name="P879" text:outline-level="3"><text:bookmark-start text:name="__RefHeading___Toc15534_148275515"/>Version 1.8<text:bookmark-end text:name="__RefHeading___Toc15534_148275515"/></text:h>
      <text:list text:style-name="L18">
        <text:list-item>
          <text:p text:style-name="P1018">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19">New properties and event for TIBCSVDataOut, TIBInsertStmtsOut and TIBBlockFormatOut. i.e. TimestampFormat:, DateFormat, TimeFormat, QuoteStrings, FieldSeparator, HeaderSeparator, and OnFormatTextString.</text:p>
        </text:list-item>
        <text:list-item>
          <text:p text:style-name="P1020">A section on how IBX interacts when user privileges has been added (see <text:bookmark-ref text:reference-format="number" text:ref-name="__RefHeading___Toc15093_562995282">6.10</text:bookmark-ref>).</text:p>
        </text:list-item>
        <text:list-item>
          <text:p text:style-name="P1021">New public property “InOnCreateDB” for TIBLocalDBSupport (see <text:bookmark-ref text:reference-format="number" text:ref-name="__RefHeading___Toc14340_1373794815">11.1.1</text:bookmark-ref>).</text:p>
        </text:list-item>
        <text:list-item>
          <text:p text:style-name="P1022">Clarification on use of <text:span text:style-name="T358">TIBTable</text:span> Filters added (see <text:bookmark-ref text:reference-format="number" text:ref-name="__RefHeading___Toc16103_1394698701">6.3.2.2</text:bookmark-ref>). <text:span text:style-name="T358">TIBQuery (and hence TIBDataSet) support of filtering is described in </text:span><text:span text:style-name="T358"><text:bookmark-ref text:reference-format="number" text:ref-name="__RefHeading___Toc15165_623318093">6.5.5</text:bookmark-ref></text:span><text:span text:style-name="T358">.</text:span></text:p>
        </text:list-item>
        <text:list-item>
          <text:p text:style-name="P1022"><text:soft-page-break/>Clarification added on the processing of a CREATE DATABASE statement by TIBXScript (see <text:bookmark-ref text:reference-format="number" text:ref-name="__RefHeading___Toc15167_623318093">7.1.4</text:bookmark-ref>).</text:p>
        </text:list-item>
        <text:list-item>
          <text:p text:style-name="P1023">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80" text:outline-level="3"><text:bookmark-start text:name="__RefHeading___Toc15536_148275515"/>Version 1.9<text:bookmark-end text:name="__RefHeading___Toc15536_148275515"/></text:h>
      <text:list text:style-name="L19">
        <text:list-item>
          <text:p text:style-name="P1024">Set Generator now supported by TIBXScript (see <text:bookmark-ref text:reference-format="number" text:ref-name="__RefHeading__24780_1844166745">7.1</text:bookmark-ref>).</text:p>
        </text:list-item>
        <text:list-item>
          <text:p text:style-name="P1025">Firebird 4 Data types supported: DecFloat <text:span text:style-name="T365">and INT128 </text:span><text:span text:style-name="T363">(See </text:span><text:span text:style-name="T363"><text:bookmark-ref text:reference-format="number" text:ref-name="__RefHeading___Toc26109_2462897014">6.8.2</text:bookmark-ref></text:span><text:span text:style-name="T363">)</text:span>, Timestamp with Time Zone and Time with Time Zone <text:span text:style-name="T363">(see </text:span><text:span text:style-name="T363"><text:bookmark-ref text:reference-format="number" text:ref-name="__RefHeading___Toc26107_2462897014">6.8.3.5</text:bookmark-ref></text:span><text:span text:style-name="T363">)</text:span></text:p>
        </text:list-item>
        <text:list-item>
          <text:p text:style-name="P1025">IBExtract updated to support new Firebird 4 DDL</text:p>
        </text:list-item>
        <text:list-item>
          <text:p text:style-name="P1026">IBExtract now supports internal functions (Firebird 3 extension)</text:p>
        </text:list-item>
        <text:list-item>
          <text:p text:style-name="P1027">SQLFiltered and SQLFilterParams properties added to TIBTable <text:span text:style-name="T357">(see </text:span><text:span text:style-name="T357"><text:bookmark-ref text:reference-format="number" text:ref-name="__RefHeading___Toc16103_1394698701">6.3.2.2</text:bookmark-ref></text:span><text:span text:style-name="T357">) </text:span>and TIBQuery/TIBDataset (See <text:bookmark-ref text:reference-format="number" text:ref-name="__RefHeading___Toc15165_623318093">6.5.5</text:bookmark-ref>).</text:p>
        </text:list-item>
      </text:list>
      <text:h text:style-name="P881" text:outline-level="3"><text:bookmark-start text:name="__RefHeading___Toc28276_148275515"/>Version 1.10<text:bookmark-end text:name="__RefHeading___Toc28276_148275515"/></text:h>
      <text:list text:style-name="L20">
        <text:list-item>
          <text:p text:style-name="P1028">Clarification on manually entered StoredProcNames added (see <text:bookmark-ref text:reference-format="number" text:ref-name="__RefNumPara__15874_148275515">6.4</text:bookmark-ref>)</text:p>
        </text:list-item>
        <text:list-item>
          <text:p text:style-name="P1029">Support for Firebird 4.0 Batch Execution Interface (see <text:bookmark-ref text:reference-format="number" text:ref-name="__RefNumPara__28274_148275515">5.4.2.4</text:bookmark-ref>)</text:p>
        </text:list-item>
        <text:list-item>
          <text:p text:style-name="P1030">New property in TIBLocalDBSupport - SectionHeaderTemplate (see <text:bookmark-ref text:reference-format="number" text:ref-name="__RefNumPara__15474_3018657082">11.1.1</text:bookmark-ref>)</text:p>
        </text:list-item>
      </text:list>
      <text:h text:style-name="P882" text:outline-level="3"><text:bookmark-start text:name="__RefHeading___Toc27959_3235793879"/>Version 1.11<text:bookmark-end text:name="__RefHeading___Toc27959_3235793879"/></text:h>
      <text:list text:style-name="L21">
        <text:list-item>
          <text:p text:style-name="P1031">Support for scrollable cursors <text:span text:style-name="T378">in TIBSQL (Local Database connections only). See </text:span><text:span text:style-name="T378"><text:bookmark-ref text:reference-format="number" text:ref-name="__RefNumPara__27955_3235793879">5.4.1</text:bookmark-ref></text:span><text:span text:style-name="T378"><text:s/>and </text:span><text:span text:style-name="T378"><text:bookmark-ref text:reference-format="number" text:ref-name="__RefNumPara__27957_3235793879">5.4.4</text:bookmark-ref></text:span><text:span text:style-name="T378">.</text:span></text:p>
        </text:list-item>
      </text:list>
      <text:h text:style-name="P883" text:outline-level="3"><text:bookmark-start text:name="__RefHeading___Toc50195_1160916553"/>Version 1.12<text:bookmark-end text:name="__RefHeading___Toc50195_1160916553"/></text:h>
      <text:list text:style-name="L22">
        <text:list-item>
          <text:p text:style-name="P1032">TIBTransaction: new properties <text:span text:style-name="T386">(see </text:span><text:span text:style-name="T386"><text:bookmark-ref text:reference-format="number-no-superior" text:ref-name="__RefNumPara__30381_1160916553">5.2.1</text:bookmark-ref></text:span><text:span text:style-name="T386">)</text:span></text:p>
          <text:list>
            <text:list-item>
              <text:p text:style-name="P1033">property TransactionID: integer read GetTransactionID;</text:p>
            </text:list-item>
            <text:list-item>
              <text:p text:style-name="P1034">property IsReadOnly: boolean read GetIsReadOnly;</text:p>
            </text:list-item>
            <text:list-item>
              <text:p text:style-name="P1032">property TransactionName: string read FTransactionName write SetTransactionName; </text:p>
            </text:list-item>
          </text:list>
        </text:list-item>
        <text:list-item>
          <text:p text:style-name="P1032">TIBDatabaseInfo. New property FirebirdVersion <text:span text:style-name="T387">(see </text:span><text:span text:style-name="T387"><text:bookmark-ref text:reference-format="number-no-superior" text:ref-name="__RefNumPara__31052_1160916553">7.5</text:bookmark-ref></text:span><text:span text:style-name="T387">)</text:span></text:p>
        </text:list-item>
        <text:list-item>
          <text:p text:style-name="P1035">New unit IBJournal <text:span text:style-name="T391">(see </text:span><text:span text:style-name="T391"><text:bookmark-ref text:reference-format="number-no-superior" text:ref-name="__RefNumPara__50193_1160916553">7.7</text:bookmark-ref></text:span><text:span text:style-name="T391">)</text:span>.</text:p>
        </text:list-item>
      </text:list>
      <text:h text:style-name="Heading_20_3" text:outline-level="3"><text:bookmark-start text:name="__RefHeading___Toc24778_1614309218"/>Version 1.13<text:bookmark-end text:name="__RefHeading___Toc24778_1614309218"/></text:h>
      <text:list text:style-name="L23">
        <text:list-item>
          <text:p text:style-name="P1037">Complete rewrite of internal buffer management in order to improve performance and maintainability <text:span text:style-name="T429">(see </text:span><text:span text:style-name="T429"><text:bookmark-ref text:reference-format="number-no-superior" text:ref-name="__RefNumPara__19964_1614309218">Appendix B</text:bookmark-ref></text:span><text:span text:style-name="T429">). </text:span><text:span text:style-name="T432">The definition of the TDataset.BufferChunks property has changed and new property BufferChunksInFirstBlock introduced (see </text:span><text:span text:style-name="T432"><text:bookmark-ref text:reference-format="number-no-superior" text:ref-name="__RefNumPara__24092_1614309218">6.2.1</text:bookmark-ref></text:span><text:span text:style-name="T432">).</text:span></text:p>
        </text:list-item>
        <text:list-item>
          <text:p text:style-name="P1036"><text:soft-page-break/>TIBUpdateSQL: changes to SQL text will close linked dataset if open. This is to ensure same behaviour as TIBDataset, TIBTable and TIBStoredProcedure.</text:p>
        </text:list-item>
        <text:list-item>
          <text:p text:style-name="P1038">TDataset.Refresh now complies with the FPC Manual specification. See <text:bookmark-ref text:reference-format="number-no-superior" text:ref-name="__RefNumPara__22017_1614309218">6.6.9</text:bookmark-ref><text:s/>for more information and how row refresh is now performed.</text:p>
        </text:list-item>
      </text:list>
      <text:h text:style-name="P884" text:outline-level="3"><text:bookmark-start text:name="__RefHeading___Toc17229_2667734427"/>Version 1.14<text:bookmark-end text:name="__RefHeading___Toc17229_2667734427"/></text:h>
      <text:list text:style-name="L24">
        <text:list-item>
          <text:p text:style-name="P1039">Chapter 12 (IB Controls) moved to standalone document “DynamicDatabaseControls”.</text:p>
        </text:list-item>
      </text:list>
      <text:h text:style-name="P885" text:outline-level="3"><text:bookmark-start text:name="__RefHeading___Toc17231_2667734427"/>Version 1.<text:span text:style-name="T437">1</text:span>5<text:bookmark-end text:name="__RefHeading___Toc17231_2667734427"/></text:h>
      <text:list text:style-name="L25">
        <text:list-item>
          <text:p text:style-name="P1040">New section <text:bookmark-ref text:reference-format="number" text:ref-name="__RefNumPara__16573_2667734427">5.3.4</text:bookmark-ref><text:s/>to discuss the use of TIBEvnts and multithreaded applications.</text:p>
        </text:list-item>
      </text:list>
      <text:h text:style-name="P886" text:outline-level="3"><text:bookmark-start text:name="__RefHeading___Toc19390_2109117045"/>Version 1.16<text:bookmark-end text:name="__RefHeading___Toc19390_2109117045"/></text:h>
      <text:list text:style-name="L26">
        <text:list-item>
          <text:p text:style-name="P1041">Note added (<text:bookmark-ref text:reference-format="number" text:ref-name="__RefHeading__14636_274617472">6.6.1.3</text:bookmark-ref>) to explain use of Tfield.OldValue.</text:p>
        </text:list-item>
      </text:list>
      <text:h text:style-name="P814" text:outline-level="1"><text:bookmark-start text:name="__RefHeading___Toc15538_148275515"/><text:line-break/>Installation and Preparation for Use<text:bookmark-end text:name="__RefHeading___Toc15538_148275515"/></text:h>
      <text:p text:style-name="P419">IBX for Lazarus is distributed in a single archive (zip or tar.gz format) and includes the <text:span text:style-name="T12">fbintf</text:span> package. You can obtain an up-to-date version from <text:a xlink:type="simple" xlink:href="http://www.mwasoftware.co.uk/ibx" text:style-name="Internet_20_link" text:visited-style-name="Visited_20_Internet_20_Link">http://www.mwasoftware.co.uk/ibx</text:a>.</text:p>
      <text:p text:style-name="P42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421">“<text:span text:style-name="T169">&lt;</text:span>Lazarus installation directory&gt;/otherComponents/ibx”.</text:p>
      <text:h text:style-name="Heading_20_2" text:outline-level="2"><text:bookmark-start text:name="__RefHeading___Toc15540_148275515"/>Minimum Requirements<text:bookmark-end text:name="__RefHeading___Toc15540_148275515"/></text:h>
      <text:p text:style-name="P48"><text:span text:style-name="T46">IBX 2.0.0 requires at least Lazarus version 1.6.0 and version 3.0.0 </text:span>of the Free Pascal Compiler. </text:p>
      <text:p text:style-name="P49">All versions of the Firebird Server are supported including version 3.</text:p>
      <text:p text:style-name="P48">The Firebird client library must also be installed. <text:span text:style-name="T47">If this client library supports the new Firebird 3 client API then this is used, otherwise IBX uses the older Firebird 2 API.</text:span></text:p>
      <text:h text:style-name="P823"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180">The Firebird Pascal API Guide provides guidelines for installing Firebird.</text:span> </text:p>
      <text:p text:style-name="P48">Installation into the Lazarus IDE is the same under both Linux and Windows. Unpack the source code archive into some suitable permanent location, <text:span text:style-name="T79">as described above,</text:span> and open the “dclibx.lpk” package description file using the “Package-&gt;Open Package File” menu item to open the file.</text:p>
      <text:p text:style-name="P48">When the Package Editor opens, click on “Use-&gt;Install”. Lazarus <text:span text:style-name="T181">will</text:span> now recompile itself and restart. <text:span text:style-name="T181">THREE</text:span> new tabs should now be present on the Component Palette: “Firebird”, “Firebird <text:soft-page-break/>Admin”, <text:span text:style-name="T181">and “Firebird Data Controls”</text:span>. Respectively, these contain the IBX Database Access and Service API components. <text:span text:style-name="T79">A third tab on the palette will contain the “Firebird Data Controls”.</text:span></text:p>
      <text:p text:style-name="P48">If no IBX components are visible, then the most likely reason is that the Firebird Client Library has not been installed and/or cannot be located. <text:span text:style-name="T79">See the Firebird Pascal API Guide for information on how </text:span><text:span text:style-name="T14">fbintf</text:span><text:span text:style-name="T79"> and hence IBX finds the Firebird Client Library.</text:span></text:p>
      <text:h text:style-name="P826" text:outline-level="2"><text:bookmark-start text:name="__RefHeading___Toc15544_148275515"/>Console Mode IBX<text:bookmark-end text:name="__RefHeading___Toc15544_148275515"/></text:h>
      <text:p text:style-name="P536">IBX can be used as visual components under Lazarus or in console mode programs. <text:span text:style-name="T312">Non-LCL programs should use the </text:span><text:span text:style-name="Symbol"><text:span text:style-name="T312">ibnongui</text:span></text:span><text:span text:style-name="T312"> package, while LCL programs should use the </text:span><text:span text:style-name="Symbol"><text:span text:style-name="T312">ibexpress</text:span></text:span><text:span text:style-name="T312"> package. The </text:span><text:span text:style-name="Symbol"><text:span text:style-name="T312">ibexpress</text:span></text:span><text:span text:style-name="T312"> package uses </text:span><text:span text:style-name="Symbol"><text:span text:style-name="T312">ibnongui</text:span></text:span><text:span text:style-name="T312"> and adds the LCL dependencies (built in login dialog and hourglass cursor on DB operations).</text:span></text:p>
      <text:p text:style-name="P536"><text:span text:style-name="T312">In previous releases, a</text:span> separate package <text:span text:style-name="T312">was</text:span> provided for console mode programs, exclud<text:span text:style-name="T312">ing</text:span> any LCL dependencies, called “ibexpressconsolemode”. <text:span text:style-name="T313">This is still available as a “stub” package that loads the ibnongui and iblocalnongui packages.</text:span></text:p>
      <text:p text:style-name="P535"><text:span text:style-name="T313">If you need to continue</text:span> to use the <text:span text:style-name="T336">legacy </text:span>console mode package in the IDE <text:span text:style-name="T33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535">An example of console mode use is provided in ibx/examples/<text:span text:style-name="T181">fbsql</text:span>.</text:p>
      <text:h text:style-name="P827" text:outline-level="2"><text:bookmark-start text:name="__RefHeading___Toc14210_811369602"/>Multi-threading <text:span text:style-name="T333">Support</text:span><text:bookmark-end text:name="__RefHeading___Toc14210_811369602"/></text:h>
      <text:p text:style-name="P605">IBX can be used in a multi-threading application. <text:span text:style-name="T344">T</text:span>he underlying Firebird API is <text:span text:style-name="T344">has been</text:span> thread safe <text:span text:style-name="T344">from Firebird 2.5</text:span>. <text:span text:style-name="T344">However, e</text:span>ither only a single thread should use IBX or you should ensure that only a single thread at any one time is using an IBX provided function.</text:p>
      <text:p text:style-name="P605">Internally, IBX makes use of separate threads for:</text:p>
      <text:list text:style-name="L27">
        <text:list-item>
          <text:p text:style-name="P1042">SQL Monitoring (see <text:bookmark-ref text:reference-format="number" text:ref-name="__RefHeading__24773_1844166745">7.4</text:bookmark-ref>)</text:p>
        </text:list-item>
        <text:list-item>
          <text:p text:style-name="P1042">Waiting for Firebird Asynchronous Events (see <text:bookmark-ref text:reference-format="number" text:ref-name="__RefHeading__24771_1844166745">5.3</text:bookmark-ref>)</text:p>
        </text:list-item>
        <text:list-item>
          <text:p text:style-name="P1042">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29">dUseCThreads”</text:span></text:span><text:span text:style-name="Source_20_Text"><text:span text:style-name="T330"> to the project's Custom Options.</text:span></text:span></text:p>
      <text:p text:style-name="P335"><text:span text:style-name="Source_20_Text"><text:span text:style-name="T330">If multi-threading support is not compiled into your program, then an attempt to use any of the above will result in </text:span></text:span><text:span text:style-name="Source_20_Text"><text:span text:style-name="T331">an IBError Exception reporting the need to compile mutli-threading support into your application</text:span></text:span><text:span text:style-name="Source_20_Text"><text:span text:style-name="T330">.</text:span></text:span></text:p>
      <text:p text:style-name="P336"><text:span text:style-name="Source_20_Text"><text:span text:style-name="T331">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28" text:outline-level="2"><text:bookmark-start text:name="__RefHeading___Toc15546_148275515"/><text:soft-page-break/>Installing Firebird<text:bookmark-end text:name="__RefHeading___Toc15546_148275515"/></text:h>
      <text:p text:style-name="P534">You need access to a minimum of the Firebird Client library in order to use the <text:span text:style-name="T12">fbintf</text:span> package. This applies to both development and deployment. Guidelines for deployment are give in chapter <text:span text:style-name="T205">13 of the Firebird Pascal API Guide</text:span>.</text:p>
      <text:p text:style-name="P53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53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533">After installation, you should check that the “employee” is correctly listed in the “al<text:span text:style-name="T205">i</text:span>ases.conf” <text:span text:style-name="T234">(databases.conf for Firebird 3)</text:span> file in the Firebird installation folder. For example, with 32-bit Firebird under Windows, the file</text:p>
      <text:p text:style-name="P40">C:\Program Files (x86)\Firebird\Firebird_2_5\aliases.conf</text:p>
      <text:p text:style-name="P533">should contain the line:</text:p>
      <text:p text:style-name="P533"><text:span text:style-name="T203">employee = C:\Program Files (x86)\Firebird\Firebird_2_5\examples\empbuild\employee.fdb</text:span> </text:p>
      <text:h text:style-name="P824" text:outline-level="2"><text:bookmark-start text:name="__RefHeading___Toc10863_2037760975"/>Upgrading from <text:span text:style-name="T338">IBX 1.x</text:span><text:bookmark-end text:name="__RefHeading___Toc10863_2037760975"/></text:h>
      <text:p text:style-name="P419"><text:span text:style-name="T79">There are many differences between the IBX2 files and earlier versions and y</text:span>ou should first either remove or <text:span text:style-name="T181">rename</text:span> the directory containing earlier versions of IBX, and then install the new version as described in the preceding section. Applications using IBX should be rebuilt rather than just recompiled (use Run-&gt;Clean up and Build from the Lazarus menu).</text:p>
      <text:p text:style-name="P5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1">s</text:span> the legacy Firebird API.</text:p>
      <text:p text:style-name="P50">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50">When migrating an existing IBX 1.4.x application to IBX 2.0.0 most use<text:span text:style-name="T49">r</text:span>s will need only to recompile against the upgraded package. However, advanced users may need to make changes due to the following incompatibilities:</text:p>
      <text:list text:style-name="L28">
        <text:list-item>
          <text:p text:style-name="P1127">The IBIntf, IBCodePage and IBXConst units have been removed from the package. Uses clauses that use IBIntf or IBXConst should be replaced with use of the “IB” unit. This is now <text:soft-page-break/>part of the <text:span text:style-name="T12">fbintf</text:span> package and <text:span text:style-name="T49">which </text:span>provides the Firebird Pascal API including all constants and type definitions associated with it. </text:p>
        </text:list-item>
      </text:list>
      <text:p text:style-name="P52">IBCodePage was an internal unit providing the mapping between Firebird Character sets and code pages. Equivalent functionality is now provided by the Firebird Pascal API.</text:p>
      <text:list text:continue-numbering="true" text:style-name="L28">
        <text:list-item>
          <text:p text:style-name="P1127">Any use of the IBHeader unit should be replaced with use of the IB unit. If there is a resulting compile time error <text:span text:style-name="T49">after this has been done</text:span> then, the reason is probably due to a dependency on <text:span text:style-name="T49">the </text:span>legacy Firebird API. IBHeader still exists but it <text:span text:style-name="T49">contains</text:span> the definition of the legacy API and any dependency on it implies a <text:span text:style-name="T49">potential </text:span>problem <text:span text:style-name="T49">when IBX </text:span>us<text:span text:style-name="T49">es</text:span> the new Firebird 3 API. Any such dependency should be identified and replaced with the equivalent functionality provided by the Firebird Pascal API defined in the IB unit.</text:p>
        </text:list-item>
        <text:list-item>
          <text:p text:style-name="P112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29"><text:span text:style-name="T79">In IBX2, </text:span>Automatic transaction Start/Commit is <text:span text:style-name="T50">no longer the default except at </text:span>design time. This may affect some simple uses of IBX with a single dataset on a form and no explicit transaction management. <text:span text:style-name="T50">A “transaction no active” error will result when a dataset is opened if your application previously relied on this feature.</text:span></text:p>
        </text:list-item>
      </text:list>
      <text:p text:style-name="P415">A new property <text:span text:style-name="Symbol">AllowAutoActivateTransaction</text:span> <text:span text:style-name="T181">(see </text:span><text:span text:style-name="T181"><text:bookmark-ref text:reference-format="number" text:ref-name="__RefHeading__23445_1844166745">5.2.4</text:bookmark-ref></text:span><text:span text:style-name="T181">) </text:span>has been added to TIBCustomDataset descendents. By default this is false. If set to true then the original behaviour is restored.</text:p>
      <text:p text:style-name="P41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51">t</text:span>ly perform a transaction completion.</text:p>
      <text:p text:style-name="P416">There could also be problems when explicit transaction start is used ,as the programmer needs to make sure that the transaction was started before any datasets were accessed. Otherwise, unexpected results could ensue.</text:p>
      <text:p text:style-name="P417">On the other hand, it is a valuable feature at design time, allowing a dataset to be opened and its data displayed in the IDE.</text:p>
      <text:p text:style-name="P416">If your application relied upon automatic starting/completion of transactions, the simplest way to restore this behaviour is to <text:span text:style-name="T50">set the AllowAutoActivateTransaction property to true.</text:span></text:p>
      <text:p text:style-name="P418">If your application has more than one dataset on the form then <text:span text:style-name="T50">this property need only</text:span> be <text:span text:style-name="T50">set for</text:span> the first one that is opened (active property set to true). This dataset should also be the last one closed (active set to false).</text:p>
      <text:list text:continue-numbering="true" text:style-name="L28">
        <text:list-item>
          <text:p text:style-name="P1130"><text:span text:style-name="T48">The UniqueParamNames property is now ignored and exists only for backwards compatibility</text:span>. <text:span text:style-name="T48">Parameter name uniqueness is now determined dynamically.</text:span></text:p>
        </text:list-item>
        <text:list-item>
          <text:p text:style-name="P1131">TIBSQL error checking is now more strict. In earlier versions, there were no checks for data validity when (e.g.) accessing query results. In IBX2:</text:p>
        </text:list-item>
      </text:list>
      <text:list text:style-name="L29">
        <text:list-item>
          <text:p text:style-name="P1132"><text:soft-page-break/>An exception is raised if an attempt is made to access query results before the query has been executed, when the cursor is at BOF or EOF, or after the query has been closed.</text:p>
        </text:list-item>
        <text:list-item>
          <text:p text:style-name="P1132">An exception is raised if an attempt is made to set query parameters before a query has been prepared.</text:p>
        </text:list-item>
      </text:list>
      <text:h text:style-name="P829" text:outline-level="2"><text:bookmark-start text:name="__RefHeading___Toc15548_148275515"/>New Feature<text:span text:style-name="T119">s</text:span> with IBX2<text:bookmark-end text:name="__RefHeading___Toc15548_148275515"/></text:h>
      <text:list text:style-name="L30">
        <text:list-item>
          <text:p text:style-name="P1043">Firebird 3 API Support</text:p>
        </text:list-item>
        <text:list-item>
          <text:p text:style-name="P1043">Access to the Firebird Pascal API for <text:span text:style-name="T181">embedded</text:span> SQL execution.</text:p>
        </text:list-item>
        <text:list-item>
          <text:p text:style-name="P1044">IBDatabase: new property - <text:span text:style-name="Symbol">CreateIfNotExists</text:span>. If true and <text:span text:style-name="T181">the </text:span>database does not exist when an attempt is made to connect to it (run time only) then an attempt is made to create the database. </text:p>
        </text:list-item>
        <text:list-item>
          <text:p text:style-name="P1044">IBDatabase: new event - <text:span text:style-name="Symbol">OnCreateDatabase</text:span>. This event is called after a database <text:span text:style-name="T80">ha</text:span>s been successfully created as a result of a call to <text:span text:style-name="Symbol">CreateDatabase</text:span> or when creating a database after it was found not to exist.</text:p>
        </text:list-item>
        <text:list-item>
          <text:p text:style-name="P1043">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31" text:outline-level="2"><text:bookmark-start text:name="__RefHeading___Toc15550_148275515"/>Uninstalling IBX<text:bookmark-end text:name="__RefHeading___Toc15550_148275515"/></text:h>
      <text:p text:style-name="P563">To uninstall IBX, open the “dclibx.lpk” package description file using the “Package-&gt;Open Package File” menu item to open the file.</text:p>
      <text:p text:style-name="P563">When the Package Editor opens, click on “Use-&gt;Uninstall”. Lazarus <text:span text:style-name="T181">will</text:span> now recompile itself and restart without the IBX components in the palette. You may now delete the IBX source code.</text:p>
      <text:h text:style-name="P815" text:outline-level="1"><text:bookmark-start text:name="__RefHeading__15827_1844166745"/><text:line-break/>An Introduction to Databases, SQL and Firebird<text:bookmark-end text:name="__RefHeading__15827_1844166745"/></text:h>
      <text:p text:style-name="P148">This chapter is intended to provide a primer on Databases, SQL and Firebird for those not familiar with these subjects. Readers who are familiar with them are invited to proof read this chapter but otherwise, they may prefer to skip to the next chapter.</text:p>
      <text:h text:style-name="P832" text:outline-level="2"><text:bookmark-start text:name="__RefHeading___Toc15552_148275515"/>What is a Database?<text:bookmark-end text:name="__RefHeading___Toc15552_148275515"/></text:h>
      <text:p text:style-name="P14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1">we </text:span>will leave the former to Google.</text:p>
      <text:p text:style-name="P149">The type of database that Firebird manages, and for which the <text:span text:style-name="T160">Structured</text:span> Query Language (SQL) was written, <text:span text:style-name="T182">is</text:span> structured with well defined rules so that they can be processed in a deterministic fashion with repeatable outcomes. <text:span text:style-name="T182">This type of database is</text:span> well suited to business applications, such as accounting and stock management, Personnel Management and Payroll.</text:p>
      <text:h text:style-name="P887" text:outline-level="3"><text:bookmark-start text:name="__RefHeading___Toc15554_148275515"/>In the Beginning<text:bookmark-end text:name="__RefHeading___Toc15554_148275515"/></text:h>
      <text:p text:style-name="P14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149">Magnetic Tape databases had to be processed sequentially. It could take a long time to find the record you are interested in, as you had to start at the beginning and work forwards, <text:span text:style-name="T182">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87" text:outline-level="3"><text:bookmark-start text:name="__RefHeading___Toc15556_148275515"/>The Arrival of Random Access Storage<text:bookmark-end text:name="__RefHeading___Toc15556_148275515"/></text:h>
      <text:p text:style-name="P149"><text:span text:style-name="T158">D</text:span>isk drives started becoming commonplace in the 1970s. <text:span text:style-name="T155">Initially</text:span> they were too expensive to hold complete databases and were used to cache data and to speed up operations. As they become bigger and cheaper, it was possible to start saving entire databases on to magnetic disks.</text:p>
      <text:p text:style-name="P149"><text:span text:style-name="T155">Magnetic disks can be randomly access. That is any sector on the disk can be accessed in about the same speed as any other. </text:span>This opened up the possibility <text:span text:style-name="T155">of having high speed access to database records and perhaps even </text:span><text:span text:style-name="T17">in place</text:span><text:span text:style-name="T155">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88" text:outline-level="3"><text:bookmark-start text:name="__RefHeading___Toc15558_148275515"/>Indexes<text:bookmark-end text:name="__RefHeading___Toc15558_148275515"/></text:h>
      <text:p text:style-name="P502">The answer was to create indexes, where an index is a comparatively small lookup table or tables that may be randomly accessed and could quickly point you at the record you were interested in.</text:p>
      <text:p text:style-name="P502">An index is intended for use with a selected key into the data (such as an account number). In principle an index <text:span text:style-name="T201">could be</text:span> just a table of account numbers <text:span text:style-name="T156">(the key into the record)</text:span> and the sector address (on the disk) where the record is held. The index table could <text:span text:style-name="T201">then </text:span>be searched much more quickly than going through the entire database and give much faster access to the data.</text:p>
      <text:p text:style-name="P502">For small databases, a simple lookup table is sufficient. However, for large databases, the overhead of searching an index table is still significant and something <text:span text:style-name="T158">better</text:span> is needed. <text:span text:style-name="T158">As a result, </text:span>Indexes became better structured. Perhaps one table for the first part of an account number and then separate tables for the second part, and selected by lookup of the first part of the account number.</text:p>
      <text:p text:style-name="P502">Another approach was to generate a hash value from a record key <text:span text:style-name="T156">(e.g. the account number)</text:span> and use that as a numeric table index to where the (e.g.) account number/record address was located. The development of efficient indexes became an important line of research.</text:p>
      <text:h text:style-name="P888" text:outline-level="3"><text:bookmark-start text:name="__RefHeading___Toc15560_148275515"/>Multiple Indexes and Datasets<text:bookmark-end text:name="__RefHeading___Toc15560_148275515"/></text:h>
      <text:p text:style-name="P502">Of course, there was no reason why only a single index was the limit. A database could have many indexes on the same data, one for each access key that you could define. Attention also moved to the structure of the database. The terminology started <text:span text:style-name="T158">firming up</text:span> with the database being broken up into smaller datasets,<text:span text:style-name="T158"> </text:span>each with their own index; the sum total of datasets and indexes becoming the database. <text:span text:style-name="T182">Given that, in this case, the dataset was a list of identically structured records, they could be modelled as “tables”, with each record being a table row and the fields of each record forming the columns.</text:span></text:p>
      <text:p text:style-name="P503">The original Magnetic Tape databases often contained data duplicated across differen<text:span text:style-name="T182">t</text:span> databases, if only because it was too difficult to organise the simultaneous processing of multiple tapes. When disks bec<text:span text:style-name="T182">a</text:span>me common, there was value in removing duplication between datasets. This both avoided the risk of differences between data describing the same thing and minimised t<text:span text:style-name="T158">he</text:span> use of still expensive disk storage.</text:p>
      <text:p text:style-name="P503"><text:soft-page-break/>However, this did mean the creation of many more smaller datasets and their own indexes and the need for the programs that accessed them to have simultaneous access to many datasets and to “join” the data together.</text:p>
      <text:h text:style-name="P889" text:outline-level="3"><text:bookmark-start text:name="__RefHeading___Toc15562_148275515"/>The Need for Middleware<text:bookmark-end text:name="__RefHeading___Toc15562_148275515"/></text:h>
      <text:p text:style-name="P503">When applications start having to solve common problems there is always <text:span text:style-name="T182">an opening</text:span> for a common middleware solution, <text:span text:style-name="T156">and database access was no exception.</text:span></text:p>
      <text:p text:style-name="P50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2">became a</text:span> single point of <text:span text:style-name="T158">access</text:span> – the database provider.</text:p>
      <text:h text:style-name="P890" text:outline-level="3"><text:bookmark-start text:name="__RefHeading___Toc15564_148275515"/>Enter the RDBMS<text:bookmark-end text:name="__RefHeading___Toc15564_148275515"/></text:h>
      <text:p text:style-name="P504">The middleware solutions soon evolved into the kind of Relational Database Management Systems (RDBMSs) that we know today. Although the various products have their differences, they can be said to:</text:p>
      <text:list text:style-name="L31">
        <text:list-item>
          <text:p text:style-name="P1045">Manage a database comprising many datasets, where each dataset is viewed as a table of data accessed using one or more indexes.</text:p>
        </text:list-item>
        <text:list-item>
          <text:p text:style-name="P1045">Maintain metadata (data about data) that describes each table in the database and each index.</text:p>
        </text:list-item>
        <text:list-item>
          <text:p text:style-name="P1045">Provide a single point of access to the database to client applications.</text:p>
        </text:list-item>
        <text:list-item>
          <text:p text:style-name="P1045">Allow the data to be accessed by table or by joining tables together, using common keys, to <text:span text:style-name="T182">create</text:span> larger virtual datasets (often called views).</text:p>
        </text:list-item>
        <text:list-item>
          <text:p text:style-name="P1045">To provide a means to refine the views by limiting both the number of rows returned and the columns in each row. <text:span text:style-name="T158">Thereby improving both efficiency and security (by limiting access to data).</text:span></text:p>
        </text:list-item>
        <text:list-item>
          <text:p text:style-name="P1045">To provide a means to update rows, insert new rows and delete existing rows, including whole table operations.</text:p>
        </text:list-item>
      </text:list>
      <text:p text:style-name="P511"><text:span text:style-name="T182">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91" text:outline-level="3"><text:bookmark-start text:name="__RefHeading___Toc15566_148275515"/>Multi-user Access<text:bookmark-end text:name="__RefHeading___Toc15566_148275515"/></text:h>
      <text:p text:style-name="P511">The old Magnetic Tape databases were, by their nature, single user access. However, a modern RDBMS can support <text:span text:style-name="T182">a</text:span> large number of concurrent users all reading data and often updating different parts of the database. <text:span text:style-name="T182">In turn, t</text:span>his <text:span text:style-name="T182">introduces</text:span> the risk of conflict <text:span text:style-name="T182">between</text:span> different users concurrently reading and writing to the same record.</text:p>
      <text:p text:style-name="P511">Simple table or record “locks” are one way around this problem. <text:span text:style-name="T159">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59">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512">While a basic record lock mechanism can be viewed as essential for concurrent database update, modern RDBMSs usually go a step further and introduce the idea of a transaction.</text:p>
      <text:p text:style-name="P512">Under this model of use, each database client connects to be database via a “Connection” (which can be local or remote), and each connection can have multiple transactions active at any one time, where a transaction:</text:p>
      <text:list text:style-name="L32">
        <text:list-item>
          <text:p text:style-name="P1046">Has a well defined start and end, while existing for as long as the client needs it.</text:p>
        </text:list-item>
        <text:list-item>
          <text:p text:style-name="P1046">Is the context under which all data is accessed and updated.</text:p>
        </text:list-item>
        <text:list-item>
          <text:p text:style-name="P1046">“Owns” any necessary table and record locks, dataset cursors and any other resources used by a client.</text:p>
        </text:list-item>
        <text:list-item>
          <text:p text:style-name="P1046">Provides “isolation” between concurrent users, <text:span text:style-name="T182">in the sense controlling how much they see of changes performed by other transactions.</text:span></text:p>
        </text:list-item>
        <text:list-item>
          <text:p text:style-name="P1046">When the transaction ends, all changes made during the transaction can either be committed – that is become changes to the database visible to everyone – or rolled back to their state when the transaction started.</text:p>
        </text:list-item>
      </text:list>
      <text:p text:style-name="P513">Transactions allow each client to have a consistent view of the database, and a means of preventing data inconsistency resulting from conflicting changes.</text:p>
      <text:h text:style-name="P832" text:outline-level="2"><text:bookmark-start text:name="__RefHeading___Toc15568_148275515"/>The <text:span text:style-name="T160">Structured</text:span> Query Language (SQL)<text:bookmark-end text:name="__RefHeading___Toc15568_148275515"/></text:h>
      <text:p text:style-name="P514">As discussed above, a basic function of an RDBMS is to provide a means to define and maintain the metadata: the table and index definitions. There is also a need to describe how tables are joined and filtered to create views, <text:span text:style-name="T182">both permanent and transient</text:span>, and for commands to update the database.</text:p>
      <text:p text:style-name="P514">This requirement can be satisfied in many different ways. However, SQL has become the <text:span text:style-name="T12">de facto</text:span> standard <text:span text:style-name="T182">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514">SQL can be split up into:</text:p>
      <text:list text:style-name="L33">
        <text:list-item>
          <text:p text:style-name="P1047">The Data Definition Language (DDL), which is used to describe tables, indexes and views i.e. to maintain the database metadata.</text:p>
        </text:list-item>
        <text:list-item>
          <text:p text:style-name="P1047">The Data Manipulation Language (DML), which is used to <text:span text:style-name="T161">get (select) data from the database, as well as to insert, update and delete data.</text:span></text:p>
        </text:list-item>
        <text:list-item>
          <text:p text:style-name="P1048">Transaction Management</text:p>
        </text:list-item>
        <text:list-item>
          <text:p text:style-name="P1048">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7"><text:soft-page-break/>The following is an example of the DDL, and is an example of defining a database table:</text:p>
      <text:p text:style-name="P198">CREATE TABLE EMPLOYEE</text:p>
      <text:p text:style-name="P198">(</text:p>
      <text:p text:style-name="P198"><text:s text:c="2"/>EMP_NO smallint NOT NULL,</text:p>
      <text:p text:style-name="P198"><text:s text:c="2"/>FIRST_NAME varchar(15) NOT NULL,</text:p>
      <text:p text:style-name="P198"><text:s text:c="2"/>LAST_NAME varchar(20) NOT NULL,</text:p>
      <text:p text:style-name="P198"><text:s text:c="2"/>PHONE_EXT varchar(4),</text:p>
      <text:p text:style-name="P198"><text:s text:c="2"/>HIRE_DATE timestamp DEFAULT <text:span text:style-name="T201">CURRENT_TIMESTAMP</text:span> NOT NULL,</text:p>
      <text:p text:style-name="P198"><text:s text:c="2"/>DEPT_NO char(3) NOT NULL,</text:p>
      <text:p text:style-name="P198"><text:s text:c="2"/>JOB_CODE varchar(5) NOT NULL,</text:p>
      <text:p text:style-name="P198"><text:s text:c="2"/>JOB_GRADE smallint NOT NULL,</text:p>
      <text:p text:style-name="P198"><text:s text:c="2"/>JOB_COUNTRY varchar(15) NOT NULL,</text:p>
      <text:p text:style-name="P198"><text:s text:c="2"/>SALARY numeric(10,2) DEFAULT 0 NOT NULL,</text:p>
      <text:p text:style-name="P198"><text:s text:c="2"/>PRIMARY KEY (EMP_NO)</text:p>
      <text:p text:style-name="P198">);</text:p>
      <text:p text:style-name="P195">The above defines the table as consisting of ten columns. Each column is given a name and a data type. The table's primary key is the employee number (EMP_NO) <text:span text:style-name="T182">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96">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2">can be used to select data, and data values can be set to NULL. The Firebird Null Guide provides more information on the use of Nulls.</text:span></text:p>
      <text:p text:style-name="P199">An example of a Select Statement follows. This creates a temporary virtual dataset which can then be read by the requesting client.</text:p>
      <text:p text:style-name="P200">Select FIRST_NAME,LAST_NAME,EMP_NO,HIRE_DATE FROM EMPLOYEES</text:p>
      <text:p text:style-name="P200"><text:s text:c="2"/>Where LAST_NAME LIKE 'P%';</text:p>
      <text:p text:style-name="P199">The dataset returned by the above has only four columns and is filtered so that it comprises only the employees whose last name starts with the letter 'P'.</text:p>
      <text:p text:style-name="P201">Note: in SQL comparisons, the '%' character means any string.</text:p>
      <text:h text:style-name="P832" text:outline-level="2"><text:bookmark-start text:name="__RefHeading___Toc15570_148275515"/>The Firebird RDBMS<text:bookmark-end text:name="__RefHeading___Toc15570_148275515"/></text:h>
      <text:p text:style-name="P51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3">t</text:span> <text:span text:style-name="T183">generally</text:span> scale<text:span text:style-name="T183">s</text:span> well to larger applications, <text:span text:style-name="T201">as well</text:span>.</text:p>
      <text:p text:style-name="P515">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515">In its modern instantiation, Firebird:</text:p>
      <text:list text:style-name="L34">
        <text:list-item>
          <text:p text:style-name="P1049"><text:soft-page-break/>is a multi-user, transaction based RDBMS</text:p>
        </text:list-item>
        <text:list-item>
          <text:p text:style-name="P1049">uses SQL for Data Definition, Data Manipulation, Transaction Management and Procedure and Trigger Definition.</text:p>
        </text:list-item>
        <text:list-item>
          <text:p text:style-name="P1049">Deployed as either an embedded database engine (embedded server) or as a standalone server accessed using TCP/IP supporting both local and remote connections.</text:p>
        </text:list-item>
        <text:list-item>
          <text:p text:style-name="P1050">Uses a single file per database (with the option of secondary files to allow for overflow to separate filesystems).</text:p>
        </text:list-item>
        <text:list-item>
          <text:p text:style-name="P1049">Implementation packages are available for many platforms including Windows (32 and 64 bit), Linux (32 and 64 bit) and OSX.</text:p>
        </text:list-item>
      </text:list>
      <text:p text:style-name="P517">Firebird also includes the concept of “Events”. That is asynchronous alerts that are PSQL generated and which can be sent to an interested client. These are typically used from triggers to alert other users to changes in the data.</text:p>
      <text:h text:style-name="P833" text:outline-level="2"><text:bookmark-start text:name="__RefHeading___Toc15572_148275515"/>And then there was IBX<text:bookmark-end text:name="__RefHeading___Toc15572_148275515"/></text:h>
      <text:p text:style-name="P51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516">For 'C' programs, Firebird provides a pre-processor (gpre) that allows SQL statements to be embedded into the code and which <text:span text:style-name="T183">then </text:span>generates the 'C' code necessary to pass those statements to Firebird for execution and to pass input and receive output data to and from 'C' data structures. However, no such pre-processor is available for Pascal.</text:p>
      <text:p text:style-name="P516">When Borland released Delphi in the mid-nineties, it was arguably a revolutionary development i<text:span text:style-name="T183">n</text:span> visual programming. It also came with a model for database programming <text:span text:style-name="T183">that included</text:span> an abstract model of a dataset and “data aware” controls. That is a means to link the controls (or widgets) placed on forms with the fields in a dataset. This all works well as long as the abstract dataset can be somehow <text:span text:style-name="T183">made “concrete” and </text:span>linked to the datasets provided by the RDBMS that the developer wants to use.</text:p>
      <text:p text:style-name="P51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516">One improvement on this was the Free IB Components, written by Gregory H. Deatz for the <text:s text:c="2"/>Hoagland, Longo, Moran, Dunst &amp; Doukas Company. This was licensed by Borland and then provided with Delphi as InterBase Express (IBX).</text:p>
      <text:p text:style-name="P516">IBX provided a direct implementation of the abstract dataset model for InterBase, using the API direct from a Delphi (Pascal) program. It allowed the <text:span text:style-name="T163">programmer to define the datasets using SQL and to update data using SQL, whilst keeping within the Delphi dataset model. By making direct use of the InterBase API it potentially gives the best performance possible to a Delphi program.</text:span></text:p>
      <text:p text:style-name="P517">When Borland/Inprise released InterBase under an Open Source licence in 2000, it also released the IBX codebase under the same licence. In 201<text:span text:style-name="T168">1</text:span>, a fork of the IBX Open Source release was <text:soft-page-break/>used by MWA Software to create <text:span text:style-name="T12">IBX for Lazarus</text:span>. This version of IBX was developed to work with the Lazarus LCL and to use the Firebird RDBMS in either embedded or standalone server mode.</text:p>
      <text:p text:style-name="P517">Since its original release, <text:span text:style-name="T12">IBX for Lazarus</text:span> has been both maintained and extended with the introduction of additional components including an SQL Parser and script engine. In 2016, IBX2 included support for the new Firebird 3 API. <text:span text:style-name="T183">This version includes a separate set of Pascal Language Bindings (the </text:span><text:span text:style-name="T18">fbintf</text:span><text:span text:style-name="T183"> package) that provides the foundation for IBX2. The </text:span><text:span text:style-name="T18">fbintf</text:span><text:span text:style-name="T85"> package can be used to effectively embed SQL statements within Pascal code.</text:span></text:p>
      <text:h text:style-name="Heading_20_1" text:outline-level="1"><text:bookmark-start text:name="__RefHeading___Toc15574_148275515"/><text:line-break/><text:span text:style-name="T45">IBX Overview</text:span><text:bookmark-end text:name="__RefHeading___Toc15574_148275515"/></text:h>
      <text:p text:style-name="P54">The purpose of IBX is to provide an implementation of the TDataset model, and hence a data source for Data Aware components, and doing so by making direct use of the Firebird API. There is no middleware involved and the intent is to maximise performance. <text:span text:style-name="T81">IBX is intended to provide the best performance possible when using Firebird from a Pascal program.</text:span></text:p>
      <text:p text:style-name="P54">Firebird is an SQL database and a knowledge of SQL is generally necessary for all but basic use of IBX. IBX does not attempt to hide the SQL from the programmer<text:note text:id="ftn1" text:note-class="footnote"><text:note-citation>1</text:note-citation><text:note-body><text:p text:style-name="P530">The exception to this is the TIBTable and TIBStoredProc components. These can be used for simple database applications without requiring any SQL programming.</text:p></text:note-body></text:note>. Indeed, it gives the programmer full use of SQL.</text:p>
      <text:p text:style-name="P84">The <text:span text:style-name="T12">IBX </text:span><text:span text:style-name="T15">for Lazarus</text:span><text:span text:style-name="T119"> </text:span>components should behave identically to their Delphi equivalents and many online tutorials are available on how to use them. <text:span text:style-name="T81">An introduction to</text:span> their use <text:span text:style-name="T81">is</text:span> given below, and <text:span text:style-name="T81">many</text:span> example program<text:span text:style-name="T81">s</text:span> <text:span text:style-name="T81">are</text:span> also provided. </text:p>
      <text:h text:style-name="P834" text:outline-level="2"><text:bookmark-start text:name="__RefHeading___Toc15576_148275515"/>Conversion From Delphi IBX<text:bookmark-end text:name="__RefHeading___Toc15576_148275515"/></text:h>
      <text:p text:style-name="P84">You should be aware of the following issues:</text:p>
      <text:list text:style-name="L35">
        <text:list-item>
          <text:p text:style-name="P1133">The IBX components make use of the <text:span text:style-name="Symbol">TThread</text:span> <text:span text:style-name="T184">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33">Prior to FPC 2.6.0, the <text:span text:style-name="Symbol">TIntegerField</text:span> type may cause problems when porting code from Delphi to Lazarus. </text:p>
        </text:list-item>
        <text:list-item>
          <text:p text:style-name="P1133">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384">Alternatively, all <text:s/><text:span text:style-name="Symbol">TFmtBcdField</text:span> fields should be deleted prior to conversion and then recreated in the IDE.</text:p>
      <text:h text:style-name="P835" text:outline-level="2"><text:bookmark-start text:name="__RefHeading___Toc15578_148275515"/>IBX in Context<text:bookmark-end text:name="__RefHeading___Toc15578_148275515"/></text:h>
      <text:p text:style-name="P529">The following diagram attempts to position IBX with respect to other packages. As illustrated the <text:span text:style-name="T12">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531"><draw:frame draw:style-name="fr5" draw:name="Frame17" text:anchor-type="paragraph" svg:x="0.102in" svg:y="0.0555in" svg:width="6.4909in" draw:z-index="27"><draw:text-box fo:min-height="2.511in"><text:p text:style-name="P794"><draw:frame text:anchor-type="paragraph" draw:z-index="39" draw:name="Shape1" draw:style-name="gr1" draw:text-style-name="P1194" svg:width="0.4732in" svg:height="0.2886in" svg:x="3.2453in" svg:y="1.0126in"><draw:text-box><text:p><text:span text:style-name="T438">IBX</text:span></text:p></draw:text-box></draw:frame><draw:line text:anchor-type="paragraph" draw:z-index="38" draw:name="Shape2" draw:style-name="gr2" draw:text-style-name="P1195" svg:x1="2.8445in" svg:y1="1.0748in" svg:x2="2.8445in" svg:y2="0.8437in"><text:p/></draw:line><draw:line text:anchor-type="paragraph" draw:z-index="37" draw:name="Shape3" draw:style-name="gr2" draw:text-style-name="P1195" svg:x1="2.8445in" svg:y1="0.8437in" svg:x2="3.8618in" svg:y2="0.8437in"><text:p/></draw:line><draw:line text:anchor-type="paragraph" draw:z-index="36" draw:name="Shape4" draw:style-name="gr2" draw:text-style-name="P1195" svg:x1="3.8618in" svg:y1="1.3957in" svg:x2="3.8618in" svg:y2="0.8437in"><text:p/></draw:line><draw:line text:anchor-type="paragraph" draw:z-index="35" draw:name="Shape5" draw:style-name="gr3" draw:text-style-name="P1195" svg:x1="1.8028in" svg:y1="0.5071in" svg:x2="1.8028in" svg:y2="1.3961in"><text:p/></draw:line><draw:line text:anchor-type="paragraph" draw:z-index="34" draw:name="Shape6" draw:style-name="gr3" draw:text-style-name="P1195" svg:x1="2.5398in" svg:y1="0.5154in" svg:x2="2.5398in" svg:y2="1.0752in"><text:p/></draw:line><draw:line text:anchor-type="paragraph" draw:z-index="33" draw:name="Shape7" draw:style-name="gr3" draw:text-style-name="P1195" svg:x1="3.5016in" svg:y1="0.5311in" svg:x2="3.5098in" svg:y2="0.852in"><text:p/></draw:line><draw:line text:anchor-type="paragraph" draw:z-index="32" draw:name="Shape8" draw:style-name="gr3" draw:text-style-name="P1195" svg:x1="4.3984in" svg:y1="0.5634in" svg:x2="4.3909in" svg:y2="1.3961in"><text:p/></draw:line><draw:rect text:anchor-type="paragraph" draw:z-index="31" draw:name="Shape9" draw:style-name="gr4" draw:text-style-name="P1196" svg:width="0.9051in" svg:height="0.3213in" svg:x="2.0516in" svg:y="1.0752in"><text:p text:style-name="P1195"><text:span text:style-name="T438">LCL</text:span></text:p></draw:rect><draw:rect text:anchor-type="paragraph" draw:z-index="30" draw:name="Shape10" draw:style-name="gr4" draw:text-style-name="P1196" svg:width="1.7315in" svg:height="0.3213in" svg:x="1.6744in" svg:y="1.3957in"><text:p text:style-name="P1195"><text:span text:style-name="T438">FCL-DB</text:span></text:p></draw:rect><draw:rect text:anchor-type="paragraph" draw:z-index="29" draw:name="Shape11" draw:style-name="gr5" draw:text-style-name="P1197" svg:width="1.3543in" svg:height="0.3213in" svg:x="3.4055in" svg:y="1.3957in"><text:p text:style-name="P1195"><text:span text:style-name="T438">fbintf</text:span></text:p></draw:rect><draw:rect text:anchor-type="paragraph" draw:z-index="28" draw:name="Shape12" draw:style-name="gr6" draw:text-style-name="P1198" svg:width="1.3543in" svg:height="0.3213in" svg:x="3.4055in" svg:y="1.7165in"><text:p text:style-name="P1195"><text:span text:style-name="T438">Firebird Client API</text:span></text:p></draw:rect></text:p><text:p text:style-name="P794"/><text:p text:style-name="P794"/><text:p text:style-name="P794"/><text:p text:style-name="P794"/><text:p text:style-name="P794"/><text:p text:style-name="P794"/><text:p text:style-name="Illustration">Illustration <text:sequence text:ref-name="refIllustration0" text:name="Illustration" text:formula="ooow:Illustration+1" style:num-format="1">1</text:sequence>: How IBX Relates to other Packages</text:p></draw:text-box></draw:frame></text:p>
      <text:h text:style-name="P836" text:outline-level="2"><text:bookmark-start text:name="__RefHeading___Toc15343_252590906"/>IBX <text:span text:style-name="T322">Lazarus </text:span>Packages<text:bookmark-end text:name="__RefHeading___Toc15343_252590906"/></text:h>
      <text:p text:style-name="P60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text:style-name="L1">
              <text:list-item>
                <text:p text:style-name="P1109">ibnongui</text:p>
              </text:list-item>
            </text:list>
          </table:table-cell>
          <table:table-cell table:style-name="Table79.A1" office:value-type="string">
            <text:p text:style-name="P603">This is the base set of IBX components and comprises all common IBX components that do not require the LCL. Use this package in console mode applications.</text:p>
          </table:table-cell>
        </table:table-row>
        <table:table-row>
          <table:table-cell table:style-name="Table79.A1" office:value-type="string">
            <text:list text:continue-numbering="true" text:style-name="L1">
              <text:list-item>
                <text:p text:style-name="P1109">ibexpress</text:p>
              </text:list-item>
            </text:list>
          </table:table-cell>
          <table:table-cell table:style-name="Table79.A1" office:value-type="string">
            <text:p text:style-name="P603">This packages depends on ibnongui and adds the LCL dependent units. These provide the built in login dialogs and the “hour glass” cursor support for time consuming database operations. <text:span text:style-name="T322">Use this package for LCL based applications.</text:span></text:p>
          </table:table-cell>
        </table:table-row>
        <table:table-row>
          <table:table-cell table:style-name="Table79.A1" office:value-type="string">
            <text:list text:continue-numbering="true" text:style-name="L1">
              <text:list-item>
                <text:p text:style-name="P1109">ibLegacyServices</text:p>
              </text:list-item>
            </text:list>
          </table:table-cell>
          <table:table-cell table:style-name="Table79.A1" office:value-type="string">
            <text:p text:style-name="P603">This package depends on ibnongui and adds the legacy services API components contained in the IBServices unit (see <text:bookmark-ref text:reference-format="number" text:ref-name="__RefHeading___Toc28823_2092659162">Appendix A</text:bookmark-ref>). This may be used <text:span text:style-name="T322">i</text:span>n <text:span text:style-name="T322">both CLC </text:span>console mode applications.</text:p>
          </table:table-cell>
        </table:table-row>
        <text:soft-page-break/>
        <table:table-row>
          <table:table-cell table:style-name="Table79.A1" office:value-type="string">
            <text:list text:continue-numbering="true" text:style-name="L1">
              <text:list-item>
                <text:p text:style-name="P1109">iblocalnongui</text:p>
              </text:list-item>
            </text:list>
          </table:table-cell>
          <table:table-cell table:style-name="Table79.A1" office:value-type="string">
            <text:p text:style-name="P603">This package depends on ibnongui and adds the Personal Database support components (see <text:span text:style-name="T314">chapter</text:span> <text:bookmark-ref text:reference-format="number" text:ref-name="__RefHeading___Toc15001_252590906">11</text:bookmark-ref>) for console mode applications.</text:p>
          </table:table-cell>
        </table:table-row>
        <table:table-row>
          <table:table-cell table:style-name="Table79.A1" office:value-type="string">
            <text:list text:continue-numbering="true" text:style-name="L1">
              <text:list-item>
                <text:p text:style-name="P1109"><text:span text:style-name="T314">i</text:span>blocal</text:p>
              </text:list-item>
            </text:list>
          </table:table-cell>
          <table:table-cell table:style-name="Table79.A1" office:value-type="string">
            <text:p text:style-name="P603">This package depends on ibexpress and iblocalnongui and adds the Personal Database support components for LCL applications.</text:p>
          </table:table-cell>
        </table:table-row>
        <table:table-row>
          <table:table-cell table:style-name="Table79.A1" office:value-type="string">
            <text:list text:continue-numbering="true" text:style-name="L1">
              <text:list-item>
                <text:p text:style-name="P1109">ibcontrols</text:p>
              </text:list-item>
            </text:list>
          </table:table-cell>
          <table:table-cell table:style-name="Table79.A1" office:value-type="string">
            <text:p text:style-name="P603">This package depends on ibexpress and adds the <text:span text:style-name="T314">IBX Controls components (See chapter </text:span><text:span text:style-name="T314"><text:bookmark-ref text:reference-format="number" text:ref-name="__RefHeading__16255_274617472">Error: Reference source not found</text:bookmark-ref></text:span><text:span text:style-name="T314">).</text:span></text:p>
          </table:table-cell>
        </table:table-row>
        <table:table-row>
          <table:table-cell table:style-name="Table79.A1" office:value-type="string">
            <text:list text:continue-numbering="true" text:style-name="L1">
              <text:list-item>
                <text:p text:style-name="P1110">dclibx</text:p>
              </text:list-item>
            </text:list>
          </table:table-cell>
          <table:table-cell table:style-name="Table79.A1" office:value-type="string">
            <text:p text:style-name="P719">This is the design time package used to install IBX into the Lazarus IDE.</text:p>
          </table:table-cell>
        </table:table-row>
        <table:table-row>
          <table:table-cell table:style-name="Table79.A1" office:value-type="string">
            <text:list text:continue-numbering="true" text:style-name="L1">
              <text:list-item>
                <text:p text:style-name="P1110">ibexpressconsolemode</text:p>
              </text:list-item>
            </text:list>
          </table:table-cell>
          <table:table-cell table:style-name="Table79.A1" office:value-type="string">
            <text:p text:style-name="P719">In previous versions, this package was used by console mode applications using IBX. It is still available for legacy use and depends upon both ibnongui and iblocalnongui.</text:p>
          </table:table-cell>
        </table:table-row>
      </table:table>
      <text:p text:style-name="P720">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34" text:outline-level="2"><text:bookmark-start text:name="__RefHeading___Toc15580_148275515"/>Component Overview<text:bookmark-end text:name="__RefHeading___Toc15580_148275515"/></text:h>
      <text:p text:style-name="P5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160"><draw:frame draw:style-name="fr16" draw:name="Image14" text:anchor-type="paragraph" svg:x="0.0839in" svg:y="0.0327in" svg:width="0.3465in" svg:height="0.3465in" draw:z-index="6"><draw:image xlink:href="Pictures/1000000000000019000000199B10632A.png" xlink:type="simple" xlink:show="embed" xlink:actuate="onLoad" draw:mime-type="image/png"/></draw:frame></text:p>
          </table:table-cell>
          <table:table-cell table:style-name="Table1.A1" office:value-type="string">
            <text:p text:style-name="P160">TIBDatabase</text:p>
          </table:table-cell>
          <table:table-cell table:style-name="Table1.A1" office:value-type="string">
            <text:p text:style-name="P38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5">See </text:span><text:span text:style-name="T185"><text:bookmark-ref text:reference-format="number" text:ref-name="__RefHeading__24363_1844166745">5.1</text:bookmark-ref></text:span><text:span text:style-name="T185">.</text:span></text:p>
          </table:table-cell>
        </table:table-row>
        <table:table-row>
          <table:table-cell table:style-name="Table1.A1" office:value-type="string">
            <text:p text:style-name="P160"><draw:frame draw:style-name="fr9" draw:name="Image35" text:anchor-type="paragraph" svg:width="0.3465in" svg:height="0.3465in" draw:z-index="18"><draw:image xlink:href="Pictures/1000000000000019000000199A48145C.png" xlink:type="simple" xlink:show="embed" xlink:actuate="onLoad" draw:mime-type="image/png"/></draw:frame></text:p>
          </table:table-cell>
          <table:table-cell table:style-name="Table1.A1" office:value-type="string">
            <text:p text:style-name="P163">TIBDatabaseInfo</text:p>
          </table:table-cell>
          <table:table-cell table:style-name="Table1.A1" office:value-type="string">
            <text:p text:style-name="P668">This component supports a <text:span text:style-name="Symbol">TIBDatabase</text:span> and provides read only access to a database's properties and statistics. <text:span text:style-name="T185">See </text:span><text:span text:style-name="T185"><text:bookmark-ref text:reference-format="number" text:ref-name="__RefHeading__24365_1844166745">7.5</text:bookmark-ref></text:span><text:span text:style-name="T185">.</text:span></text:p>
          </table:table-cell>
        </table:table-row>
        <table:table-row>
          <table:table-cell table:style-name="Table1.A1" office:value-type="string">
            <text:p text:style-name="P160"><draw:frame draw:style-name="fr15" draw:name="Image15" text:anchor-type="paragraph" svg:x="0.0756in" svg:y="0.0311in" svg:width="0.3465in" svg:height="0.3465in" draw:z-index="17"><draw:image xlink:href="Pictures/10000000000000190000001943942CD6.png" xlink:type="simple" xlink:show="embed" xlink:actuate="onLoad" draw:mime-type="image/png"/></draw:frame></text:p>
          </table:table-cell>
          <table:table-cell table:style-name="Table1.A1" office:value-type="string">
            <text:p text:style-name="P160">TIBTransaction</text:p>
          </table:table-cell>
          <table:table-cell table:style-name="Table1.A1" office:value-type="string">
            <text:p text:style-name="P38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5">See </text:span><text:span text:style-name="T185"><text:bookmark-ref text:reference-format="number" text:ref-name="__RefHeading__24367_1844166745">5.2</text:bookmark-ref></text:span><text:span text:style-name="T185">.</text:span></text:p>
          </table:table-cell>
        </table:table-row>
        <table:table-row>
          <table:table-cell table:style-name="Table1.A1" office:value-type="string">
            <text:p text:style-name="P160"><draw:frame draw:style-name="fr9" draw:name="Image16" text:anchor-type="paragraph" svg:width="0.3465in" svg:height="0.3465in" draw:z-index="7"><draw:image xlink:href="Pictures/10000000000000190000001976A8C125.png" xlink:type="simple" xlink:show="embed" xlink:actuate="onLoad" draw:mime-type="image/png"/></draw:frame></text:p>
          </table:table-cell>
          <table:table-cell table:style-name="Table1.A1" office:value-type="string">
            <text:p text:style-name="P160">TIBQuery</text:p>
          </table:table-cell>
          <table:table-cell table:style-name="Table1.A1" office:value-type="string">
            <text:p text:style-name="P385">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62">The dataset is read only unless its “UpdateObject” property references a TIBUpdateSQL or a TIBUpdate object.</text:span></text:p>
            <text:p text:style-name="P386"><text:span text:style-name="T262">The TIBQuery's</text:span> properties must identify the database and the transaction used for executing the query. <text:span text:style-name="T185">See </text:span><text:span text:style-name="T185"><text:bookmark-ref text:reference-format="number" text:ref-name="__RefHeading__24369_1844166745">6.5</text:bookmark-ref></text:span><text:span text:style-name="T185">.</text:span></text:p>
          </table:table-cell>
        </table:table-row>
        <table:table-row>
          <table:table-cell table:style-name="Table1.A1" office:value-type="string">
            <text:p text:style-name="P160"><draw:frame draw:style-name="fr9" draw:name="Image17" text:anchor-type="paragraph" svg:width="0.3465in" svg:height="0.3465in" draw:z-index="40"><draw:image xlink:href="Pictures/10000000000000190000001973A45AB2.png" xlink:type="simple" xlink:show="embed" xlink:actuate="onLoad" draw:mime-type="image/png"/></draw:frame></text:p>
          </table:table-cell>
          <table:table-cell table:style-name="Table1.A1" office:value-type="string">
            <text:p text:style-name="P160">TIBUpdateSQL</text:p>
          </table:table-cell>
          <table:table-cell table:style-name="Table1.A1" office:value-type="string">
            <text:p text:style-name="P386">This component <text:span text:style-name="T262">may be referenced from</text:span> <text:span text:style-name="T227">a</text:span> TIBQuery component and is used to support updateable queries. It provides SQL statements to:</text:p>
            <text:list text:style-name="L2">
              <text:list-item>
                <text:p text:style-name="P1111">Delete the current row in the results set</text:p>
              </text:list-item>
              <text:list-item>
                <text:p text:style-name="P1111">Refresh (from the database) the current row in the results set</text:p>
              </text:list-item>
              <text:list-item>
                <text:p text:style-name="P1111">Update the current row in the database to match the (modified) values in the database</text:p>
              </text:list-item>
              <text:list-item>
                <text:p text:style-name="P1111">Insert a new row in<text:span text:style-name="T235">to</text:span> the database.</text:p>
              </text:list-item>
            </text:list>
            <text:p text:style-name="P681">See <text:bookmark-ref text:reference-format="number" text:ref-name="__RefHeading__6726_274617472">6.6</text:bookmark-ref>.</text:p>
          </table:table-cell>
        </table:table-row>
        <table:table-row>
          <table:table-cell table:style-name="Table1.A1" office:value-type="string">
            <text:p text:style-name="P160"><draw:frame draw:style-name="fr9" draw:name="Image39" text:anchor-type="paragraph" svg:width="0.3465in" svg:height="0.3465in" draw:z-index="41"><draw:image xlink:href="Pictures/1000000000000019000000192676207B.png" xlink:type="simple" xlink:show="embed" xlink:actuate="onLoad" draw:mime-type="image/png"/></draw:frame></text:p>
          </table:table-cell>
          <table:table-cell table:style-name="Table1.A1" office:value-type="string">
            <text:p text:style-name="P165">TIBUpdate</text:p>
          </table:table-cell>
          <table:table-cell table:style-name="Table1.A1" office:value-type="string">
            <text:p text:style-name="P694">This component <text:span text:style-name="T262">may be referenced from</text:span> <text:span text:style-name="T227">a</text:span> TIBQuery component and is <text:span text:style-name="T224">a more general way</text:span> to support updateable queries <text:span text:style-name="T22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160"><draw:frame draw:style-name="fr9" draw:name="Image18" text:anchor-type="paragraph" svg:width="0.3465in" svg:height="0.3465in" draw:z-index="8"><draw:image xlink:href="Pictures/10000000000000190000001986671082.png" xlink:type="simple" xlink:show="embed" xlink:actuate="onLoad" draw:mime-type="image/png"/></draw:frame></text:p>
          </table:table-cell>
          <table:table-cell table:style-name="Table1.A1" office:value-type="string">
            <text:p text:style-name="P160">TIBDataSet</text:p>
          </table:table-cell>
          <table:table-cell table:style-name="Table1.A1" office:value-type="string">
            <text:p text:style-name="P385">This is also a <text:span text:style-name="Symbol">TDataset</text:span> descendent and combines the functionality of <text:span text:style-name="Symbol">TIBQuery</text:span> and <text:span text:style-name="Symbol">TIBUpdateSQL</text:span> into a single component. <text:span text:style-name="T186">See </text:span><text:span text:style-name="T186"><text:bookmark-ref text:reference-format="number" text:ref-name="__RefHeading__24565_1844166745">6.7</text:bookmark-ref></text:span><text:span text:style-name="T186">.</text:span></text:p>
            <text:p text:style-name="P385">Its properties must identify the database and the transaction used for executing the query.</text:p>
            <text:p text:style-name="P386">You will normally want to use <text:span text:style-name="Symbol">TIBDataset</text:span> instead of a TIBQuery and TIBUpdateSQL pair. <text:span text:style-name="T235">Alternatively, t</text:span>he latter combination <text:span text:style-name="T235">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160"><draw:frame draw:style-name="fr9" draw:name="Image19" text:anchor-type="paragraph" svg:width="0.3465in" svg:height="0.3465in" draw:z-index="9"><draw:image xlink:href="Pictures/1000000000000019000000194EA42036.png" xlink:type="simple" xlink:show="embed" xlink:actuate="onLoad" draw:mime-type="image/png"/></draw:frame></text:p>
          </table:table-cell>
          <table:table-cell table:style-name="Table1.A1" office:value-type="string">
            <text:p text:style-name="P160">TIBStoredProc</text:p>
          </table:table-cell>
          <table:table-cell table:style-name="Table1.A1" office:value-type="string">
            <text:p text:style-name="P385">This component is used to execute a stored procedure (on the Database Server), <text:span text:style-name="T134">and</text:span> one that does not generate a results set. Its properties must identify the database and the transaction used for <text:soft-page-break/>executing the query. <text:span text:style-name="T186">See </text:span><text:span text:style-name="T186"><text:bookmark-ref text:reference-format="number" text:ref-name="__RefHeading__24569_1844166745">6.4</text:bookmark-ref></text:span><text:span text:style-name="T186">.</text:span></text:p>
          </table:table-cell>
        </table:table-row>
        <table:table-row>
          <table:table-cell table:style-name="Table1.A1" office:value-type="string">
            <text:p text:style-name="P160"><draw:frame draw:style-name="fr9" draw:name="Image20" text:anchor-type="paragraph" svg:width="0.3465in" svg:height="0.3465in" draw:z-index="10"><draw:image xlink:href="Pictures/1000000000000019000000191F9FD4A0.png" xlink:type="simple" xlink:show="embed" xlink:actuate="onLoad" draw:mime-type="image/png"/></draw:frame></text:p>
          </table:table-cell>
          <table:table-cell table:style-name="Table1.A1" office:value-type="string">
            <text:p text:style-name="P160">TIBSQL</text:p>
          </table:table-cell>
          <table:table-cell table:style-name="Table1.A1" office:value-type="string">
            <text:p text:style-name="P38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85">Its properties must identify the database and the transaction used for executing the query.</text:p>
            <text:p text:style-name="P386"><text:span text:style-name="Symbol">TIBSQL</text:span> is essentially an object oriented encapsulation of the Firebird DSQL API. <text:span text:style-name="T186">See </text:span><text:span text:style-name="T186"><text:bookmark-ref text:reference-format="number" text:ref-name="__RefHeading__24369_1844166745">6.5</text:bookmark-ref></text:span><text:span text:style-name="T186">.</text:span></text:p>
          </table:table-cell>
        </table:table-row>
        <table:table-row>
          <table:table-cell table:style-name="Table1.A1" office:value-type="string">
            <text:p text:style-name="P160"><draw:frame draw:style-name="fr12" draw:name="Image21" text:anchor-type="paragraph" svg:width="0.3465in" svg:height="0.3465in" draw:z-index="11"><draw:image xlink:href="Pictures/100000000000001900000019930F54A6.png" xlink:type="simple" xlink:show="embed" xlink:actuate="onLoad" draw:mime-type="image/png"/></draw:frame></text:p>
          </table:table-cell>
          <table:table-cell table:style-name="Table1.A1" office:value-type="string">
            <text:p text:style-name="P160">TIBEvents</text:p>
          </table:table-cell>
          <table:table-cell table:style-name="Table1.A1" office:value-type="string">
            <text:p text:style-name="P38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8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85">The event notification is asynchronous and takes place at the end of the transaction in which the event was generated. A separate thread is <text:span text:style-name="T81">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86">See </text:span><text:span text:style-name="T186"><text:bookmark-ref text:reference-format="number" text:ref-name="__RefHeading__24771_1844166745">5.3</text:bookmark-ref></text:span><text:span text:style-name="T186">.</text:span></text:p>
          </table:table-cell>
        </table:table-row>
        <table:table-row>
          <table:table-cell table:style-name="Table1.A1" office:value-type="string">
            <text:p text:style-name="P160"><draw:frame draw:style-name="fr9" draw:name="Image22" text:anchor-type="paragraph" svg:width="0.3465in" svg:height="0.3465in" draw:z-index="12"><draw:image xlink:href="Pictures/100000000000001900000019E31AFE46.png" xlink:type="simple" xlink:show="embed" xlink:actuate="onLoad" draw:mime-type="image/png"/></draw:frame></text:p>
          </table:table-cell>
          <table:table-cell table:style-name="Table1.A1" office:value-type="string">
            <text:p text:style-name="P160">TIBSQLMonitor</text:p>
          </table:table-cell>
          <table:table-cell table:style-name="Table1.A1" office:value-type="string">
            <text:p text:style-name="P385">This component supports debugging and performance tuning by allowing one process to monitor the SQL function calls in the same or another process (on the same system).</text:p>
            <text:p text:style-name="P385">The <text:span text:style-name="Symbol">TIBDatabase</text:span> trace flags determine which function calls can be traced with respect to its databa<text:span text:style-name="T81">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385">To receive SQL Function call traces, you need to place a <text:span text:style-name="Symbol">TIBSQLMon</text:span><text:span text:style-name="Symbol"><text:span text:style-name="T187">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87">See </text:span><text:span text:style-name="T187"><text:bookmark-ref text:reference-format="number" text:ref-name="__RefHeading__24773_1844166745">7.4</text:bookmark-ref></text:span><text:span text:style-name="T187">.</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160"><draw:frame draw:style-name="fr9" draw:name="Image23" text:anchor-type="paragraph" svg:width="0.3465in" svg:height="0.3465in" draw:z-index="13"><draw:image xlink:href="Pictures/1000000000000019000000192DA9B8C8.png" xlink:type="simple" xlink:show="embed" xlink:actuate="onLoad" draw:mime-type="image/png"/></draw:frame></text:p>
          </table:table-cell>
          <table:table-cell table:style-name="Table1.A1" office:value-type="string">
            <text:p text:style-name="P160">TIBTable</text:p>
          </table:table-cell>
          <table:table-cell table:style-name="Table1.A1" office:value-type="string">
            <text:p text:style-name="P38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81">for most applications</text:span>. <text:span text:style-name="T129">It also supports Master/Detail relationships between linked tables. See </text:span><text:span text:style-name="T129"><text:bookmark-ref text:reference-format="number" text:ref-name="__RefHeading__24776_1844166745">6.3</text:bookmark-ref></text:span><text:span text:style-name="T129">.</text:span></text:p>
          </table:table-cell>
        </table:table-row>
        <table:table-row>
          <table:table-cell table:style-name="Table1.A1" office:value-type="string">
            <text:p text:style-name="P160"><draw:frame draw:style-name="fr9" draw:name="Image24" text:anchor-type="paragraph" svg:width="0.3465in" svg:height="0.3465in" draw:z-index="14"><draw:image xlink:href="Pictures/10000000000000190000001965A75367.png" xlink:type="simple" xlink:show="embed" xlink:actuate="onLoad" draw:mime-type="image/png"/></draw:frame></text:p>
          </table:table-cell>
          <table:table-cell table:style-name="Table1.A1" office:value-type="string">
            <text:p text:style-name="P160">TIBExtract</text:p>
          </table:table-cell>
          <table:table-cell table:style-name="Table1.A1" office:value-type="string">
            <text:p text:style-name="P385">This component allows the extract of database metadata. <text:span text:style-name="T176">The component is intended to be compliant with all Firebird extensions to the DDL up to and including Firebird 3. See </text:span><text:span text:style-name="T176"><text:bookmark-ref text:reference-format="number" text:ref-name="__RefHeading__24778_1844166745">7.6</text:bookmark-ref></text:span><text:span text:style-name="T176">.</text:span></text:p>
          </table:table-cell>
        </table:table-row>
        <table:table-row>
          <table:table-cell table:style-name="Table1.A1" office:value-type="string">
            <text:p text:style-name="P160"><draw:frame draw:style-name="fr9" draw:name="Image25" text:anchor-type="paragraph" svg:width="0.3465in" svg:height="0.3465in" draw:z-index="15"><draw:image xlink:href="Pictures/100000000000001900000019DC17AE9D.png" xlink:type="simple" xlink:show="embed" xlink:actuate="onLoad" draw:mime-type="image/png"/></draw:frame></text:p>
          </table:table-cell>
          <table:table-cell table:style-name="Table1.A1" office:value-type="string">
            <text:p text:style-name="P160">TIBBatchMove</text:p>
          </table:table-cell>
          <table:table-cell table:style-name="Table1.A1" office:value-type="string">
            <text:p text:style-name="P385">This component supports a table to table copy from a source IBX dataset to a <text:span text:style-name="Symbol">TIBTable</text:span>.</text:p>
          </table:table-cell>
        </table:table-row>
        <table:table-row>
          <table:table-cell table:style-name="Table1.A1" office:value-type="string">
            <text:p text:style-name="P159"><draw:frame draw:style-name="fr9" draw:name="Image26" text:anchor-type="paragraph" svg:width="0.3465in" svg:height="0.3465in" draw:z-index="16"><draw:image xlink:href="Pictures/10000001000000190000001993DFF7DB.png" xlink:type="simple" xlink:show="embed" xlink:actuate="onLoad" draw:mime-type="image/png"/></draw:frame></text:p>
          </table:table-cell>
          <table:table-cell table:style-name="Table1.A1" office:value-type="string">
            <text:p text:style-name="P159">TIBXScript</text:p>
          </table:table-cell>
          <table:table-cell table:style-name="Table1.A1" office:value-type="string">
            <text:p text:style-name="P635">This component is used to run an SQL script in the specified file or stream. The text is parsed into SQL statements which are executed in turn. The intention is to be ISQL compatible but with extensions. <text:span text:style-name="T187">See </text:span><text:span text:style-name="T187"><text:bookmark-ref text:reference-format="number" text:ref-name="__RefHeading__24780_1844166745">7.1</text:bookmark-ref></text:span><text:span text:style-name="T187">.</text:span></text:p>
          </table:table-cell>
        </table:table-row>
      </table:table>
      <text:p text:style-name="P53">The Firebird Admin tab provides the Service API components. These support various server side functions including user password maintenance and database backup/restore <text:span text:style-name="T119">(see </text:span><text:span text:style-name="T119"><text:bookmark-ref text:reference-format="number" text:ref-name="__RefHeading__13111_1991610482">10.2</text:bookmark-ref></text:span><text:span text:style-name="T119">)</text:span>.</text:p>
      <text:h text:style-name="P837" text:outline-level="2"><text:bookmark-start text:name="__RefHeading___Toc15582_148275515"/><text:span text:style-name="T103">Databases and </text:span>Transactions<text:bookmark-end text:name="__RefHeading___Toc15582_148275515"/></text:h>
      <text:p text:style-name="P460">IBX always access a database through a “connection” <text:span text:style-name="T187">whether</text:span> it is a local database or a remote one. Data is the read and written in the context of a transaction. Transactions exist:</text:p>
      <text:list text:style-name="L36">
        <text:list-item>
          <text:p text:style-name="P1051">to isolate users from each other, </text:p>
        </text:list-item>
        <text:list-item>
          <text:p text:style-name="P1051">to allow a user to see a consistent view of the data independent of what other users are doing, </text:p>
        </text:list-item>
        <text:list-item>
          <text:p text:style-name="P1051">to allow users to lock data for change and to control whether other users wait on such locked data, and</text:p>
        </text:list-item>
        <text:list-item>
          <text:p text:style-name="P1051">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0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09">At least one <text:span text:style-name="Symbol">TIBDatabase</text:span> <text:span text:style-name="T187">(see </text:span><text:span text:style-name="T187"><text:bookmark-ref text:reference-format="number" text:ref-name="__RefHeading__24363_1844166745">5.1</text:bookmark-ref></text:span><text:span text:style-name="T187">) </text:span>and one <text:span text:style-name="Symbol">TIBTransaction</text:span> <text:span text:style-name="T187">(see </text:span><text:span text:style-name="T187"><text:bookmark-ref text:reference-format="number" text:ref-name="__RefHeading__24367_1844166745">5.2</text:bookmark-ref></text:span><text:span text:style-name="T187">)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111">The <text:span text:style-name="Symbol">TIBDatabase</text:span> component's properties identify the location of the database and provide the logon parameters. It can also use a built in dialog to prompt for a user name/password or use an <text:soft-page-break/>application provided dialog. A default transaction is also identified in the <text:span text:style-name="Symbol">TIBDatabase</text:span> properties. <text:span text:style-name="T187">Datasets linked to this database automatically use the default transaction unless this is explicitly overridden in the dataset's properties.</text:span></text:p>
      <text:p text:style-name="P109"><text:span text:style-name="Symbol">TIBTransaction</text:span> <text:span text:style-name="T119">represents a transaction, and</text:span>, you can have as many <text:span text:style-name="Symbol">TIBTransaction</text:span> component<text:span text:style-name="T119">s</text:span> as necessary. <text:span text:style-name="T119">A </text:span><text:span text:style-name="Symbol"><text:span text:style-name="T119">TIBTransaction</text:span></text:span><text:span text:style-name="T119"> is normally linked to single database (</text:span><text:span text:style-name="Symbol"><text:span text:style-name="T119">TIBDatabase</text:span></text:span><text:span text:style-name="T119">) but can be linked to multiple databases in order to synchronise updates to them.</text:span></text:p>
      <text:h text:style-name="P838" text:outline-level="2"><text:bookmark-start text:name="__RefHeading___Toc15584_148275515"/>Datasets<text:bookmark-end text:name="__RefHeading___Toc15584_148275515"/></text:h>
      <text:p text:style-name="P422">The TDataset model is integral to the managing the relationship between Data Aware controls and database tables in both Lazarus and Delphi. A <text:span text:style-name="Symbol">TDataset</text:span> <text:span text:style-name="T187">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36">ed</text:span>. A control such as TDBGrid allows multiple rows to be shown together and as a table.</text:p>
      <text:p text:style-name="P42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92" text:outline-level="3"><text:bookmark-start text:name="__RefHeading___Toc15586_148275515"/>Datasets and Transactions<text:bookmark-end text:name="__RefHeading___Toc15586_148275515"/></text:h>
      <text:p text:style-name="P108">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text:style-name="L37">
        <text:list-item>
          <text:p text:style-name="P1134"><text:span text:style-name="T103">In the most basic case, </text:span>the first dataset to be activated implicitly starts the transaction <text:span text:style-name="T103">(as long as its </text:span><text:span text:style-name="Symbol"><text:span text:style-name="T103">AutoActivateTransaction</text:span></text:span><text:span text:style-name="T103">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34">In a more advanced application <text:span text:style-name="T119">(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86">Note that when a transaction ends, all datasets referencing the transaction are automatically deactivated. A new transaction has to be started and those datasets reactivated if they are to continue to be populated.</text:p>
      <text:p text:style-name="P108"><draw:frame draw:style-name="fr3" draw:name="Frame13" text:anchor-type="paragraph" svg:width="6.6953in" draw:z-index="4"><draw:text-box fo:min-height="3.9854in"><text:p text:style-name="Illustration"><draw:frame draw:style-name="fr13" draw:name="Image13" text:anchor-type="paragraph" svg:width="6.6953in" style:rel-width="100%" svg:height="3.6102in" style:rel-height="scale" draw:z-index="5"><draw:image xlink:href="Pictures/10000000000003AE000001FC9112FDB8.png" xlink:type="simple" xlink:show="embed" xlink:actuate="onLoad" draw: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92" text:outline-level="3"><text:bookmark-start text:name="__RefHeading___Toc15588_148275515"/>Single Table Datasets<text:bookmark-end text:name="__RefHeading___Toc15588_148275515"/></text:h>
      <text:p text:style-name="P42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42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92" text:outline-level="3"><text:bookmark-start text:name="__RefHeading___Toc15590_148275515"/>SQL Defined Datasets<text:bookmark-end text:name="__RefHeading___Toc15590_148275515"/></text:h>
      <text:p text:style-name="P423">IBX also provide<text:span text:style-name="T119">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42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422"><text:soft-page-break/>More generally, <text:span text:style-name="Symbol">TIBDataset</text:span> is a component that allows you to specify the Select, Update, Insert, Delete and Refresh queries in one component. </text:p>
      <text:h text:style-name="P839" text:outline-level="2"><text:bookmark-start text:name="__RefHeading___Toc15592_148275515"/>Examples<text:bookmark-end text:name="__RefHeading___Toc15592_148275515"/></text:h>
      <text:p text:style-name="P424">The ibx/example/employee example application provides an example of the use of the <text:span text:style-name="Symbol">TIBData</text:span><text:span text:style-name="Symbol"><text:span text:style-name="T119">b</text:span></text:span><text:span text:style-name="Symbol">ase, TIBTransaction, TIBQuery</text:span> and <text:span text:style-name="Symbol">TIBDataset</text:span> components supporting data aware components for viewing and editing data from a database.</text:p>
      <text:h text:style-name="P816" text:outline-level="1"><text:bookmark-start text:name="__RefHeading___Toc15594_148275515"/><text:line-break/><text:span text:style-name="T45">The Database Access Components</text:span><text:bookmark-end text:name="__RefHeading___Toc15594_148275515"/></text:h>
      <text:p text:style-name="P461">The IBX components are presented here in <text:span text:style-name="T189">three</text:span> main groups. This chapter is concerned <text:span text:style-name="T237">with</text:span> the “<text:span text:style-name="T154">Database Access</text:span>” set of components. Chapter <text:bookmark-ref text:reference-format="number" text:ref-name="__RefHeading__13244_1991610482">6</text:bookmark-ref><text:s/>is concerned with the dataset components, <text:span text:style-name="T189">while chapter </text:span><text:span text:style-name="T189"><text:bookmark-ref text:reference-format="number" text:ref-name="__RefHeading__24996_1844166745">7</text:bookmark-ref></text:span><text:span text:style-name="T189"><text:s/>presents support components.</text:span></text:p>
      <text:p text:style-name="P425">The IBX <text:span text:style-name="T154">Database Access</text:span> components are simply those components that are little more than “wrappers for interfaces exported by the <text:span text:style-name="T12">fbintf</text:span><text:span text:style-name="T82"> package, </text:span><text:span text:style-name="T84">and</text:span><text:span text:style-name="T82"> are:</text:span></text:p>
      <text:list text:style-name="L38">
        <text:list-item>
          <text:p text:style-name="P1052">TIBDatabase – encapsulates the IAttachment interface</text:p>
        </text:list-item>
        <text:list-item>
          <text:p text:style-name="P1053">TIBTransaction – encapsulates the ITransaction interface</text:p>
        </text:list-item>
        <text:list-item>
          <text:p text:style-name="P1053">TIBEvent – encapsulates the IEvents interface</text:p>
        </text:list-item>
        <text:list-item>
          <text:p text:style-name="P1053">TIBSQL – encapsulates the IStatement interface.</text:p>
        </text:list-item>
      </text:list>
      <text:p text:style-name="P66">The Firebird Pascal API describes each of these interfaces in detail and how to use them. <text:span text:style-name="T120">However, when using</text:span>, you should use the methods and properties provided by the component in preference to similar methods and properties provided by the underlying interface, except as described below.</text:p>
      <text:h text:style-name="P840" text:outline-level="2"><text:bookmark-start text:name="__RefHeading__24363_1844166745"/>TIBDatabase<text:bookmark-end text:name="__RefHeading__24363_1844166745"/></text:h>
      <text:p text:style-name="P426"><text:span text:style-name="T82">This is </text:span><text:span text:style-name="T84">a non-visual component and </text:span><text:span text:style-name="T82">a </text:span><text:span text:style-name="Symbol"><text:span text:style-name="T82">TCustomConnection</text:span></text:span><text:span text:style-name="T82"> descendent. </text:span><text:span text:style-name="T84">It</text:span><text:span text:style-name="T82"> provides the link between the database connection as viewed by the </text:span><text:span text:style-name="Symbol"><text:span text:style-name="T82">TDataset</text:span></text:span><text:span text:style-name="T82"> model and the Firebird database connection.</text:span></text:p>
      <text:h text:style-name="Heading_20_3" text:outline-level="3"><text:bookmark-start text:name="__RefHeading___Toc23228_1057110216"/><text:span text:style-name="T86">Highlighted</text:span><text:span text:style-name="T84">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462"><text:span text:style-name="Symbol">Connected</text:span></text:p>
          </table:table-cell>
          <table:table-cell table:style-name="Table24.B1" office:value-type="string">
            <text:p text:style-name="P462">Set this property to true to connect to a database and to false to disconnect.</text:p>
          </table:table-cell>
        </table:table-row>
        <table:table-row>
          <table:table-cell table:style-name="Table24.A2" office:value-type="string">
            <text:p text:style-name="P462"><text:span text:style-name="Symbol">AllowStreamConnected</text:span></text:p>
          </table:table-cell>
          <table:table-cell table:style-name="Table24.B2" office:value-type="string">
            <text:p text:style-name="P501">This property exists to avoid a conflict between connecting to a database at design time and automatically connecting at run time. <text:span text:style-name="T121">(see </text:span><text:span text:style-name="T121"><text:bookmark-ref text:reference-format="number" text:ref-name="__RefHeading__15925_274617472">5.1.11</text:bookmark-ref></text:span><text:span text:style-name="T121">).</text:span></text:p>
          </table:table-cell>
        </table:table-row>
        <text:soft-page-break/>
        <table:table-row>
          <table:table-cell table:style-name="Table24.A2" office:value-type="string">
            <text:p text:style-name="P343"><text:span text:style-name="Symbol">ConfigOverrides</text:span></text:p>
          </table:table-cell>
          <table:table-cell table:style-name="Table24.B2" office:value-type="string">
            <text:p text:style-name="P343">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661"><text:span text:style-name="Symbol">CreateIfNotExists</text:span></text:p>
          </table:table-cell>
          <table:table-cell table:style-name="Table24.B2" office:value-type="string">
            <text:p text:style-name="P663">New in IBX2: If true, and an attempt is made to <text:span text:style-name="T237">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661"><text:span text:style-name="Symbol">DatabaseName</text:span></text:p>
          </table:table-cell>
          <table:table-cell table:style-name="Table24.B2" office:value-type="string">
            <text:p text:style-name="P663"><text:span text:style-name="T342">The database connection string including</text:span> the server name <text:span text:style-name="T342">(localhost or empty for a local server) and the database path or alias</text:span>. The format varies depending on the connection protocol used and the way pathnames are expressed on the target system. See the Firebird documentation for more information. <text:span text:style-name="T342">e.g.</text:span></text:p>
            <text:p text:style-name="P726"><text:span text:style-name="Symbol">inet://myserver/employee</text:span></text:p>
            <text:p text:style-name="P726">is the connect string for the example employee database on “myserver” using TCP as the connection protocol.</text:p>
            <text:p text:style-name="P57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661"><text:span text:style-name="Symbol">DefaultTransaction</text:span></text:p>
          </table:table-cell>
          <table:table-cell table:style-name="Table24.B2" office:value-type="string">
            <text:p text:style-name="P663">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1"><text:span text:style-name="Symbol">FirebirdLibraryPathName</text:span></text:p>
          </table:table-cell>
          <table:table-cell table:style-name="Table24.B2" office:value-type="string">
            <text:p text:style-name="P727">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46">(see also </text:span><text:span text:style-name="T346"><text:bookmark-ref text:reference-format="number" text:ref-name="__RefHeading___Toc22717_858839226">5.1.12</text:bookmark-ref></text:span><text:span text:style-name="T346">).</text:span></text:p>
            <text:p text:style-name="P728">Note: the pathname <text:span text:style-name="T346">syntax </text:span><text:s/>is platform dependent.</text:p>
          </table:table-cell>
        </table:table-row>
        <table:table-row>
          <table:table-cell table:style-name="Table24.A2" office:value-type="string">
            <text:p text:style-name="P727"><text:span text:style-name="Symbol">FirebirdAPI</text:span></text:p>
          </table:table-cell>
          <table:table-cell table:style-name="Table24.B2" office:value-type="string">
            <text:p text:style-name="P727">This read only public property returns the IFirebirdAPI interface to the Firebird Library used to access the database.</text:p>
          </table:table-cell>
        </table:table-row>
        <table:table-row>
          <table:table-cell table:style-name="Table24.A2" office:value-type="string">
            <text:p text:style-name="P662"><text:span text:style-name="Symbol">IdleTimer</text:span></text:p>
          </table:table-cell>
          <table:table-cell table:style-name="Table24.B2" office:value-type="string">
            <text:p text:style-name="P663">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662"><text:span text:style-name="Symbol">LoginPrompt</text:span></text:p>
          </table:table-cell>
          <table:table-cell table:style-name="Table24.B2" office:value-type="string">
            <text:p text:style-name="P663">When true, the a login dialog is shown to the user to confirm the database user name (as given in the <text:span text:style-name="Symbol"><text:span text:style-name="T189">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ext:soft-page-break/>
        <table:table-row>
          <table:table-cell table:style-name="Table24.A2" office:value-type="string">
            <text:p text:style-name="P662"><text:span text:style-name="Symbol">Params</text:span></text:p>
          </table:table-cell>
          <table:table-cell table:style-name="Table24.B2" office:value-type="string">
            <text:p text:style-name="P464">This is a list of parameter values to be used in the Database Parameter Block (DPB) at connect time. These are in “keyword=” format. See below.</text:p>
          </table:table-cell>
        </table:table-row>
        <table:table-row>
          <table:table-cell table:style-name="Table24.A2" office:value-type="string">
            <text:p text:style-name="P662"><text:span text:style-name="Symbol">SQLDialect</text:span></text:p>
          </table:table-cell>
          <table:table-cell table:style-name="Table24.B2" office:value-type="string">
            <text:p text:style-name="P464">The default SQL dialect to be used for <text:span text:style-name="T285">when creating a database</text:span> (3 is recommended). See Firebird Documentation.</text:p>
          </table:table-cell>
        </table:table-row>
        <table:table-row>
          <table:table-cell table:style-name="Table24.A2" office:value-type="string">
            <text:p text:style-name="P662"><text:span text:style-name="Symbol">SQLHourGlass</text:span></text:p>
          </table:table-cell>
          <table:table-cell table:style-name="Table24.B2" office:value-type="string">
            <text:p text:style-name="P464">If true, then the cursor is changed to an Hour Glass <text:span text:style-name="T237">(or equivalent)</text:span> during calls to the database server.</text:p>
          </table:table-cell>
        </table:table-row>
        <table:table-row>
          <table:table-cell table:style-name="Table24.A2" office:value-type="string">
            <text:p text:style-name="P464"><text:span text:style-name="Symbol">UseSystemDefaultCodePage</text:span></text:p>
          </table:table-cell>
          <table:table-cell table:style-name="Table24.B2" office:value-type="string">
            <text:p text:style-name="P464">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343"><text:span text:style-name="Symbol">WireCompression</text:span></text:p>
          </table:table-cell>
          <table:table-cell table:style-name="Table24.B2" office:value-type="string">
            <text:p text:style-name="P343">This is a “convenience” property. If set to true then “WireCompression=true” is added to the ConfigOverrides property, If set to false then then “WireCompression=” line is removed from ConfigOverrides.</text:p>
            <text:p text:style-name="P344">Note: you may set “WireCompression=false” explicitly in the ConfigOverrides in order to override a default of “WireCompression=true”.</text:p>
          </table:table-cell>
        </table:table-row>
      </table:table>
      <text:p text:style-name="P67"/>
      <text:h text:style-name="Heading_20_3" text:outline-level="3"><text:bookmark-start text:name="__RefHeading___Toc13989_1530645906"/>DatabaseName Macros<text:bookmark-end text:name="__RefHeading___Toc13989_1530645906"/></text:h>
      <text:p text:style-name="P573">In order to aid the development of cross platform applications that use local databases in well known locations, from IBX 2.2 onwards, the DatabaseName property value can include simple macros used as prefixes for database names.</text:p>
      <text:p text:style-name="P573">The following prefixes are available:</text:p>
      <text:list text:style-name="L39">
        <text:list-item>
          <text:p text:style-name="P1054">$TEMP$</text:p>
        </text:list-item>
      </text:list>
      <text:p text:style-name="P397">Before connecting to a database, this is replaced with <text:span text:style-name="T278">the local system's temp directory (including trailing delimiter).</text:span></text:p>
      <text:list text:continue-numbering="true" text:style-name="L39">
        <text:list-item>
          <text:p text:style-name="P1054">$DATADIR$</text:p>
        </text:list-item>
      </text:list>
      <text:p text:style-name="P397">Before connecting to a database, this is replaced with <text:span text:style-name="T278">a prescribed data directory (including trailing delimiter).</text:span></text:p>
      <text:p text:style-name="P575">Under Unix systems the data directory is a hidden directory in the user's home directory. The hidden directory name is either the string returned from the SysUtils "VendorName" or "IBX" if empty. In either case prefixed by a '.'. </text:p>
      <text:p text:style-name="P575">Under Windows, the directory is either the string returned from the SysUtils "VendorName" or "IBX" if empty. In either case prefixed by the User's application data path. </text:p>
      <text:p text:style-name="P398">For example: “$TEMP$1DTest.fdb” is expanded on Linux to “/tmp/1DTest.fdb”.</text:p>
      <text:p text:style-name="Highlighted"><text:soft-page-break/><text:span text:style-name="T279">Note: </text:span>These <text:span text:style-name="T279">macros are used in the IBX examples to avoid platform dependencies</text:span>. </text:p>
      <text:h text:style-name="P893" text:outline-level="3"><text:bookmark-start text:name="__RefHeading___Toc15596_148275515"/>Parameter Keywords<text:bookmark-end text:name="__RefHeading___Toc15596_148275515"/></text:h>
      <text:p text:style-name="P463">The parameters are best edited at design time using the database dialog editor (<text:span text:style-name="T189">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64"><text:span text:style-name="Symbol">user_name</text:span></text:p>
          </table:table-cell>
          <table:table-cell table:style-name="Table25.B1" office:value-type="string">
            <text:p text:style-name="P464">Login user name</text:p>
          </table:table-cell>
        </table:table-row>
        <table:table-row>
          <table:table-cell table:style-name="Table25.A2" office:value-type="string">
            <text:p text:style-name="P464"><text:span text:style-name="Symbol">password</text:span></text:p>
          </table:table-cell>
          <table:table-cell table:style-name="Table25.B2" office:value-type="string">
            <text:p text:style-name="P464">Login password (use of this parameter to save a password at dedign tiem is not recommended).</text:p>
          </table:table-cell>
        </table:table-row>
        <table:table-row>
          <table:table-cell table:style-name="Table25.A2" office:value-type="string">
            <text:p text:style-name="P464"><text:span text:style-name="Symbol">lc_ctype</text:span></text:p>
          </table:table-cell>
          <table:table-cell table:style-name="Table25.B2" office:value-type="string">
            <text:p text:style-name="P464">Name of the connection default character set (e.g. UTF8). UTF8 is recommended for Lazarus programs.</text:p>
          </table:table-cell>
        </table:table-row>
      </table:table>
      <text:p text:style-name="P463"/>
      <text:h text:style-name="P894" text:outline-level="3"><text:bookmark-start text:name="__RefHeading___Toc15598_148275515"/>Highlighted Events<text:bookmark-end text:name="__RefHeading___Toc15598_148275515"/></text:h>
      <text:p text:style-name="P463">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64"><text:span text:style-name="Symbol">AfterConnect</text:span></text:p>
          </table:table-cell>
          <table:table-cell table:style-name="Table26.B1" office:value-type="string">
            <text:p text:style-name="P464">Called after a connection has been successfully established. A good place to start the first transaction and open datasets.</text:p>
          </table:table-cell>
        </table:table-row>
        <table:table-row>
          <table:table-cell table:style-name="Table26.A2" office:value-type="string">
            <text:p text:style-name="P464"><text:span text:style-name="Symbol">AfterDisconnect</text:span></text:p>
          </table:table-cell>
          <table:table-cell table:style-name="Table26.B2" office:value-type="string">
            <text:p text:style-name="P464">Called after a connection has been disconnected.</text:p>
          </table:table-cell>
        </table:table-row>
        <table:table-row>
          <table:table-cell table:style-name="Table26.A2" office:value-type="string">
            <text:p text:style-name="P464"><text:span text:style-name="Symbol">BeforeConnect</text:span></text:p>
          </table:table-cell>
          <table:table-cell table:style-name="Table26.B2" office:value-type="string">
            <text:p text:style-name="P464">Called before an attempt is made to connect to a database. Could be used to update the connection parameters, database name, etc.</text:p>
          </table:table-cell>
        </table:table-row>
        <table:table-row>
          <table:table-cell table:style-name="Table26.A2" office:value-type="string">
            <text:p text:style-name="P464"><text:span text:style-name="Symbol">BeforeDisconnect</text:span></text:p>
          </table:table-cell>
          <table:table-cell table:style-name="Table26.B2" office:value-type="string">
            <text:p text:style-name="P464">Called before an attempt is made to disconnect from a database.</text:p>
          </table:table-cell>
        </table:table-row>
        <table:table-row>
          <table:table-cell table:style-name="Table26.A2" office:value-type="string">
            <text:p text:style-name="P464"><text:span text:style-name="Symbol">OnCreateDatabase</text:span></text:p>
          </table:table-cell>
          <table:table-cell table:style-name="Table26.B2" office:value-type="string">
            <text:p text:style-name="P464">Called after a database has been successfully created. Could be used to run a DDL script <text:span text:style-name="T189">(e.g. using </text:span><text:span text:style-name="Symbol"><text:span text:style-name="T189">TIBXScript</text:span></text:span><text:span text:style-name="T189"> – see </text:span><text:span text:style-name="T189"><text:bookmark-ref text:reference-format="number" text:ref-name="__RefHeading__24780_1844166745">7.1</text:bookmark-ref></text:span><text:span text:style-name="T189">) </text:span>to initialise the database.</text:p>
          </table:table-cell>
        </table:table-row>
        <table:table-row>
          <table:table-cell table:style-name="Table26.A2" office:value-type="string">
            <text:p text:style-name="P464"><text:span text:style-name="Symbol">OnIdleTimer</text:span></text:p>
          </table:table-cell>
          <table:table-cell table:style-name="Table26.B2" office:value-type="string">
            <text:p text:style-name="P192">Called after an idle timer has disconnected the database.</text:p>
          </table:table-cell>
        </table:table-row>
        <table:table-row>
          <table:table-cell table:style-name="Table26.A2" office:value-type="string">
            <text:p text:style-name="P192"><text:span text:style-name="Symbol">OnLogin</text:span></text:p>
          </table:table-cell>
          <table:table-cell table:style-name="Table26.B2" office:value-type="string">
            <text:p text:style-name="P19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463"/>
      <text:h text:style-name="P895" text:outline-level="3"><text:bookmark-start text:name="__RefHeading__15923_274617472"/>Connecting to a Database<text:bookmark-end text:name="__RefHeading__15923_274617472"/></text:h>
      <text:p text:style-name="P191">The recommended approach is:</text:p>
      <text:list text:style-name="L40">
        <text:list-item>
          <text:p text:style-name="P1055">To set AllowStreamedConnect to false</text:p>
        </text:list-item>
        <text:list-item>
          <text:p text:style-name="P1055">Do not include a password in the parameters</text:p>
        </text:list-item>
        <text:list-item>
          <text:p text:style-name="P1055"><text:soft-page-break/>Use the built-in or a user defined login prompt to confirm the user name and enter the password.</text:p>
        </text:list-item>
      </text:list>
      <text:p text:style-name="P191">The following code is recommended for setting the connected property to true. This may be part of an <text:span text:style-name="Symbol">OnShow</text:span> handler for the main form or when otherwise required:</text:p>
      <text:p text:style-name="P190"><text:s text:c="2"/>repeat</text:p>
      <text:p text:style-name="P193"><text:s text:c="4"/>try</text:p>
      <text:p text:style-name="P193"><text:s text:c="6"/>IBDatabase1.Connected := true;</text:p>
      <text:p text:style-name="P193"><text:s text:c="4"/>except</text:p>
      <text:p text:style-name="P193"><text:s text:c="5"/>on E:EIBClientError do</text:p>
      <text:p text:style-name="P193"><text:s text:c="6"/>begin</text:p>
      <text:p text:style-name="P193"><text:s text:c="8"/>Close;</text:p>
      <text:p text:style-name="P193"><text:s text:c="8"/>Exit</text:p>
      <text:p text:style-name="P193"><text:s text:c="6"/>end;</text:p>
      <text:p text:style-name="P193"><text:s text:c="4"/>On E:Exception do</text:p>
      <text:p text:style-name="P193"><text:s text:c="5"/>MessageDlg(E.Message,mtError,[mbOK],0);</text:p>
      <text:p text:style-name="P193"><text:s text:c="4"/>end;</text:p>
      <text:p text:style-name="P193"><text:s text:c="2"/>until IBDatabase1.Connected;</text:p>
      <text:p text:style-name="P189">An example of this code in use may be found in “ibx/example/employee”. The purpose of the above is to trap and report errors, such as mis-typed passwords whilst allowing the user to click on cancel and exit through a “client error”.</text:p>
      <text:p text:style-name="P762">Note: you will need to add the “IB” unit to your units list in order for the above to compile.</text:p>
      <text:p text:style-name="P34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895" text:outline-level="3"><text:bookmark-start text:name="__RefHeading___Toc15600_148275515"/>Database Disconnect<text:bookmark-end text:name="__RefHeading___Toc15600_148275515"/></text:h>
      <text:p text:style-name="P191">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96" text:outline-level="3"><text:bookmark-start text:name="__RefHeading___Toc13953_1132224903"/>Reconnecting<text:bookmark-end text:name="__RefHeading___Toc13953_1132224903"/></text:h>
      <text:p text:style-name="P338">The <text:span text:style-name="Symbol">Reconnect</text:span> method may be used to disconnect and then reconnect to a database. This can also be achieved by setting the <text:span text:style-name="Symbol">Connected</text:span> property to false and then true e.g.:</text:p>
      <text:p text:style-name="P339">IBDatabase1.Connected := false;</text:p>
      <text:p text:style-name="P339">IBDatabase1.Connected := true;</text:p>
      <text:p text:style-name="P337">However, the above may cause the user to be prompted to re-enter their user name and password. The <text:span text:style-name="Symbol">Reconnect</text:span> method uses the current user name and password and hence avoids having to re-prompt the user.</text:p>
      <text:h text:style-name="P895" text:outline-level="3"><text:bookmark-start text:name="__RefHeading___Toc15602_148275515"/>Creating a new Database<text:bookmark-end text:name="__RefHeading___Toc15602_148275515"/></text:h>
      <text:p text:style-name="P191">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191"><text:soft-page-break/>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537">Alternatively, the <text:span text:style-name="Symbol">CreateDatabase</text:span> method may be called with a “CREATE DATABASE” sql statement. In this case, the sql statement is the sole source of the create parameters.</text:p>
      <text:p text:style-name="P191">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95" text:outline-level="3"><text:bookmark-start text:name="__RefHeading___Toc15604_148275515"/>Dropping a Database<text:bookmark-end text:name="__RefHeading___Toc15604_148275515"/></text:h>
      <text:p text:style-name="P191">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97" text:outline-level="3"><text:bookmark-start text:name="__RefHeading__13681_627404695"/>Using the Attachment Interface<text:bookmark-end text:name="__RefHeading__13681_627404695"/></text:h>
      <text:p text:style-name="P347">The <text:span text:style-name="Symbol">TIBDatabase</text:span> component also exposes the underlying <text:span text:style-name="Symbol">IAttachment</text:span> interface as <text:span text:style-name="T237">the</text:span> public property: <text:span text:style-name="Symbol">Attachment</text:span>. This can be used for embedded SQL. For example,</text:p>
      <text:p text:style-name="P348">var employees: integer;</text:p>
      <text:p text:style-name="P348">begin</text:p>
      <text:p text:style-name="P348"><text:s text:c="2"/>employees := IBDatabase1.Attachment.OpenCursorAtStart(</text:p>
      <text:p text:style-name="P348"><text:s text:c="29"/>'Select count(*) From Employees').AsInteger;</text:p>
      <text:p text:style-name="P346">gets the current number of rows in the employee table. Use of the <text:span text:style-name="Symbol">IAttachment</text:span> interface is described in the Firebird Pascal API Guide.</text:p>
      <text:p text:style-name="P350">From IBX 2.3.3 onwards, the Attachment property is read/write. This allows a single attachment (database connection) to be shared between multiple instances of TIBDatabase. For example:</text:p>
      <text:p text:style-name="P351">IBDatabase2.Attachment := IBDatabase1.Attachment; {assumed already connected}</text:p>
      <text:p text:style-name="P350">The above statement copies the attachment interface to IBDatabase2. This also causes the IBDatabase2 before and after connect event handlers to be called, if present. </text:p>
      <text:p text:style-name="P350">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Using the <text:span text:style-name="T120">AllowStreamConnected </text:span>Property<text:bookmark-end text:name="__RefHeading__15925_274617472"/></text:h>
      <text:p text:style-name="P500">In order to get the lists of tables and fields and to test the SQL statements, property editors <text:span text:style-name="T149">(see </text:span><text:span text:style-name="T149"><text:bookmark-ref text:reference-format="number" text:ref-name="__RefHeading__6409_274617472">6.5.3</text:bookmark-ref></text:span><text:span text:style-name="T149">)</text:span> need a connection to a development version of your database. They use the dataset's <text:span text:style-name="Symbol">TIB</text:span><text:span text:style-name="Symbol"><text:span text:style-name="T189">Database</text:span></text:span> to do this and may set its connected property to true in order to <text:span text:style-name="T189">achieve</text:span> this. However, when the form is saved, this can also result in the connected property being saved in the form as “true”.</text:p>
      <text:p text:style-name="P50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500"><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500">To avoid this, it is better to set the connected property explicitly, perhaps once the main form has finished loading and in its <text:span text:style-name="Symbol">OnShow</text:span> event handler <text:span text:style-name="T149">(see </text:span><text:span text:style-name="T149"><text:bookmark-ref text:reference-format="number" text:ref-name="__RefHeading__15923_274617472">5.1.5</text:bookmark-ref></text:span><text:span text:style-name="T149">)</text:span>. It is <text:span text:style-name="T149">then</text:span> possible to wrap the “connected := true” with an exception handler. </text:p>
      <text:p text:style-name="P500">This can be ensured by setting the <text:span text:style-name="Symbol">TIBDatabase AllowStreamedConnect</text:span><text:span text:style-name="Symbol"><text:span text:style-name="T237">ed</text:span></text:span> property to false. This prevents the component entering the “streamed connected” state even if the connected property is set to true when the form was saved.</text:p>
      <text:h text:style-name="P898" text:outline-level="3"><text:bookmark-start text:name="__RefHeading___Toc22717_858839226"/>Using a Firebird DLL or Shared Object Library in a non-default Location<text:bookmark-end text:name="__RefHeading___Toc22717_858839226"/></text:h>
      <text:p text:style-name="P341">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608"><text:span text:style-name="T346">However, it is also possible to specify the relative or absolute pathname of the Firebird Library on a per database basis by setting the </text:span><text:span text:style-name="T204">FirebirdLibraryPathName </text:span><text:span text:style-name="T34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341">If permitted by the OS, each database connection could use a different Firebird library. However, if a transaction uses multiple databases then each database connection must use the same Firebird library.</text:p>
      <text:p text:style-name="P761">Note: the FirebirdLibraryPathName property is ignored at design time. <text:span text:style-name="T34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98">AllowUseOfFBLIB</text:span><text:span text:style-name="T100"> </text:span><text:span text:style-name="T101">global variable is, be default, set to true at design time.</text:span></text:p>
      <text:p text:style-name="P340">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340">If the FirebirdLibraryPathName property is changed while the database connection is open, the connection is closed and must be explicitly re-opened.</text:p>
      <text:h text:style-name="P841" text:outline-level="2"><text:bookmark-start text:name="__RefHeading__24367_1844166745"/>TIBTransaction<text:bookmark-end text:name="__RefHeading__24367_1844166745"/></text:h>
      <text:p text:style-name="P347">This non-visual component is a wrapper for the <text:span text:style-name="Symbol">ITransaction</text:span> interface. <text:span text:style-name="T122">Its role is to:</text:span></text:p>
      <text:list xml:id="list3692624471" text:style-name="L41">
        <text:list-item>
          <text:p text:style-name="P1056">Provide a component that represents a transaction</text:p>
        </text:list-item>
        <text:list-item>
          <text:p text:style-name="P1057">Provide a means to specif<text:span text:style-name="T124">y</text:span> transaction parameters at design time.</text:p>
        </text:list-item>
        <text:list-item>
          <text:p text:style-name="P1057">Allow design time references to be established between datasets, transactions and databases.</text:p>
        </text:list-item>
        <text:list-item>
          <text:p text:style-name="P1057">Provide a centralised point for event handling when transactions are started or closed, or to react to state changes in datasets linked to transactions (e.g. to indicate data changes).</text:p>
        </text:list-item>
      </text:list>
      <text:p text:style-name="P112"><text:soft-page-break/>The <text:span text:style-name="T122">simplest way to set transaction parameters at design time is to use the transaction editor. This is accessed by double clicking on the </text:span><text:span text:style-name="Symbol"><text:span text:style-name="T122">TIBTransaction</text:span></text:span><text:span text:style-name="T122"> component icon, once it has been placed on your form.</text:span></text:p>
      <text:h text:style-name="P899" text:outline-level="3"><text:bookmark-start text:name="__RefHeading___Toc15606_148275515"/><text:bookmark-start text:name="__RefNumPara__30381_1160916553"/>Highlighted Properties<text:bookmark-end text:name="__RefHeading___Toc15606_148275515"/><text:bookmark-end text:name="__RefNumPara__30381_1160916553"/></text:h>
      <table:table table:name="Table27" table:style-name="Table27">
        <table:table-column table:style-name="Table27.A"/>
        <table:table-column table:style-name="Table27.B"/>
        <table:table-row>
          <table:table-cell table:style-name="Table27.A1" office:value-type="string">
            <text:p text:style-name="P176"><text:span text:style-name="Symbol">Active</text:span></text:p>
          </table:table-cell>
          <table:table-cell table:style-name="Table27.B1" office:value-type="string">
            <text:p text:style-name="P682">Set to true to start a transaction.</text:p>
            <text:p text:style-name="P176">Returns true when a transaction is active. Set to false to close a transaction <text:span text:style-name="T189">and rollback</text:span>. When set at design time will cause the transaction to be started as soon as it has loaded.</text:p>
          </table:table-cell>
        </table:table-row>
        <table:table-row>
          <table:table-cell table:style-name="Table27.A2" office:value-type="string">
            <text:p text:style-name="P665"><text:span text:style-name="Symbol">DefaultAction</text:span></text:p>
          </table:table-cell>
          <table:table-cell table:style-name="Table27.B2" office:value-type="string">
            <text:p text:style-name="P665">Set to taCommit or taRollback. Determines the default closure of the transaction if implicitly closed.</text:p>
          </table:table-cell>
        </table:table-row>
        <table:table-row>
          <table:table-cell table:style-name="Table27.A2" office:value-type="string">
            <text:p text:style-name="P665"><text:span text:style-name="Symbol">DefaultDatabase</text:span></text:p>
          </table:table-cell>
          <table:table-cell table:style-name="Table27.B2" office:value-type="string">
            <text:p text:style-name="P665">A reference to the default <text:span text:style-name="Symbol">TIBDatabase</text:span> for the transaction.</text:p>
          </table:table-cell>
        </table:table-row>
        <table:table-row>
          <table:table-cell table:style-name="Table27.A2" office:value-type="string">
            <text:p text:style-name="P665"><text:span text:style-name="Symbol">IdleTimer</text:span></text:p>
          </table:table-cell>
          <table:table-cell table:style-name="Table27.B2" office:value-type="string">
            <text:p text:style-name="P664">If non-zero, this is the time in milliseconds between successive polls for <text:span text:style-name="T122">transaction</text:span> activity. If no activity has been detected between two successive polls then the <text:span text:style-name="T122">transaction</text:span> is automatically <text:span text:style-name="T122">closed</text:span>. Can be used to timeout idle <text:span text:style-name="T122">transactions</text:span> if needed.</text:p>
          </table:table-cell>
        </table:table-row>
        <table:table-row>
          <table:table-cell table:style-name="Table27.A2" office:value-type="string">
            <text:p text:style-name="P733">IsReadOnly</text:p>
          </table:table-cell>
          <table:table-cell table:style-name="Table27.B2" office:value-type="string">
            <text:p text:style-name="P733">Returns true for a read only transaction</text:p>
          </table:table-cell>
        </table:table-row>
        <table:table-row>
          <table:table-cell table:style-name="Table27.A2" office:value-type="string">
            <text:p text:style-name="P665"><text:span text:style-name="Symbol">Params</text:span></text:p>
          </table:table-cell>
          <table:table-cell table:style-name="Table27.B2" office:value-type="string">
            <text:p text:style-name="P465">This is a list of parameter values to be used in the <text:span text:style-name="T122">Transaction</text:span> Parameter Block (<text:span text:style-name="T122">T</text:span>PB) at connect time. These are in “keyword=” format. See below</text:p>
          </table:table-cell>
        </table:table-row>
        <table:table-row>
          <table:table-cell table:style-name="Table27.A2" office:value-type="string">
            <text:p text:style-name="P733">TransactionID</text:p>
          </table:table-cell>
          <table:table-cell table:style-name="Table27.B2" office:value-type="string">
            <text:p text:style-name="P733">This is the unique transaction id returned by Firebird.</text:p>
          </table:table-cell>
        </table:table-row>
        <table:table-row>
          <table:table-cell table:style-name="Table27.A2" office:value-type="string">
            <text:p text:style-name="P733">TransactionName</text:p>
          </table:table-cell>
          <table:table-cell table:style-name="Table27.B2" office:value-type="string">
            <text:p text:style-name="P733">The name of the transaction. This is typically assigned at design time and may be used to locate a transaction object. e.g. during transaction playback. <text:span text:style-name="T387">Defaults to a unique GUID.</text:span></text:p>
          </table:table-cell>
        </table:table-row>
      </table:table>
      <text:p text:style-name="P113"/>
      <text:h text:style-name="P899" text:outline-level="3"><text:bookmark-start text:name="__RefHeading___Toc15608_148275515"/>Events<text:bookmark-end text:name="__RefHeading___Toc15608_148275515"/></text:h>
      <table:table table:name="Table28" table:style-name="Table28">
        <table:table-column table:style-name="Table28.A"/>
        <table:table-column table:style-name="Table28.B"/>
        <table:table-row>
          <table:table-cell table:style-name="Table28.A1" office:value-type="string">
            <text:p text:style-name="P665"><text:span text:style-name="Symbol">AfterDelete</text:span></text:p>
          </table:table-cell>
          <table:table-cell table:style-name="Table28.B1" office:value-type="string">
            <text:p text:style-name="P665">Called after a record has been deleted in a dataset linked to the transaction.</text:p>
          </table:table-cell>
        </table:table-row>
        <table:table-row>
          <table:table-cell table:style-name="Table28.A2" office:value-type="string">
            <text:p text:style-name="P665"><text:span text:style-name="Symbol">AfterEdit</text:span></text:p>
          </table:table-cell>
          <table:table-cell table:style-name="Table28.B2" office:value-type="string">
            <text:p text:style-name="P665">Called after a dataset linked to the transaction has entered the edit state.</text:p>
          </table:table-cell>
        </table:table-row>
        <table:table-row>
          <table:table-cell table:style-name="Table28.A2" office:value-type="string">
            <text:p text:style-name="P665"><text:span text:style-name="Symbol">AfterExecQuery</text:span></text:p>
          </table:table-cell>
          <table:table-cell table:style-name="Table28.B2" office:value-type="string">
            <text:p text:style-name="P665">Called after a <text:span text:style-name="Symbol">TIBSQL</text:span> component linked to the transaction has executed a query.</text:p>
          </table:table-cell>
        </table:table-row>
        <table:table-row>
          <table:table-cell table:style-name="Table28.A2" office:value-type="string">
            <text:p text:style-name="P665"><text:span text:style-name="Symbol">AfterInsert</text:span></text:p>
          </table:table-cell>
          <table:table-cell table:style-name="Table28.B2" office:value-type="string">
            <text:p text:style-name="P665">Called after a dataset linked to the transaction has entered the insert state.</text:p>
          </table:table-cell>
        </table:table-row>
        <text:soft-page-break/>
        <table:table-row>
          <table:table-cell table:style-name="Table28.A2" office:value-type="string">
            <text:p text:style-name="P665"><text:span text:style-name="Symbol">AfterPost</text:span></text:p>
          </table:table-cell>
          <table:table-cell table:style-name="Table28.B2" office:value-type="string">
            <text:p text:style-name="P665">Called after a dataset linked to the transaction has posted changes.</text:p>
          </table:table-cell>
        </table:table-row>
        <table:table-row>
          <table:table-cell table:style-name="Table28.A2" office:value-type="string">
            <text:p text:style-name="P665"><text:span text:style-name="Symbol">AfterTransactionEnd</text:span></text:p>
          </table:table-cell>
          <table:table-cell table:style-name="Table28.B2" office:value-type="string">
            <text:p text:style-name="P665">Called after the transaction has been closed.</text:p>
          </table:table-cell>
        </table:table-row>
        <table:table-row>
          <table:table-cell table:style-name="Table28.A2" office:value-type="string">
            <text:p text:style-name="P665"><text:span text:style-name="Symbol">BeforeTransactionEnd</text:span></text:p>
          </table:table-cell>
          <table:table-cell table:style-name="Table28.B2" office:value-type="string">
            <text:p text:style-name="P665">Called before the transaction is closed.</text:p>
          </table:table-cell>
        </table:table-row>
        <table:table-row>
          <table:table-cell table:style-name="Table28.A2" office:value-type="string">
            <text:p text:style-name="P665"><text:span text:style-name="Symbol">OnIdleTimer</text:span></text:p>
          </table:table-cell>
          <table:table-cell table:style-name="Table28.B2" office:value-type="string">
            <text:p text:style-name="P665">Called after the transaction has been closed due to lack of activity.</text:p>
          </table:table-cell>
        </table:table-row>
        <table:table-row>
          <table:table-cell table:style-name="Table28.A2" office:value-type="string">
            <text:p text:style-name="P665"><text:span text:style-name="Symbol">OnStartTransaction</text:span></text:p>
          </table:table-cell>
          <table:table-cell table:style-name="Table28.B2" office:value-type="string">
            <text:p text:style-name="P665">Called after a transaction has been started.</text:p>
          </table:table-cell>
        </table:table-row>
      </table:table>
      <text:p text:style-name="P113"/>
      <text:h text:style-name="P900" text:outline-level="3"><text:bookmark-start text:name="__RefHeading___Toc15610_148275515"/>Transactions and Databases<text:bookmark-end text:name="__RefHeading___Toc15610_148275515"/></text:h>
      <text:p text:style-name="P46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46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466">When more than one database has been added to a transaction, the transaction becomes a mult-database transaction co-ordinating updates over the set of databases.</text:p>
      <text:h text:style-name="P900" text:outline-level="3"><text:bookmark-start text:name="__RefHeading__23445_1844166745"/>Starting a Transaction<text:bookmark-end text:name="__RefHeading__23445_1844166745"/></text:h>
      <text:p text:style-name="P175">A transaction can either be started implicitly when (e.g.) a dataset is opened or explicitly by <text:span text:style-name="T189">setting the </text:span><text:span text:style-name="Symbol"><text:span text:style-name="T189">Active</text:span></text:span><text:span text:style-name="T189"> property to true, or by </text:span>calling the <text:span text:style-name="Symbol">StartTransaction</text:span> method.</text:p>
      <text:p text:style-name="Highlighted">Note: From IBX2 onwards, <text:span text:style-name="T123">at run time, </text:span>implicit start has to be enabled using the dataset's AllowAutoActivateTransaction property.</text:p>
      <text:p text:style-name="P17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175">An explicit transaction start can be performed at any time while the linked database is connected. However, an exception is raised if the transaction is already started. The recommended code is:</text:p>
      <text:p text:style-name="P177">IBTransaction1.<text:span text:style-name="T189">Active := true;</text:span></text:p>
      <text:p text:style-name="P174">Explicit start of transactions is recommended for all but the most simple applications as this allows better control over error handling and is part of a properly thought out use of transactions.</text:p>
      <text:h text:style-name="P901" text:outline-level="3"><text:bookmark-start text:name="__RefHeading___Toc15612_148275515"/>Transaction Parameters<text:bookmark-end text:name="__RefHeading___Toc15612_148275515"/></text:h>
      <text:p text:style-name="P523">The following keywords may be given as transaction parameters. Except as where indicated, the parameters have no value associated with them and hence are not followed by an “=” sign. <text:span text:style-name="T174">Transaction parameters can also be set using the Transaction Editor (see </text:span><text:span text:style-name="T174"><text:bookmark-ref text:reference-format="number" text:ref-name="__RefHeading__17494_1584841140">5.2.6</text:bookmark-ref></text:span><text:span text:style-name="T174">).</text:span></text:p>
      <table:table table:name="Table39" table:style-name="Table39">
        <table:table-column table:style-name="Table39.A"/>
        <table:table-column table:style-name="Table39.B"/>
        <text:soft-page-break/>
        <table:table-row>
          <table:table-cell table:style-name="Table39.A1" office:value-type="string">
            <text:p text:style-name="Table_20_Contents"><text:span text:style-name="Symbol">consistency </text:span></text:p>
          </table:table-cell>
          <table:table-cell table:style-name="Table39.B1" office:value-type="string">
            <text:p text:style-name="P52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4">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4">Read-only access of a specified table. Use in conjunction with shared, protected, and exclusive to establish the lock option.</text:p>
            <text:p text:style-name="P18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24">Read-write access of a specified table. Use in conjunction with shared, protected, and exclusive to establish the lock option [Default].</text:p>
            <text:p text:style-name="P18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67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67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4">Do not wait for Limbo Transactions. Used for a garbage collector thread.</text:p>
          </table:table-cell>
        </table:table-row>
        <text:soft-page-break/>
        <table:table-row>
          <table:table-cell table:style-name="Table39.A2" office:value-type="string">
            <text:p text:style-name="Table_20_Contents"><text:span text:style-name="Symbol">read_committed </text:span></text:p>
          </table:table-cell>
          <table:table-cell table:style-name="Table39.B2" office:value-type="string">
            <text:p text:style-name="P18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18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18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18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676">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3">This</text:span> takes a non-negative integer as <text:span text:style-name="T173">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79">The following is a suggested parameter list for a typical read/write transaction:</text:p>
      <text:p text:style-name="P526">read_committed </text:p>
      <text:p text:style-name="P526">rec_version </text:p>
      <text:p text:style-name="P526">nowait </text:p>
      <text:h text:style-name="P902" text:outline-level="3"><text:bookmark-start text:name="__RefHeading__17494_1584841140"/>The Transaction Editor<text:bookmark-end text:name="__RefHeading__17494_1584841140"/></text:h>
      <text:p text:style-name="P525">The transaction editor is opened at design time by double-clicking on the <text:span text:style-name="Symbol">TIBTransaction</text:span> component once it has been placed on a form.</text:p>
      <text:p text:style-name="P525"><draw:frame draw:style-name="fr2" draw:name="Frame12" text:anchor-type="paragraph" svg:width="3.6752in" draw:z-index="25"><draw:text-box fo:min-height="2.3252in"><text:p text:style-name="Illustration"><draw:frame draw:style-name="fr13" draw:name="Image12" text:anchor-type="paragraph" svg:width="3.6752in" style:rel-width="100%" svg:height="2.0055in" style:rel-height="scale" draw:z-index="26"><draw:image xlink:href="Pictures/100000000000018C000000E116D4C6BC.png" xlink:type="simple" xlink:show="embed" xlink:actuate="onLoad" draw:mime-type="image/png"/></draw:frame>Illustration <text:sequence text:ref-name="refIllustration2" text:name="Illustration" text:formula="ooow:Illustration+1" style:num-format="1">3</text:sequence>: Transaction Editor</text:p></draw:text-box></draw:frame><text:soft-page-break/>This editor allows the transaction parameters to be set using one of the predefined options listed on the left. The result of selecting “Read Commit<text:span text:style-name="T189">t</text:span>ed” is to set the <text:span text:style-name="Symbol">Params</text:span> property to that given in the Settings listbox.</text:p>
      <text:h text:style-name="P903" text:outline-level="3"><text:bookmark-start text:name="__RefHeading___Toc15614_148275515"/>Closing a Transaction<text:bookmark-end text:name="__RefHeading___Toc15614_148275515"/></text:h>
      <text:p text:style-name="P175">A transaction can either be closed implicitly with the default closure (commit or rollback) or explicitly. </text:p>
      <text:p text:style-name="P175">Implicit closure occurs:</text:p>
      <text:list text:style-name="L42">
        <text:list-item>
          <text:p text:style-name="P1062">When the database connection is closed.</text:p>
        </text:list-item>
        <text:list-item>
          <text:p text:style-name="P1062">When the transaction idle timer expires.</text:p>
        </text:list-item>
        <text:list-item>
          <text:p text:style-name="P1062">When a dataset that implicitly started a transaction closes and there are no other open datasets that are linked to the transaction.</text:p>
        </text:list-item>
        <text:list-item>
          <text:p text:style-name="P1063">When the transaction's active property is set to false.</text:p>
        </text:list-item>
      </text:list>
      <text:p text:style-name="P175">Explicit closure us<text:span text:style-name="T190">es</text:span> the <text:span text:style-name="Symbol">Commit</text:span> or <text:span text:style-name="Symbol">Rollback</text:span> methods and may be called at any time on an active transaction.</text:p>
      <text:p text:style-name="P175">When a transaction is closed, all linked <text:span text:style-name="T190">datasets</text:span> that are still opened are closed implicitly and their data discarded.</text:p>
      <text:p text:style-name="P178">Note: it is important to consider how your datasets react to transaction closure. See <text:bookmark-ref text:reference-format="number" text:ref-name="__RefHeading__25434_1844166745">6.6.5</text:bookmark-ref>.</text:p>
      <text:h text:style-name="P903" text:outline-level="3"><text:bookmark-start text:name="__RefHeading___Toc15616_148275515"/>Retaining Transaction State after Closure<text:bookmark-end text:name="__RefHeading___Toc15616_148275515"/></text:h>
      <text:p text:style-name="P175">When explicitly closed, it is possible to retain the transaction state after a transaction has been closed by using the CommitRetaining or RollbackRetaining methods.</text:p>
      <text:p text:style-name="P17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110">The downside of using <text:span text:style-name="T123">CommitRetaining or RollbackRetaining</text:span> is that in a multi-user database, the datasets only pick up changes made by other users when they are closed and re-opened.</text:p>
      <text:h text:style-name="P842" text:outline-level="2"><text:bookmark-start text:name="__RefHeading__24771_1844166745"/><text:soft-page-break/>TIBEvent<text:bookmark-end text:name="__RefHeading__24771_1844166745"/></text:h>
      <text:p text:style-name="P349">This non-visual component is a wrapper for the <text:span text:style-name="Symbol"><text:span text:style-name="T124">IEvents</text:span></text:span> interface. <text:span text:style-name="T122">Its role is to:</text:span></text:p>
      <text:list xml:id="list100751201706388" text:continue-list="list3692624471" text:style-name="L41">
        <text:list-item>
          <text:p text:style-name="P1058">Provide a component that represents a<text:span text:style-name="T124">n event handler</text:span></text:p>
        </text:list-item>
        <text:list-item>
          <text:p text:style-name="P1059">Provide a means to specif<text:span text:style-name="T124">y</text:span> <text:span text:style-name="T124">the</text:span> <text:span text:style-name="T124">events on which an application is waiting for </text:span>at design time.</text:p>
        </text:list-item>
      </text:list>
      <text:h text:style-name="P904"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table-cell table:style-name="Table29.A1" office:value-type="string">
            <text:p text:style-name="P116"><text:span text:style-name="Symbol">Database</text:span></text:p>
          </table:table-cell>
          <table:table-cell table:style-name="Table29.B1" office:value-type="string">
            <text:p text:style-name="P666">A reference to the <text:span text:style-name="Symbol">TIBDatabase</text:span> <text:span text:style-name="T124">for which this component is the event handler</text:span></text:p>
          </table:table-cell>
        </table:table-row>
        <table:table-row>
          <table:table-cell table:style-name="Table29.A2" office:value-type="string">
            <text:p text:style-name="P116"><text:span text:style-name="Symbol">Events</text:span></text:p>
          </table:table-cell>
          <table:table-cell table:style-name="Table29.B2" office:value-type="string">
            <text:p text:style-name="P116">A string list containing the names of the current set of events for which the application wants to be alerted.</text:p>
          </table:table-cell>
        </table:table-row>
        <table:table-row>
          <table:table-cell table:style-name="Table29.A2" office:value-type="string">
            <text:p text:style-name="P116"><text:span text:style-name="Symbol">Registered</text:span></text:p>
          </table:table-cell>
          <table:table-cell table:style-name="Table29.B2" office:value-type="string">
            <text:p text:style-name="P116">When true, the event handler is active and waiting for events. When set at design time, the event handler becomes active as soon as the linked database is connected.</text:p>
          </table:table-cell>
        </table:table-row>
        <table:table-row>
          <table:table-cell table:style-name="Table29.A2" office:value-type="string">
            <text:p text:style-name="P736">EventAlertLock</text:p>
          </table:table-cell>
          <table:table-cell table:style-name="Table29.B2" office:value-type="string">
            <text:p text:style-name="P800">This is a critical section active when RegisterEvents is called from any thread other than the main thread (see <text:bookmark-ref text:reference-format="number" text:ref-name="__RefNumPara__16573_2667734427">5.3.4</text:bookmark-ref><text:span text:style-name="T436">).</text:span></text:p>
          </table:table-cell>
        </table:table-row>
      </table:table>
      <text:p text:style-name="P467"/>
      <text:h text:style-name="P904"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table-cell table:style-name="Table30.A1" office:value-type="string">
            <text:p text:style-name="P116"><text:span text:style-name="Symbol">OnEventAlert</text:span></text:p>
          </table:table-cell>
          <table:table-cell table:style-name="Table30.B1" office:value-type="string">
            <text:p text:style-name="P116">This event handler is called whenever an event alert is received from the database for one of the monitor events.</text:p>
          </table:table-cell>
        </table:table-row>
      </table:table>
      <text:p text:style-name="Text_20_body"/>
      <text:h text:style-name="P904" text:outline-level="3"><text:bookmark-start text:name="__RefHeading___Toc15622_148275515"/>Using Events<text:bookmark-end text:name="__RefHeading___Toc15622_148275515"/></text:h>
      <text:p text:style-name="P115">Events are raised by the database engine when a POST_EVENT statement is executed by a stored procedure or Trigger. The POST_EVENT statement also names the event. For example:</text:p>
      <text:p text:style-name="P117">POST_EVENT 'MYEVENT';</text:p>
      <text:p text:style-name="P114">Once the transaction, in which the trigger or stored procedure runs under, <text:span text:style-name="T238">has been</text:span> <text:span text:style-name="T238">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0">then </text:span>be seen by other users looking at the same data and as soon as the change is committed.</text:p>
      <text:p text:style-name="P119">The names of the events an application is waiting for a<text:span text:style-name="T190">re</text:span> typically defined at design time and the Registered property set to true. Then, whenever the event is signalled the <text:span text:style-name="Symbol">OnEventAlert</text:span> event handler is called. It is up to the application to then decide what to do.</text:p>
      <text:p text:style-name="P119">The event handler is called once for each named event and reports the number of times the event has been signalled. This can be used to avoid reacting to duplicate events.</text:p>
      <text:h text:style-name="P905" text:outline-level="3"><text:bookmark-start text:name="__RefNumPara__16573_2667734427"/><text:bookmark-start text:name="__RefHeading___Toc17233_2667734427"/><text:soft-page-break/>Event Handling and Multithreaded Applications<text:bookmark-end text:name="__RefNumPara__16573_2667734427"/><text:bookmark-end text:name="__RefHeading___Toc17233_2667734427"/></text:h>
      <text:p text:style-name="P798">A separate EventHandler thread is always used to receive Firebird Events. When RegisterEvents is called from the main thread (the typical use case), the OnEventAlert event handler is run in the context of the main thread. The EventHandler thread uses TThread.Synchronize to achieve this. There is thus no need for the user to worry about thread synchronisation issues in the <text:s/>OnEventAlert event handler.</text:p>
      <text:p text:style-name="Highlighted">Note: in <text:span text:style-name="T434">this case and in</text:span> non-gui applications, the user program must regularly call the global procedure “CheckSynchronize” to ensure that OnEventAlert event handlers run in a timely fashion.</text:p>
      <text:p text:style-name="P798">However, when RegisterEvents is called from any thread other than the main thread, the <text:s/>OnEventAlert event handler is run in the context of the EventHandler thread. This assumes that event alerts must be reported back to the calling thread and without having to synchronise via the main thread.</text:p>
      <text:p text:style-name="P798">This means that the user's OnEventAlert event handler is responsible for signalling the appropriate user thread and controlling access to critical variables. <text:span text:style-name="T435">It is also desirable to keep an OnEventAlert handler as short as possible.</text:span></text:p>
      <text:p text:style-name="P799">A TIBEvents property EventAlertLock is provided to assist in controlled access. This is a critical section and is active when the OnEventAlert event handler is run in the context of the EventHandler thread. The EventAlertLock critical section is entered prior to calling the user's OnEventAlert handler, and left once the handler returns. <text:span text:style-name="T435">User threads may use this critical section for controlled access to critical variables without having to create their own critical section or to reference it from the OnEventAlert handler.</text:span></text:p>
      <text:h text:style-name="P843" text:outline-level="2"><text:bookmark-start text:name="__RefHeading___Toc12545_620837195"/>TIBSQL<text:bookmark-end text:name="__RefHeading___Toc12545_620837195"/></text:h>
      <text:p text:style-name="P12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text:continue-numbering="true" text:style-name="L41">
        <text:list-item>
          <text:p text:style-name="P1060">Provide a component that represents a<text:span text:style-name="T125">n SQL Statement</text:span></text:p>
        </text:list-item>
        <text:list-item>
          <text:p text:style-name="P1064">Provide a means to specify statement SQL at design time</text:p>
        </text:list-item>
        <text:list-item>
          <text:p text:style-name="P1061">Allow design time references to be established between <text:span text:style-name="T125">an SQL Statement, the transaction used to execute the statement and the database connection.</text:span></text:p>
        </text:list-item>
      </text:list>
      <text:p text:style-name="P121">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06" text:outline-level="3"><text:bookmark-start text:name="__RefNumPara__27955_3235793879"/><text:bookmark-start text:name="__RefHeading___Toc15624_148275515"/>Highlighted <text:span text:style-name="T267">Published </text:span>Properties<text:bookmark-end text:name="__RefNumPara__27955_3235793879"/><text:bookmark-end text:name="__RefHeading___Toc15624_148275515"/></text:h>
      <table:table table:name="Table31" table:style-name="Table31">
        <table:table-column table:style-name="Table31.A"/>
        <table:table-column table:style-name="Table31.B"/>
        <table:table-row>
          <table:table-cell table:style-name="Table31.A1" office:value-type="string">
            <text:p text:style-name="P118"><text:span text:style-name="Symbol">Database</text:span></text:p>
          </table:table-cell>
          <table:table-cell table:style-name="Table31.B1" office:value-type="string">
            <text:p text:style-name="P667">A reference to the <text:span text:style-name="Symbol">TIBDatabase</text:span> <text:span text:style-name="T126">to which the SQL Statement applies</text:span></text:p>
          </table:table-cell>
        </table:table-row>
        <table:table-row>
          <table:table-cell table:style-name="Table31.A2" office:value-type="string">
            <text:p text:style-name="P122"><text:span text:style-name="Symbol">GenerateParamNames</text:span></text:p>
          </table:table-cell>
          <table:table-cell table:style-name="Table31.B2" office:value-type="string">
            <text:p text:style-name="P122">If true then positional parameters are replaced by parameter names in the format “IBXParam<text:span text:style-name="T12">nnn</text:span>” where <text:span text:style-name="T12">nnn</text:span> represents the zero based position number. <text:span text:style-name="T127">Most users may safely ignore this parameter.</text:span></text:p>
          </table:table-cell>
        </table:table-row>
        <table:table-row>
          <table:table-cell table:style-name="Table31.A2" office:value-type="string">
            <text:p text:style-name="P125"><text:span text:style-name="Symbol">UniqueParamNames</text:span></text:p>
          </table:table-cell>
          <table:table-cell table:style-name="Table31.B2" office:value-type="string">
            <text:p text:style-name="P125">Ignored in IBX2. Uniqueness of parameter names is determined <text:soft-page-break/>automatically.</text:p>
          </table:table-cell>
        </table:table-row>
        <table:table-row>
          <table:table-cell table:style-name="Table31.A2" office:value-type="string">
            <text:p text:style-name="P125"><text:span text:style-name="Symbol">GoToFirstRecordOnExecute</text:span></text:p>
          </table:table-cell>
          <table:table-cell table:style-name="Table31.B2" office:value-type="string">
            <text:p text:style-name="P125">When true and the SQL Statement is a select query, the cursor is positioned at the first record, if any, after the query is executed.</text:p>
          </table:table-cell>
        </table:table-row>
        <table:table-row>
          <table:table-cell table:style-name="Table31.A2" office:value-type="string">
            <text:p text:style-name="P125"><text:span text:style-name="Symbol">ParamCheck</text:span></text:p>
          </table:table-cell>
          <table:table-cell table:style-name="Table31.B2" office:value-type="string">
            <text:p text:style-name="P125">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125"><text:span text:style-name="Symbol">SQL</text:span></text:p>
          </table:table-cell>
          <table:table-cell table:style-name="Table31.B2" office:value-type="string">
            <text:p text:style-name="P125">The SQL Statement as a multi-line string list.</text:p>
          </table:table-cell>
        </table:table-row>
        <table:table-row>
          <table:table-cell table:style-name="Table31.A2" office:value-type="string">
            <text:p text:style-name="P356">Scrollable</text:p>
          </table:table-cell>
          <table:table-cell table:style-name="Table31.B2" office:value-type="string">
            <text:p text:style-name="P356">If true then a scrollable cursor is opened when ExecQuery is executed for a SELECT statement. Note: scrollable cursors are supported by Firebird for local database connections only.</text:p>
          </table:table-cell>
        </table:table-row>
        <table:table-row>
          <table:table-cell table:style-name="Table31.A2" office:value-type="string">
            <text:p text:style-name="P125"><text:span text:style-name="Symbol">Transaction</text:span></text:p>
          </table:table-cell>
          <table:table-cell table:style-name="Table31.B2" office:value-type="string">
            <text:p text:style-name="P125">A Reference to the transaction used to execute the SQL Statement. Must be active before the query is executed otherwise an exception is raised.</text:p>
          </table:table-cell>
        </table:table-row>
      </table:table>
      <text:p text:style-name="P468"/>
      <text:h text:style-name="P907" text:outline-level="3"><text:bookmark-start text:name="__RefHeading___Toc15626_148275515"/>Using TIBSQL<text:bookmark-end text:name="__RefHeading___Toc15626_148275515"/></text:h>
      <text:p text:style-name="P124">TIBSQL can be used to specif<text:span text:style-name="T190">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963" text:outline-level="4"><text:bookmark-start text:name="__RefHeading___Toc15628_148275515"/>Executing a Stored Procedure<text:bookmark-end text:name="__RefHeading___Toc15628_148275515"/></text:h>
      <text:p text:style-name="P124">For example, if a <text:span text:style-name="Symbol">TIBSQL</text:span> component (e.g. named IBSQL1) contains the SQL Statement:</text:p>
      <text:p text:style-name="P126">Execute Procedure MyProc :Param1;</text:p>
      <text:p text:style-name="P123">Then this could be executed using:</text:p>
      <text:p text:style-name="P127">with IBSQL1 do</text:p>
      <text:p text:style-name="P127">begin</text:p>
      <text:p text:style-name="P127"><text:s text:c="2"/>Transaction.<text:span text:style-name="T190">Active := true</text:span>; {make sure transaction active}</text:p>
      <text:p text:style-name="P127"><text:s text:c="2"/>ParamByName('MyProc').AsInteger := 1; {assume integer parameter}</text:p>
      <text:p text:style-name="P127"><text:s text:c="2"/>ExecQuery;</text:p>
      <text:p text:style-name="P127">end;</text:p>
      <text:p text:style-name="P123">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27">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34">Parameter names are parsed and applied by the <text:span text:style-name="T12">fbinf</text:span> package (see the Firebird Pascal API section 6.1.1 for further details).</text:p>
      <text:h text:style-name="P963" text:outline-level="4"><text:bookmark-start text:name="__RefHeading___Toc13347_559740817"/><text:soft-page-break/>A Stored Procedure that returns Output<text:bookmark-end text:name="__RefHeading___Toc13347_559740817"/></text:h>
      <text:p text:style-name="P124">For example, if the store procedure is defined as:</text:p>
      <text:p text:style-name="P126">Create Procedure MyProc(aParameter Integer)</text:p>
      <text:p text:style-name="P126"><text:s text:c="2"/>Returns (SomeText VarChar(64))</text:p>
      <text:p text:style-name="P126">As ...</text:p>
      <text:p text:style-name="P129">Then executing the query should return results. In the above, these are simply accessed by name using the FieldByName method. Alternatively, they can be accessed by position using the Fields property. For example:</text:p>
      <text:p text:style-name="P128">with IBSQL1 do</text:p>
      <text:p text:style-name="P128">begin</text:p>
      <text:p text:style-name="P128"><text:s text:c="2"/>Transaction.<text:span text:style-name="T190">Active := true;</text:span></text:p>
      <text:p text:style-name="P128"><text:s text:c="2"/>ParamByName('MyProc').AsInteger := 1; {assume integer parameter}</text:p>
      <text:p text:style-name="P128"><text:s text:c="2"/>ExecQuery;</text:p>
      <text:p text:style-name="P132"><text:s text:c="2"/>writeln('Some Text = ',FieldByName('SomeText').AsString);</text:p>
      <text:p text:style-name="P128">end;</text:p>
      <text:p text:style-name="P134">Field Names are generally the same as the column or alias names given in the SQL Statement. However, there are exceptions. See the Firebird Pascal API Guide section 6.1.2 for further information.</text:p>
      <text:p text:style-name="P753">Note: Firebird handles INSERT … RETURNING and UPDATE … RETURNING in the same way as stored procedures. Returned values are similarly accessed in the same way as <text:s/>stored procedure output parameters i.e. using the FieldByName method.</text:p>
      <text:h text:style-name="P964" text:outline-level="4"><text:bookmark-start text:name="__RefHeading___Toc13349_559740817"/>Executing a Select Statement<text:bookmark-end text:name="__RefHeading___Toc13349_559740817"/></text:h>
      <text:p text:style-name="P130">If the TIBSQL statement is a <text:span text:style-name="T190">S</text:span>elect SQL Statement then it may return many rows of output. It may optionally also have input parameters similar to any other SQL Statement.</text:p>
      <text:p text:style-name="P13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133">Note: when a cursor is first opened, the cursor is placed on the first row unless the <text:span text:style-name="T127">GoToFirstRecordOnExecute </text:span>property is set to false. In which case, the Next method must be called prior to accessing the first row.</text:p>
      <text:p text:style-name="P129">For example, if the database is the example “employee” database and the SQL Statement is:</text:p>
      <text:p text:style-name="P131">Select EMP_NO,FULL_NAME From EMPLOYEES Order by 2;</text:p>
      <text:p text:style-name="P129">then the following will execute the query and write out the results, one line at a time.</text:p>
      <text:p text:style-name="P128">with IBSQL1 do</text:p>
      <text:p text:style-name="P128">begin</text:p>
      <text:p text:style-name="P128"><text:s text:c="2"/>Transaction.<text:span text:style-name="T190">Active := true;</text:span></text:p>
      <text:p text:style-name="P128"><text:s text:c="2"/>ExecQuery;</text:p>
      <text:p text:style-name="P128"><text:s text:c="2"/><text:span text:style-name="T128">while not EOF do</text:span></text:p>
      <text:p text:style-name="P128"><text:s text:c="2"/><text:span text:style-name="T128">begin</text:span></text:p>
      <text:p text:style-name="P132"><text:s text:c="4"/>write('EMP_NO = ',Fields[0].AsString);</text:p>
      <text:p text:style-name="P132"><text:s text:c="4"/>writeln(': Full Name = ',Fields[1].AsString);</text:p>
      <text:p text:style-name="P132"><text:s text:c="4"/>Next;</text:p>
      <text:p text:style-name="P132"><text:s text:c="2"/>end;</text:p>
      <text:p text:style-name="P132"><text:soft-page-break/><text:s text:c="2"/>Close;</text:p>
      <text:p text:style-name="P128">end;</text:p>
      <text:h text:style-name="P965" text:outline-level="4"><text:bookmark-start text:name="__RefNumPara__28274_148275515"/><text:bookmark-start text:name="__RefHeading___Toc28278_148275515"/>Batched Queries<text:bookmark-end text:name="__RefNumPara__28274_148275515"/><text:bookmark-end text:name="__RefHeading___Toc28278_148275515"/></text:h>
      <text:p text:style-name="P626">Firebird 4 introduces the Batch Execution interface. This applies to Update and Insert queries only (<text:span text:style-name="T376">i.e. </text:span>not update/insert returning) and can be used to batch up many <text:span text:style-name="T376">separate </text:span>queries to be executed as a single operation. This can be used to minimise the client/server interfaces and to optimise server update/insert times.</text:p>
      <text:p text:style-name="P353">TIBSQL simply provides a wrapper for the IStatement implementation of the Batch Execution interface. TIBSQL provides the following functions that support Batch Execution and call the IStatement equivalents:</text:p>
      <text:p text:style-name="pascalcode"><text:span text:style-name="T374">procedure</text:span> AddToBatch;</text:p>
      <text:p text:style-name="pascalcode">function ExecuteBatch: IBatchCompletion;</text:p>
      <text:p text:style-name="pascalcode">procedure CancelBatch;</text:p>
      <text:p text:style-name="pascalcode">function GetBatchCompletion: I<text:span text:style-name="T377">B</text:span>atchCompletion;</text:p>
      <text:p text:style-name="P751">function GetBatchRowLimit: integer;</text:p>
      <text:p text:style-name="P751">procedure SetBatchRowLimit(aLimit: integer);</text:p>
      <text:p text:style-name="P751">function HasBatchMode: boolean;</text:p>
      <text:p text:style-name="pascalcode">function IsInBatchMode: boolean;</text:p>
      <text:p text:style-name="P352">For more information see the Firebird Pascal API Guide, section 6.8.</text:p>
      <text:h text:style-name="P908" text:outline-level="3"><text:bookmark-start text:name="__RefHeading___Toc12469_559740817"/>The TIBSQL SQL Property Editor<text:bookmark-end text:name="__RefHeading___Toc12469_559740817"/></text:h>
      <text:p text:style-name="P564">The TIBSQL component has its own property editor for editing the SQL query property.</text:p>
      <text:p text:style-name="P565"><draw:frame draw:style-name="fr3" draw:name="Frame19" text:anchor-type="paragraph" svg:width="6.6953in" draw:z-index="46"><draw:text-box fo:min-height="5.3638in"><text:p text:style-name="Illustration"><draw:frame draw:style-name="fr14" draw:name="Image41" text:anchor-type="as-char" svg:width="6.6953in" style:rel-width="100%" svg:height="4.9819in" style:rel-height="scale" draw:z-index="72"><draw:image xlink:href="Pictures/100000000000030A0000024337B19296.png" xlink:type="simple" xlink:show="embed" xlink:actuate="onLoad" draw: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567">Provided that the TIBSQL component is linked (at design time) to a valid database then:</text:p>
      <text:list text:style-name="L43">
        <text:list-item>
          <text:p text:style-name="P1065">The SQL syntax can be tested using the “Test” button. When the “Test” button is clicked, the statement is passed to the Firebird Server for validation.</text:p>
        </text:list-item>
        <text:list-item>
          <text:p text:style-name="P1066">The SQL Property Editor can also generate an initial SQL Statement which can then be edited by the user. The left hand tabs and pan<text:span text:style-name="T268">e</text:span>l are used to select the type and composition of the generated SQL statement.</text:p>
        </text:list-item>
      </text:list>
      <text:p text:style-name="P56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566">The available columns are then analysed into:</text:p>
      <text:list text:style-name="L44">
        <text:list-item>
          <text:p text:style-name="P1067">Primary Keys (for the table)</text:p>
        </text:list-item>
        <text:list-item>
          <text:p text:style-name="P1067">Identity Columns (Firebird 3 only – see <text:bookmark-ref text:reference-format="number" text:ref-name="__RefHeading___Toc10610_600433823">6.6.8</text:bookmark-ref>)</text:p>
        </text:list-item>
        <text:list-item>
          <text:p text:style-name="P1067"><text:soft-page-break/>Computed By columns (i.e. columns computed by the server from other columns in the same row).</text:p>
        </text:list-item>
        <text:list-item>
          <text:p text:style-name="P1067">Updateable Columns (i.e. all other columns).</text:p>
        </text:list-item>
      </text:list>
      <text:p text:style-name="P566">By default all columns are selected. However, the mouse may be used to deselect the columns not required for the Insert Statement by clicking on the tick box.</text:p>
      <text:p text:style-name="P566">When the “Generate SQL” button is clicked an Insert SQL Statement is generated:</text:p>
      <text:list text:style-name="L45">
        <text:list-item>
          <text:p text:style-name="P1068">The selected primary keys are listed first except for those also selected as Identity Columns</text:p>
        </text:list-item>
        <text:list-item>
          <text:p text:style-name="P1068">The selected Updateable columns then comprise the remainder of the insert statement.</text:p>
        </text:list-item>
        <text:list-item>
          <text:p text:style-name="P1069">The selected Identity and Computed By columns are then listed in the RETURNING clause <text:span text:style-name="T266">and, after the statement has been executed, their updated values can hence be retrieved from the TIBSQL.Fields property, or by using the FieldByName function (as discussed above for select queries)</text:span>.</text:p>
        </text:list-item>
      </text:list>
      <text:p text:style-name="P568">Generation of Select, Update and Delete SQL statements follow similar rules, except that Identity columns are only relevant to Insert SQL Statements.</text:p>
      <text:p text:style-name="P569">The generation of execute statements depends on the type of stored procedure (see <text:sequence-ref text:reference-format="category-and-value" text:ref-name="refIllustration7">Illustration 8</text:sequence-ref>).</text:p>
      <text:p text:style-name="P6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69">In the illustration, the example package 'FB$OUT' is selected and then the PUT_LINE stored procedure from this package.</text:span></text:p>
      <text:p text:style-name="P63">Clicking on the “Generate SQL” key will generate an Execute Procedure SQL statement with the input parameters <text:span text:style-name="T270">specified for the procedure. Note that while these are shown in the panel, the input parameters are not selectable (a requirement of the SQL syntax).</text:span></text:p>
      <text:p text:style-name="P64">Similarly with output parameters. These are not normally selectable and are not included in the generate<text:span text:style-name="T271">d</text:span> SQL. However, they can be read <text:span text:style-name="T266">after the statement has been executed; their values can be retrieved from the TIBSQL.Fields property, or by using the FieldByName function (as discussed above for select queries).</text:span></text:p>
      <text:p text:style-name="P64">The exception is for stored procedures that return multiple rows. In this case, a select statement is generated and the output parameters are selectable <text:span text:style-name="T271">(see </text:span><text:span text:style-name="T271"><text:bookmark-ref text:reference-format="number" text:ref-name="__RefHeading___Toc13349_559740817">5.4.2.3</text:bookmark-ref></text:span><text:span text:style-name="T271">)</text:span>.</text:p>
      <text:h text:style-name="P882" text:outline-level="3"><draw:frame draw:style-name="fr3" draw:name="Frame20" text:anchor-type="paragraph" svg:width="6.6953in" draw:z-index="47"><draw:text-box fo:min-height="5.4146in"><text:p text:style-name="Illustration"><draw:frame draw:style-name="fr14" draw:name="Image42" text:anchor-type="as-char" svg:width="6.6953in" style:rel-width="100%" svg:height="4.9866in" style:rel-height="scale" draw:z-index="73"><draw:image xlink:href="Pictures/100000000000030E0000024A82A021B0.png" xlink:type="simple" xlink:show="embed" xlink:actuate="onLoad" draw:mime-type="image/png"/></draw:frame><text:line-break/>Illustration <text:sequence text:ref-name="refIllustration4" text:name="Illustration" text:formula="ooow:Illustration+1" style:num-format="1">5</text:sequence>: Using the TIBSQL Property Editor to Generate Execute Statements</text:p></draw:text-box></draw:frame><text:bookmark-start text:name="__RefHeading___Toc27961_3235793879"/><text:bookmark-start text:name="__RefNumPara__27957_3235793879"/><text:soft-page-break/>Scrollable Cursors<text:bookmark-end text:name="__RefHeading___Toc27961_3235793879"/><text:bookmark-end text:name="__RefNumPara__27957_3235793879"/></text:h>
      <text:p text:style-name="P354"><text:span text:style-name="T379">If a scrollable cursor is </text:span><text:span text:style-name="T381">opened by TIBSQL</text:span><text:span text:style-name="T379"> then </text:span><text:span text:style-name="T378">the following methods may be used to position the cursor</text:span><text:span text:style-name="T379">:</text:span></text:p>
      <text:list text:style-name="L46">
        <text:list-item>
          <text:p text:style-name="P1136">FetchNext <text:span text:style-name="T378">may be called to fetch the next record (synonym for “Next”)</text:span></text:p>
        </text:list-item>
        <text:list-item>
          <text:p text:style-name="P1137">FetchPrior may be called to fetch the previous record</text:p>
        </text:list-item>
        <text:list-item>
          <text:p text:style-name="P1137">FetchFirst may be called to fetch the first record in the dataset.</text:p>
        </text:list-item>
        <text:list-item>
          <text:p text:style-name="P1135"><text:span text:style-name="T379">FetchLast <text:s/>may be called to fetch the </text:span><text:span text:style-name="T380">last</text:span><text:span text:style-name="T379"> record in the dataset.</text:span></text:p>
        </text:list-item>
        <text:list-item>
          <text:p text:style-name="P1135">FetchAbsolute <text:span text:style-name="T379">may called to fetch by record number.</text:span></text:p>
        </text:list-item>
        <text:list-item>
          <text:p text:style-name="P1137">FetchRelative <text:s/>may called to fetch by the relative record number.</text:p>
        </text:list-item>
      </text:list>
      <text:p text:style-name="P357">Note: scrollable cursors are only supported for local databases at present (Firebird limitation).</text:p>
      <text:p text:style-name="P355">The HasScrollableCursor method may be used to determine if the database connection supports scrollable cursors.</text:p>
      <text:h text:style-name="P817" text:outline-level="1"><text:bookmark-start text:name="__RefHeading__13244_1991610482"/><text:line-break/><text:span text:style-name="T45">The DataSet Components</text:span><text:bookmark-end text:name="__RefHeading__13244_1991610482"/></text:h>
      <text:p text:style-name="P469">The <text:span text:style-name="Symbol">TDataset</text:span> model introduced with Delphi and re-implemented by Free Pascal provides a common model for <text:span text:style-name="T191">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70">A dataset is composed or one or more rows of data, organised into columns. A Field is said to be the intersection of a row and a column and is known by the column name. <text:span text:style-name="T191">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499"><text:span text:style-name="Symbol"><text:span text:style-name="T148">TDataset</text:span></text:span><text:span text:style-name="T148"> is an abstract class which provides a common ancestor for many different types of dataset and databases. IBX provides a set of </text:span><text:span text:style-name="Symbol"><text:span text:style-name="T148">TDataset</text:span></text:span><text:span text:style-name="T148"> subclasses in order to provide efficient SQL based access to data held in Firebird databases. In addition to defining the common view of a dataset, </text:span><text:span text:style-name="Symbol"><text:span text:style-name="T147">TDataset</text:span></text:span><text:span text:style-name="T147"> also defines common methods for selecting (</text:span><text:span text:style-name="Symbol"><text:span text:style-name="T147">locate</text:span></text:span><text:span text:style-name="T147">) a specific row in the dataset and moving backwards and forwards through the dataset (</text:span><text:span text:style-name="Symbol"><text:span text:style-name="T147">First, Last, Next, Prior </text:span></text:span><text:span text:style-name="Symbol">and</text:span><text:span text:style-name="Symbol"><text:span text:style-name="T147"> MoveBy</text:span></text:span><text:span text:style-name="T147">).</text:span></text:p>
      <text:p text:style-name="P46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44" text:outline-level="2"><text:bookmark-start text:name="__RefHeading___Toc15630_148275515"/>IBX Datasets<text:bookmark-end text:name="__RefHeading___Toc15630_148275515"/></text:h>
      <text:p text:style-name="P469">The IBX Datasets available for use are:</text:p>
      <text:list text:style-name="L47">
        <text:list-item>
          <text:p text:style-name="P1070">TIBTable</text:p>
        </text:list-item>
        <text:list-item>
          <text:p text:style-name="P1071">TIBStoredProc</text:p>
        </text:list-item>
        <text:list-item>
          <text:p text:style-name="P1070">TIBQuery</text:p>
        </text:list-item>
        <text:list-item>
          <text:p text:style-name="P1070">TIBDataset</text:p>
        </text:list-item>
      </text:list>
      <text:p text:style-name="P181"><text:soft-page-break/>In support of <text:span text:style-name="T239">TIBQuery</text:span>, <text:span text:style-name="Symbol">TIBUpdateSQL</text:span> provides a means to add or override the SQL used to modify, insert, delete or refresh a dataset.</text:p>
      <text:h text:style-name="P845" text:outline-level="2"><text:bookmark-start text:name="__RefHeading___Toc15632_148275515"/>Common Concepts<text:bookmark-end text:name="__RefHeading___Toc15632_148275515"/></text:h>
      <text:h text:style-name="P909" text:outline-level="3"><text:bookmark-start text:name="__RefNumPara__24092_1614309218"/><text:bookmark-start text:name="__RefHeading___Toc15634_148275515"/>Common Properties<text:bookmark-end text:name="__RefNumPara__24092_1614309218"/><text:bookmark-end text:name="__RefHeading___Toc15634_148275515"/></text:h>
      <text:p text:style-name="P13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136"><text:span text:style-name="Symbol">Active</text:span></text:p>
          </table:table-cell>
          <table:table-cell table:style-name="Table32.B1" office:value-type="string">
            <text:p text:style-name="P13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136"><text:span text:style-name="Symbol">AllowAutoActivateTransaction</text:span></text:p>
          </table:table-cell>
          <table:table-cell table:style-name="Table32.B2" office:value-type="string">
            <text:p text:style-name="P136">If this property is set to true then activating the dataset (setting its active property to true) will automatically start the dataset's transaction.</text:p>
          </table:table-cell>
        </table:table-row>
        <table:table-row>
          <table:table-cell table:style-name="Table32.A2" office:value-type="string">
            <text:p text:style-name="P476"><text:span text:style-name="Symbol">AutoCalcFields</text:span></text:p>
          </table:table-cell>
          <table:table-cell table:style-name="Table32.B2" office:value-type="string">
            <text:p text:style-name="P47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136"><text:span text:style-name="Symbol">AutoCommit</text:span></text:p>
          </table:table-cell>
          <table:table-cell table:style-name="Table32.B2" office:value-type="string">
            <text:p text:style-name="P13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136"><text:span text:style-name="Symbol">BufferChunksInFirstBlock</text:span></text:p>
          </table:table-cell>
          <table:table-cell table:style-name="Table32.B2" office:value-type="string">
            <text:p text:style-name="P739"><text:span text:style-name="T431">Default 50: This gives the number of buffers in the initial block for the buffer pool in bi-directional datasets. With most small datasets this should be sufficient to contain all rows. Although </text:span><text:span text:style-name="T373">this property may be given a higher value for larger datasets, the BufferChunks property applies to all subsequent blocks and its value should be appropriate for larger datasets. See </text:span><text:span text:style-name="T373"><text:bookmark-ref text:reference-format="number-no-superior" text:ref-name="__RefNumPara__19964_1614309218">Appendix B</text:bookmark-ref></text:span></text:p>
          </table:table-cell>
        </table:table-row>
        <table:table-row>
          <table:table-cell table:style-name="Table32.A2" office:value-type="string">
            <text:p text:style-name="P136"><text:span text:style-name="Symbol">BufferChunks</text:span></text:p>
          </table:table-cell>
          <table:table-cell table:style-name="Table32.B2" office:value-type="string">
            <text:p text:style-name="P738"><text:span text:style-name="T29">Default 1000: This gives the number of buffers in the second and subsequent buffer pool blocks. </text:span><text:span text:style-name="T43">In most cases, there will probably be no reason to change this value.</text:span></text:p>
          </table:table-cell>
        </table:table-row>
        <table:table-row>
          <table:table-cell table:style-name="Table32.A2" office:value-type="string">
            <text:p text:style-name="P476"><text:span text:style-name="Symbol">CachedUpdates</text:span></text:p>
          </table:table-cell>
          <table:table-cell table:style-name="Table32.B2" office:value-type="string">
            <text:p text:style-name="P476">If true then updates are held locally instead of being written to the database, when changes are posted. Only when the <text:span text:style-name="Symbol">ApplyUpdates</text:span> method is called are the changes written to the database. <text:span text:style-name="T132">The </text:span><text:span text:style-name="Symbol"><text:span text:style-name="T132">CancelUpdates</text:span></text:span><text:span text:style-name="T132"> method can be used to roll back all changes to the last time </text:span><text:span text:style-name="Symbol"><text:span text:style-name="T132">ApplyUpdates</text:span></text:span><text:span text:style-name="T132"> was called.</text:span></text:p>
            <text:p text:style-name="P672">This performs a form of Commit/Rollback without having to write data to the database itself.</text:p>
          </table:table-cell>
        </table:table-row>
        <text:soft-page-break/>
        <table:table-row>
          <table:table-cell table:style-name="Table32.A2" office:value-type="string">
            <text:p text:style-name="P669"><text:span text:style-name="Symbol">Database</text:span></text:p>
          </table:table-cell>
          <table:table-cell table:style-name="Table32.B2" office:value-type="string">
            <text:p text:style-name="P669">A reference to the <text:span text:style-name="Symbol"><text:span text:style-name="T191">T</text:span></text:span><text:span text:style-name="Symbol">IBDatabase</text:span> managing the connection to the database used for this dataset.</text:p>
          </table:table-cell>
        </table:table-row>
        <table:table-row>
          <table:table-cell table:style-name="Table32.A2" office:value-type="string">
            <text:p text:style-name="P669"><text:span text:style-name="Symbol">DatasetCloseAction</text:span></text:p>
          </table:table-cell>
          <table:table-cell table:style-name="Table32.B2" office:value-type="string">
            <text:p text:style-name="P669">Set to “DiscardChanges” (default) or “SaveChanges”. This determines how the dataset handles a modified b<text:span text:style-name="T191">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669"><text:span text:style-name="Symbol">Transaction</text:span></text:p>
          </table:table-cell>
          <table:table-cell table:style-name="Table32.B2" office:value-type="string">
            <text:p text:style-name="P669">A reference to the transaction under which the dataset is read from the database and updates are applied.</text:p>
          </table:table-cell>
        </table:table-row>
        <table:table-row>
          <table:table-cell table:style-name="Table32.A2" office:value-type="string">
            <text:p text:style-name="P669"><text:span text:style-name="Symbol">Unidirectional</text:span></text:p>
          </table:table-cell>
          <table:table-cell table:style-name="Table32.B2" office:value-type="string">
            <text:p text:style-name="P669">If true then the dataset can only be scrolled forwards. Avoids the need to create and maintain a large internal buffer pool (see BufferChunks above).</text:p>
          </table:table-cell>
        </table:table-row>
      </table:table>
      <text:p text:style-name="P135"/>
      <text:h text:style-name="P910" text:outline-level="3"><text:bookmark-start text:name="__RefHeading___Toc15636_148275515"/>Common Events<text:bookmark-end text:name="__RefHeading___Toc15636_148275515"/></text:h>
      <text:p text:style-name="P47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72"><text:span text:style-name="Symbol">BeforeOpen</text:span></text:p>
          </table:table-cell>
          <table:table-cell table:style-name="Table33.B1" office:value-type="string">
            <text:p text:style-name="P47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72">This event handler can also be used to activate datasets that should be open before this one is opened<text:note text:id="ftn3" text:note-class="footnote"><text:note-citation>3</text:note-citation><text:note-body><text:p text:style-name="P47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72"><text:span text:style-name="Symbol">AfterOpen</text:span></text:p>
          </table:table-cell>
          <table:table-cell table:style-name="Table33.B2" office:value-type="string">
            <text:p text:style-name="P472">This event handler can be used to locate the dataset on a specific record. It is also a good place to open datasets that depend on this dataset e.g. in a master/detail relationship.</text:p>
          </table:table-cell>
        </table:table-row>
        <table:table-row>
          <table:table-cell table:style-name="Table33.A2" office:value-type="string">
            <text:p text:style-name="P472"><text:span text:style-name="Symbol">BeforeClose</text:span></text:p>
          </table:table-cell>
          <table:table-cell table:style-name="Table33.B2" office:value-type="string">
            <text:p text:style-name="P472">Typically used to ensure that datasets that must be closed before this one are closed. e.g. in a master/detail relationship.</text:p>
          </table:table-cell>
        </table:table-row>
        <table:table-row>
          <table:table-cell table:style-name="Table33.A2" office:value-type="string">
            <text:p text:style-name="P472"><text:span text:style-name="Symbol">AfterClose</text:span></text:p>
          </table:table-cell>
          <table:table-cell table:style-name="Table33.B2" office:value-type="string">
            <text:p text:style-name="P472">Typically used to close datasets that no longer need to be open once this dataset has closed.</text:p>
          </table:table-cell>
        </table:table-row>
        <table:table-row>
          <table:table-cell table:style-name="Table33.A2" office:value-type="string">
            <text:p text:style-name="P472"><text:span text:style-name="Symbol">BeforeEdit</text:span></text:p>
          </table:table-cell>
          <table:table-cell table:style-name="Table33.B2" office:value-type="string">
            <text:p text:style-name="P472">Raise an exception here if the row should not be edited.</text:p>
          </table:table-cell>
        </table:table-row>
        <table:table-row>
          <table:table-cell table:style-name="Table33.A2" office:value-type="string">
            <text:p text:style-name="P472"><text:span text:style-name="Symbol">AfterEdit</text:span></text:p>
          </table:table-cell>
          <table:table-cell table:style-name="Table33.B2" office:value-type="string">
            <text:p text:style-name="P472">This handler can be used to set some visual indication that <text:soft-page-break/>the row is now in the edit state.</text:p>
          </table:table-cell>
        </table:table-row>
        <table:table-row>
          <table:table-cell table:style-name="Table33.A2" office:value-type="string">
            <text:p text:style-name="P472"><text:span text:style-name="Symbol">BeforeInsert</text:span></text:p>
          </table:table-cell>
          <table:table-cell table:style-name="Table33.B2" office:value-type="string">
            <text:p text:style-name="P472">Raise an exception here if the row should not be inserted at this time</text:p>
          </table:table-cell>
        </table:table-row>
        <table:table-row>
          <table:table-cell table:style-name="Table33.A2" office:value-type="string">
            <text:p text:style-name="P472"><text:span text:style-name="Symbol">AfterInsert</text:span></text:p>
          </table:table-cell>
          <table:table-cell table:style-name="Table33.B2" office:value-type="string">
            <text:p text:style-name="P472">A good place to set initial values for a newly inserted row.</text:p>
          </table:table-cell>
        </table:table-row>
        <table:table-row>
          <table:table-cell table:style-name="Table33.A2" office:value-type="string">
            <text:p text:style-name="P472"><text:span text:style-name="Symbol">BeforeDelete</text:span></text:p>
          </table:table-cell>
          <table:table-cell table:style-name="Table33.B2" office:value-type="string">
            <text:p text:style-name="P472">Raise an exception here if the row should not be deleted.</text:p>
          </table:table-cell>
        </table:table-row>
        <table:table-row>
          <table:table-cell table:style-name="Table33.A2" office:value-type="string">
            <text:p text:style-name="P472"><text:span text:style-name="Symbol">AfterDelete</text:span></text:p>
          </table:table-cell>
          <table:table-cell table:style-name="Table33.B2" office:value-type="string">
            <text:p text:style-name="P472">Could be used to give some visual indication that there are pending changes to be committed (AutoCommit off).</text:p>
          </table:table-cell>
        </table:table-row>
        <table:table-row>
          <table:table-cell table:style-name="Table33.A2" office:value-type="string">
            <text:p text:style-name="P472"><text:span text:style-name="Symbol">BeforeCancel</text:span></text:p>
          </table:table-cell>
          <table:table-cell table:style-name="Table33.B2" office:value-type="string">
            <text:p text:style-name="P472">Raise an exception here if the changes should not be cancelled.</text:p>
          </table:table-cell>
        </table:table-row>
        <table:table-row>
          <table:table-cell table:style-name="Table33.A2" office:value-type="string">
            <text:p text:style-name="P472"><text:span text:style-name="Symbol">AfterCancel</text:span></text:p>
          </table:table-cell>
          <table:table-cell table:style-name="Table33.B2" office:value-type="string">
            <text:p text:style-name="P472">This handler can be used to reset the visual indication that the row is in the edit state. </text:p>
          </table:table-cell>
        </table:table-row>
        <table:table-row>
          <table:table-cell table:style-name="Table33.A2" office:value-type="string">
            <text:p text:style-name="P472"><text:span text:style-name="Symbol">BeforePost</text:span></text:p>
          </table:table-cell>
          <table:table-cell table:style-name="Table33.B2" office:value-type="string">
            <text:p text:style-name="P472">Raise an exception here if the changes should not be posted, perhaps after validation.</text:p>
            <text:p text:style-name="P671">May also be used to set field values when the field is not managed by a data aware control.</text:p>
          </table:table-cell>
        </table:table-row>
        <table:table-row>
          <table:table-cell table:style-name="Table33.A2" office:value-type="string">
            <text:p text:style-name="P472"><text:span text:style-name="Symbol">AfterPost</text:span></text:p>
          </table:table-cell>
          <table:table-cell table:style-name="Table33.B2" office:value-type="string">
            <text:p text:style-name="P472">Could be used to give some visual indication that there are pending changes to be committed (AutoCommit off).</text:p>
          </table:table-cell>
        </table:table-row>
        <table:table-row>
          <table:table-cell table:style-name="Table33.A2" office:value-type="string">
            <text:p text:style-name="P472"><text:span text:style-name="Symbol">BeforeTransactionEnd</text:span></text:p>
          </table:table-cell>
          <table:table-cell table:style-name="Table33.B2" office:value-type="string">
            <text:p text:style-name="P474">Raise an exception here if the <text:span text:style-name="T131">transaction should not be completed at this time.</text:span></text:p>
          </table:table-cell>
        </table:table-row>
        <table:table-row>
          <table:table-cell table:style-name="Table33.A2" office:value-type="string">
            <text:p text:style-name="P472"><text:span text:style-name="Symbol">AfterTransactionEnd</text:span></text:p>
          </table:table-cell>
          <table:table-cell table:style-name="Table33.B2" office:value-type="string">
            <text:p text:style-name="P671">Could be used to reset the <text:span text:style-name="T130">visual indication that there are pending changes to be committed</text:span></text:p>
          </table:table-cell>
        </table:table-row>
        <table:table-row>
          <table:table-cell table:style-name="Table33.A2" office:value-type="string">
            <text:p text:style-name="P472"><text:span text:style-name="Symbol">OnCalcFields</text:span></text:p>
          </table:table-cell>
          <table:table-cell table:style-name="Table33.B2" office:value-type="string">
            <text:p text:style-name="P67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671"><text:span text:style-name="Symbol">BeforeScroll</text:span></text:p>
          </table:table-cell>
          <table:table-cell table:style-name="Table33.B2" office:value-type="string">
            <text:p text:style-name="P671">Called before changing to a different row. <text:span text:style-name="T130">Raise an exception here if the </text:span>row should not be changed.</text:p>
          </table:table-cell>
        </table:table-row>
        <table:table-row>
          <table:table-cell table:style-name="Table33.A2" office:value-type="string">
            <text:p text:style-name="P671"><text:span text:style-name="Symbol">AfterScroll</text:span></text:p>
          </table:table-cell>
          <table:table-cell table:style-name="Table33.B2" office:value-type="string">
            <text:p text:style-name="P671">Called after changing to a different row. Could be used to update controls from field values when the controls are not data aware.</text:p>
          </table:table-cell>
        </table:table-row>
      </table:table>
      <text:p text:style-name="P471"/>
      <text:h text:style-name="P911" text:outline-level="3"><text:bookmark-start text:name="__RefHeading___Toc15638_148275515"/><text:soft-page-break/>Exception Handling<text:bookmark-end text:name="__RefHeading___Toc15638_148275515"/></text:h>
      <text:p text:style-name="P527">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1">and which</text:span> reports <text:span text:style-name="Symbol">EIBInterBaseError</text:span> exceptions appropriately may be a more efficient approach.</text:p>
      <text:h text:style-name="P912" text:outline-level="3"><text:bookmark-start text:name="__RefHeading___Toc15640_148275515"/>Character Sets and Code Pages<text:bookmark-end text:name="__RefHeading___Toc15640_148275515"/></text:h>
      <text:p text:style-name="P528">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1">to</text:span> transliterate if necessary when transferring data to and from text fields in a database. See Chapter 9 of the Firebird Pascal API Guide for more information.</text:p>
      <text:h text:style-name="P845" text:outline-level="2"><text:bookmark-start text:name="__RefHeading__24776_1844166745"/>TIBTable<text:bookmark-end text:name="__RefHeading__24776_1844166745"/></text:h>
      <text:p text:style-name="P47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1">See also the example in “ibx/examples/ibtable”.</text:span></text:p>
      <text:h text:style-name="P913"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638"><text:span text:style-name="Symbol">GeneratorField</text:span></text:p>
          </table:table-cell>
          <table:table-cell table:style-name="Table34.B1" office:value-type="string">
            <text:p text:style-name="P638"><text:span text:style-name="T272">S</text:span>pecifies the automatic setting of a field from a Firebird generator when a new row is appended to the <text:span text:style-name="T272">table</text:span>. <text:span text:style-name="T193">See </text:span><text:span text:style-name="T193"><text:bookmark-ref text:reference-format="number" text:ref-name="__RefHeading__25873_1844166745">6.6.3</text:bookmark-ref></text:span><text:span text:style-name="T193">.</text:span></text:p>
          </table:table-cell>
        </table:table-row>
        <table:table-row>
          <table:table-cell table:style-name="Table34.A2" office:value-type="string">
            <text:p text:style-name="P673"><text:span text:style-name="Symbol">IndexDefs</text:span></text:p>
          </table:table-cell>
          <table:table-cell table:style-name="Table34.B2" office:value-type="string">
            <text:p text:style-name="P673">Allows editing and hence modification of the index definitions for table. Use with the “StoreDefs” property. </text:p>
          </table:table-cell>
        </table:table-row>
        <table:table-row>
          <table:table-cell table:style-name="Table34.A2" office:value-type="string">
            <text:p text:style-name="P672"><text:span text:style-name="Symbol">IndexFieldNames</text:span></text:p>
          </table:table-cell>
          <table:table-cell table:style-name="Table34.B2" office:value-type="string">
            <text:p text:style-name="P673">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673"><text:span text:style-name="Symbol">IndexName</text:span></text:p>
          </table:table-cell>
          <table:table-cell table:style-name="Table34.B2" office:value-type="string">
            <text:p text:style-name="P673">Identifies an index used to sort the table. This property may not be used in a “Detail” table.</text:p>
          </table:table-cell>
        </table:table-row>
        <table:table-row>
          <table:table-cell table:style-name="Table34.A2" office:value-type="string">
            <text:p text:style-name="P672"><text:span text:style-name="Symbol">MasterFields</text:span></text:p>
          </table:table-cell>
          <table:table-cell table:style-name="Table34.B2" office:value-type="string">
            <text:p text:style-name="P673">Used by the “Detail” table in a Master/Detail relation: identifies <text:span text:style-name="T133">the field names in the master table which correspond to the </text:span><text:span text:style-name="Symbol"><text:span text:style-name="T133">IndexFieldNames</text:span></text:span><text:span text:style-name="T133">.</text:span></text:p>
          </table:table-cell>
        </table:table-row>
        <table:table-row>
          <table:table-cell table:style-name="Table34.A2" office:value-type="string">
            <text:p text:style-name="P672"><text:span text:style-name="Symbol">MasterSource</text:span></text:p>
          </table:table-cell>
          <table:table-cell table:style-name="Table34.B2" office:value-type="string">
            <text:p text:style-name="P673">Used by the “Detail” table in a Master/Detail relation: Identifies the data source for the master table.</text:p>
          </table:table-cell>
        </table:table-row>
        <table:table-row>
          <table:table-cell table:style-name="Table34.A2" office:value-type="string">
            <text:p text:style-name="P721"><text:span text:style-name="Symbol">MasterDetailDelay</text:span></text:p>
          </table:table-cell>
          <table:table-cell table:style-name="Table34.B2" office:value-type="string">
            <text:p text:style-name="P721"><text:span text:style-name="T32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721"><text:soft-page-break/>Inserting such a delay can be a useful way of improving performance when the detail dataset is large or takes a long time to open.</text:p>
            <text:p text:style-name="P760">Note: <text:span text:style-name="T343">Ignored in console mode</text:span>.</text:p>
          </table:table-cell>
        </table:table-row>
        <table:table-row>
          <table:table-cell table:style-name="Table34.A2" office:value-type="string">
            <text:p text:style-name="P673"><text:span text:style-name="Symbol">StoreDefs</text:span></text:p>
          </table:table-cell>
          <table:table-cell table:style-name="Table34.B2" office:value-type="string">
            <text:p text:style-name="P673">If true then the index defs are stored in the form's lfm file.</text:p>
          </table:table-cell>
        </table:table-row>
        <table:table-row>
          <table:table-cell table:style-name="Table34.A2" office:value-type="string">
            <text:p text:style-name="P672"><text:span text:style-name="Symbol">TableName</text:span></text:p>
          </table:table-cell>
          <table:table-cell table:style-name="Table34.B2" office:value-type="string">
            <text:p text:style-name="P673">The name of the database table that is the source for the dataset.</text:p>
          </table:table-cell>
        </table:table-row>
        <table:table-row>
          <table:table-cell table:style-name="Table34.A2" office:value-type="string">
            <text:p text:style-name="P672"><text:span text:style-name="Symbol">TableTypes</text:span></text:p>
          </table:table-cell>
          <table:table-cell table:style-name="Table34.B2" office:value-type="string">
            <text:p text:style-name="P674">Used to control the list of tables names returned from the server at design time. The default list is user tables only. System tables and views can be added to the list by selecting the appropriate options.</text:p>
          </table:table-cell>
        </table:table-row>
      </table:table>
      <text:p text:style-name="P477"/>
      <text:h text:style-name="P913" text:outline-level="3"><text:bookmark-start text:name="__RefHeading___Toc15642_148275515"/>Using TIBTable<text:bookmark-end text:name="__RefHeading___Toc15642_148275515"/></text:h>
      <text:p text:style-name="P478">A <text:span text:style-name="Symbol">TIBTable</text:span> is arguably the simplest IBX dataset to use – although also limited in capability. To use <text:span text:style-name="T191">it</text:span> simply drop the component on to a form <text:span text:style-name="T134">and, in the Object Inspector</text:span>, link it to a <text:span text:style-name="Symbol">TIBDatabase</text:span> and then select the required table from the drop down list <text:span text:style-name="T134">for the </text:span><text:span text:style-name="Symbol"><text:span text:style-name="T134">TableName</text:span></text:span><text:span text:style-name="T134"> property</text:span>. When the <text:span text:style-name="Symbol">Active</text:span> property is set, SQL is automatically generated to read the database table contents into the dataset.</text:p>
      <text:p text:style-name="P478">The row order can be varied by selecting an (existing) index on which to sort the data, or giving a list of <text:span text:style-name="Symbol">IndexFileNames</text:span> in field sort order.</text:p>
      <text:p text:style-name="P532"><text:span text:style-name="T192">The table is also updateable unless its ReadOnly property is true. The SQL needed to update the database is also automatically generated. If </text:span><text:span text:style-name="Symbol"><text:span text:style-name="T192">AllowAutoActivateTransaction</text:span></text:span><text:span text:style-name="T192"> and </text:span><text:span text:style-name="Symbol"><text:span text:style-name="T192">AutoCommit</text:span></text:span><text:span text:style-name="T192"> are also true then transaction management is fully automated and all changes are automatically saved to the database. You should also select the </text:span><text:span text:style-name="Symbol"><text:span text:style-name="T192">DatasetCloseAction</text:span></text:span><text:span text:style-name="T192"> to </text:span><text:span text:style-name="Symbol"><text:span text:style-name="T192">SaveChanges</text:span></text:span><text:span text:style-name="T192">. The example program operates in this way, with master data </text:span><text:span text:style-name="Symbol"><text:span text:style-name="T192">AllowAutoActivateTransaction </text:span></text:span><text:span text:style-name="Symbol">set to true</text:span><text:span text:style-name="Symbol"><text:span text:style-name="T192">.</text:span></text:span></text:p>
      <text:h text:style-name="Heading_20_4" text:outline-level="4"><text:bookmark-start text:name="__RefHeading___Toc13839_811369602"/>Master/Detail Tables<text:bookmark-end text:name="__RefHeading___Toc13839_811369602"/></text:h>
      <text:p text:style-name="P478">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478">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3">joining the two on the department name in a master detail relationship means for each row selected in the department table, the employee table lists the employees in that department – whilst excluding the rest.</text:span></text:p>
      <text:p text:style-name="P138">To set up two tables in a master/detail relationship:</text:p>
      <text:list text:style-name="L48">
        <text:list-item>
          <text:p text:style-name="P1072">Create the two <text:span text:style-name="Symbol">TIBTable</text:span> components and link them to the same database. In each case, set the required table name.</text:p>
        </text:list-item>
        <text:list-item>
          <text:p text:style-name="P1072">Drop a <text:span text:style-name="Symbol">TDataSource</text:span> component on to the form and link it to the master table.</text:p>
        </text:list-item>
        <text:list-item>
          <text:p text:style-name="P1072"><text:soft-page-break/>Link the <text:span text:style-name="Symbol">MasterSource</text:span> property of the detail table to this data source.</text:p>
        </text:list-item>
        <text:list-item>
          <text:p text:style-name="P1072">Open the <text:span text:style-name="T240">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72"><draw:frame draw:style-name="fr3" draw:name="Frame14" text:anchor-type="paragraph" svg:width="5.728in" draw:z-index="19"><draw:text-box fo:min-height="3.5673in"><text:p text:style-name="Illustration"><draw:frame draw:style-name="fr13" draw:name="Image36" text:anchor-type="paragraph" svg:width="5.728in" style:rel-width="100%" svg:height="3.2146in" style:rel-height="scale" draw:z-index="20"><draw:image xlink:href="Pictures/10000000000002790000018BB8435797.png" xlink:type="simple" xlink:show="embed" xlink:actuate="onLoad" draw: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72">Now select the corresponding field name(s) in the Master Fields list and click on the “Join” button. The joined fields are now shown below.</text:p>
        </text:list-item>
        <text:list-item>
          <text:p text:style-name="P1072">Click on OK to complete the join.</text:p>
        </text:list-item>
      </text:list>
      <text:p text:style-name="P13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37">While the tables are open, selecting a row in the Master table will cause the detail table to be re-opened selecting the detail rows appropriate to the selected master row.</text:p>
      <text:p text:style-name="P752">Note, in the ibx/examples/ibtable example program, the Master table is activated in the TIBDatabase AfterConnected event handler, and the Detail table activated in the Master table's AfterOpen event handler.</text:p>
      <text:h text:style-name="P966" text:outline-level="4"><text:bookmark-start text:name="__RefHeading___Toc16103_1394698701"/>Filtered Datasets<text:bookmark-end text:name="__RefHeading___Toc16103_1394698701"/></text:h>
      <text:p text:style-name="P403">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text:style-name="L49">
        <text:list-item>
          <text:p text:style-name="P1073">Server side filters:</text:p>
        </text:list-item>
      </text:list>
      <text:p text:style-name="P404"><text:soft-page-break/>This is the most efficient way of filtering a dataset and uses the Firebird server's SQL engine to implement the filter. <text:span text:style-name="T364">Server side filters are enabled by setting the SQLFiltered property to true.</text:span></text:p>
      <text:p text:style-name="P406"><text:span text:style-name="T367">The filter is provided as the value of the TIBTable “SQLFilterParams” property and should be a </text:span><text:span text:style-name="T366">list of </text:span><text:span text:style-name="T367">valid SQL conditional expression</text:span><text:span text:style-name="T366">s</text:span><text:span text:style-name="T367"> referencing one or more of the underlying database table's column names. The “Filter” is used when constructing the SQL select statement used to return the dataset and </text:span><text:span text:style-name="T366">each condition </text:span><text:span text:style-name="T367">is </text:span><text:span text:style-name="T369">added</text:span><text:span text:style-name="T367"> </text:span><text:span text:style-name="T366">(ANDed) </text:span><text:span text:style-name="T367">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56">(see the ibx/examples/ibtable example application for an example of how this is used)</text:span><text:span text:style-name="T367">.</text:span></text:p>
      <text:p text:style-name="P402">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402">“SQLFilterParams<text:span text:style-name="T355">” is a published property and may be set at design time and/or dynamically modified at run time.</text:span></text:p>
      <text:list text:style-name="L50">
        <text:list-item>
          <text:p text:style-name="P1138">Client side filters:</text:p>
        </text:list-item>
      </text:list>
      <text:p text:style-name="P405">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407">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63">Note: The TDataSet Filtered property is inherited by TIBTable, but is ignored.</text:p>
      <text:h text:style-name="P846" text:outline-level="2"><text:bookmark-start text:name="__RefHeading__24569_1844166745"/><text:bookmark-start text:name="__RefNumPara__15874_148275515"/>TIBStoredProc<text:bookmark-end text:name="__RefHeading__24569_1844166745"/><text:bookmark-end text:name="__RefNumPara__15874_148275515"/></text:h>
      <text:p text:style-name="P140"><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41">or TIBSQL (see </text:span><text:span text:style-name="T241"><text:bookmark-ref text:reference-format="number" text:ref-name="__RefHeading___Toc12545_620837195">5.4</text:bookmark-ref></text:span><text:span text:style-name="T241">)</text:span>.</text:p>
      <text:h text:style-name="P914"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table-cell table:style-name="Table35.A1" office:value-type="string">
            <text:p text:style-name="P695"><text:span text:style-name="Symbol">PackageName</text:span></text:p>
          </table:table-cell>
          <table:table-cell table:style-name="Table35.B1" office:value-type="string">
            <text:p text:style-name="P695">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141"><text:span text:style-name="Symbol">StoredProcName</text:span></text:p>
          </table:table-cell>
          <table:table-cell table:style-name="Table35.B2" office:value-type="string">
            <text:p text:style-name="P141">This is the name of the stored procedure in the Firebird database. </text:p>
            <text:p text:style-name="P695">If the database server is Firebird 3 or later then if PackageName is not empty, the StoredProcName will be assumed to refer to a stored procedure in the specified package.</text:p>
          </table:table-cell>
        </table:table-row>
        <text:soft-page-break/>
        <table:table-row>
          <table:table-cell table:style-name="Table35.A2" office:value-type="string">
            <text:p text:style-name="P141"><text:span text:style-name="Symbol">Params</text:span></text:p>
          </table:table-cell>
          <table:table-cell table:style-name="Table35.B2" office:value-type="string">
            <text:p text:style-name="P141">The list of procedure input and output parameters, if any. Generated from the database.</text:p>
          </table:table-cell>
        </table:table-row>
      </table:table>
      <text:p text:style-name="P479"/>
      <text:h text:style-name="P914" text:outline-level="3"><text:bookmark-start text:name="__RefHeading___Toc15646_148275515"/>Using TIBStoredProc<text:bookmark-end text:name="__RefHeading___Toc15646_148275515"/></text:h>
      <text:p text:style-name="P140">At design time:</text:p>
      <text:list text:style-name="L51">
        <text:list-item>
          <text:p text:style-name="P1074">Drop a <text:span text:style-name="Symbol">TIBStoredProc</text:span> component on your form and select the database.</text:p>
        </text:list-item>
        <text:list-item>
          <text:p text:style-name="P1076">Firebird 3 or later: Set the PackageName property to the package in which the stored procedure is located, if any, by selecting the package name from the drop down list.</text:p>
        </text:list-item>
        <text:list-item>
          <text:p text:style-name="P1074">Set the <text:span text:style-name="Symbol">StoredProcName</text:span> property in the object inspector by selecting the procedure name from the drop down list. <text:span text:style-name="T264">If PackageName is non-empty then the list is restricted to the stored procedures located in the package. Otherwise, the list comprises all stored procedure defined outside of any package.</text:span></text:p>
        </text:list-item>
      </text:list>
      <text:p text:style-name="P765">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765">CREATE PROCEDURE “iCASE”;</text:p>
      <text:p text:style-name="P765">In this case, the value of the StoredProcName should be iCASE. The delimiting double quotes must not be present in the StoredProcName.</text:p>
      <text:p text:style-name="P140">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140">For example:</text:p>
      <text:p text:style-name="P143">with IBStoredProc1 do</text:p>
      <text:p text:style-name="P143">begin</text:p>
      <text:p text:style-name="P143"><text:s text:c="2"/><text:span text:style-name="T202">Transaction.Active := true;</text:span></text:p>
      <text:p text:style-name="P143"><text:s text:c="2"/>ParamByName('EMP_NO').AsInteger := 8;</text:p>
      <text:p text:style-name="P143"><text:s text:c="2"/>ExecProc;</text:p>
      <text:p text:style-name="P143">end;</text:p>
      <text:p text:style-name="P139">In the above, it is assumed that the stored procedure has a single integer parameter with the name EMP_NO. Once this is set the procedure may be executed. Note that the parameter names are taken from the stored procedure definition in the database, e.g.</text:p>
      <text:p text:style-name="P142">Create Procedure MyProc(EMP_NO Integer)</text:p>
      <text:p text:style-name="P142">...</text:p>
      <text:p text:style-name="P139">A stored procedure <text:span text:style-name="T135">can also return values as output parameters. These are accessible only by interrogating the </text:span><text:span text:style-name="Symbol"><text:span text:style-name="T135">Params</text:span></text:span><text:span text:style-name="T135"> property to find the output parameter with the required name (again taken from the stored procedure definition in the database).</text:span></text:p>
      <text:p text:style-name="P755">Note: TIBStoredProc may not be used to execute a stored procedure that returns multiple rows using the SUSPEND command. A TIBQuery or a TIBDataset should be used to execute this type of stored procedure using a select query.</text:p>
      <text:h text:style-name="P847" text:outline-level="2"><text:bookmark-start text:name="__RefHeading__24369_1844166745"/><text:soft-page-break/>TIBQuery<text:bookmark-end text:name="__RefHeading__24369_1844166745"/></text:h>
      <text:p text:style-name="P636">This component is a descendent of <text:span text:style-name="Symbol">TDataset</text:span> and <text:span text:style-name="T193">creates the</text:span> dataset from the results of an SQL query (Select statement or a Stored Procedure that returns a results set). The SQL query used is given by its SQL property. <text:span text:style-name="T136">It is much more powerful than </text:span><text:span text:style-name="Symbol"><text:span text:style-name="T136">TIBTable</text:span></text:span><text:span text:style-name="T136"> as it can generate a dataset from any select SQL statement, joining or processing as many tables as needed. However, it does require some knowledge of SQL to use.</text:span></text:p>
      <text:p text:style-name="P637">The dataset provided by <text:span text:style-name="Symbol">TIBQuery</text:span> is read only unless the component is supported by an Update Object.</text:p>
      <text:h text:style-name="P915"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638"><text:span text:style-name="Symbol">DataSource</text:span></text:p>
          </table:table-cell>
          <table:table-cell table:style-name="Table36.B1" office:value-type="string">
            <text:p text:style-name="P638">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721"><text:span text:style-name="Symbol">MasterDetailDelay</text:span></text:p>
          </table:table-cell>
          <table:table-cell table:style-name="Table36.B2" office:value-type="string">
            <text:p text:style-name="P721"><text:span text:style-name="T32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721">Inserting such a delay can be a useful way of improving performance when the detail dataset is large or takes a long time to open.</text:p>
            <text:p text:style-name="P760">Note: <text:span text:style-name="T343">Ignored in console mode</text:span>.</text:p>
          </table:table-cell>
        </table:table-row>
        <table:table-row>
          <table:table-cell table:style-name="Table36.A2" office:value-type="string">
            <text:p text:style-name="P638"><text:span text:style-name="Symbol">ForcedRefresh</text:span></text:p>
          </table:table-cell>
          <table:table-cell table:style-name="Table36.B2" office:value-type="string">
            <text:p text:style-name="P638">In an updateable query, this forces each row to be refreshed automatically from the database after it is <text:span text:style-name="T256">inserted or </text:span>updated. Useful for updating computed fields (from the database) and the results that may result from database triggers.</text:p>
            <text:p text:style-name="Highlighted">Note: <text:span text:style-name="T257">An Update/Insert query with a RETURNING clause may be more efficient as it avoids a full select query.</text:span></text:p>
            <text:p text:style-name="P260">Note: The AfterRefresh event is not trigged by a ForcedRefresh. Use the AfterPost handler instead.</text:p>
          </table:table-cell>
        </table:table-row>
        <table:table-row>
          <table:table-cell table:style-name="Table36.A2" office:value-type="string">
            <text:p text:style-name="P638"><text:span text:style-name="Symbol">GeneratorField</text:span></text:p>
          </table:table-cell>
          <table:table-cell table:style-name="Table36.B2" office:value-type="string">
            <text:p text:style-name="P638">In an updateable query specifies the automatic setting of a field from a Firebird generator when a new row is appended to the dataset. <text:span text:style-name="T193">See </text:span><text:span text:style-name="T193"><text:bookmark-ref text:reference-format="number" text:ref-name="__RefHeading__25873_1844166745">6.6.3</text:bookmark-ref></text:span><text:span text:style-name="T193">.</text:span></text:p>
          </table:table-cell>
        </table:table-row>
        <table:table-row>
          <table:table-cell table:style-name="Table36.A2" office:value-type="string">
            <text:p text:style-name="P638"><text:span text:style-name="Symbol">Params</text:span></text:p>
          </table:table-cell>
          <table:table-cell table:style-name="Table36.B2" office:value-type="string">
            <text:p text:style-name="P638">The list of parameters extracted from a parameterised query.</text:p>
          </table:table-cell>
        </table:table-row>
        <table:table-row>
          <table:table-cell table:style-name="Table36.A2" office:value-type="string">
            <text:p text:style-name="P638"><text:span text:style-name="Symbol">SQL</text:span></text:p>
          </table:table-cell>
          <table:table-cell table:style-name="Table36.B2" office:value-type="string">
            <text:p text:style-name="P638">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670"><text:span text:style-name="Symbol">UpdateObject</text:span></text:p>
          </table:table-cell>
          <table:table-cell table:style-name="Table41.B1" office:value-type="string">
            <text:p text:style-name="P670">A reference to an optional <text:span text:style-name="Symbol">TIBUpdateObject</text:span> (see <text:bookmark-ref text:reference-format="number" text:ref-name="__RefHeading__6726_274617472">6.6</text:bookmark-ref><text:span text:style-name="T175">)</text:span></text:p>
          </table:table-cell>
        </table:table-row>
      </table:table>
      <text:p text:style-name="Text_20_body"/>
      <text:h text:style-name="P916" text:outline-level="3"><text:bookmark-start text:name="__RefHeading___Toc15648_148275515"/><text:soft-page-break/>Using TIBQuery<text:bookmark-end text:name="__RefHeading___Toc15648_148275515"/></text:h>
      <text:p text:style-name="P480">At design time:</text:p>
      <text:list text:style-name="L52">
        <text:list-item>
          <text:p text:style-name="P1075">Drop a <text:span text:style-name="Symbol"><text:span text:style-name="T137">TIBQuery</text:span></text:span> component on your form and select the database.</text:p>
        </text:list-item>
        <text:list-item>
          <text:p text:style-name="P1077">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480">If the SQL has no parameters then all that needs to be done at run time is to set the component's Active property to true; the query is executed and the results become available as the dataset. </text:p>
      <text:list text:style-name="L53">
        <text:list-item>
          <text:p text:style-name="P1078">If the database is not connected when the active property is set to true then it is implicitly opened. </text:p>
        </text:list-item>
        <text:list-item>
          <text:p text:style-name="P1079"><text:span text:style-name="T137">If the transaction has not been started when the active property is set to true then an exception is raised unless the </text:span><text:span text:style-name="Symbol"><text:span text:style-name="T137">AllowAutoActivateTransaction</text:span></text:span><text:span text:style-name="T137"> property is also true.</text:span></text:p>
        </text:list-item>
      </text:list>
      <text:p text:style-name="P48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3">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Error: Reference source not found</text:bookmark-ref>). <text:s text:c="2"/></text:p>
      <text:h text:style-name="P917" text:outline-level="3"><draw:frame draw:style-name="fr4" draw:name="Frame15" text:anchor-type="paragraph" svg:x="1.1098in" svg:y="1.2in" svg:width="6.1445in" draw:z-index="42"><draw:text-box fo:min-height="4.0075in"><text:p text:style-name="Illustration"><draw:frame draw:style-name="fr13" draw:name="Image37" text:anchor-type="paragraph" svg:width="6.1445in" style:rel-width="100%" svg:height="3.5752in" style:rel-height="scale" draw:z-index="43"><draw:image xlink:href="Pictures/100000000000032A000001E8BE2E9D05.png" xlink:type="simple" xlink:show="embed" xlink:actuate="onLoad" draw: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480">The Select SQL Property editor provides a means to enter and edit an SQL Query at design time. It also allows the query to be tested for correct syntax. Model queries can also be generated from information sourced from the database.</text:p>
      <text:p text:style-name="P55"><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55">The Select SQL Editor is shown in <text:sequence-ref text:reference-format="category-and-value" text:ref-name="refIllustration6">Illustration 7</text:sequence-ref>. <text:span text:style-name="T138">The Select SQL Editor is a specific case. IBX SQL Editors also exist for Refresh, Update, Insert and Delete SQL.</text:span></text:p>
      <text:p text:style-name="P56"><text:span text:style-name="T138">All of IBX's SQL</text:span> editors follow the same basic scheme with a combo box in the left hand frame listing available tables and listboxes showing the columns and Primary Keys respectively for the currently selected table. <text:span text:style-name="T138">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38"><text:bookmark-ref text:reference-format="number" text:ref-name="__RefHeading___Toc10610_600433823">6.6.8</text:bookmark-ref></text:span><text:span text:style-name="T138">).</text:span></text:p>
      <text:list text:style-name="L54">
        <text:list-item>
          <text:p text:style-name="P1139"><text:span text:style-name="T82">A “Generate SQL” button cause</text:span><text:span text:style-name="T83">s</text:span><text:span text:style-name="T82">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65">Note that <text:span text:style-name="T260">in the Modify SQL Property Editor, </text:span>Update statements may be restricted to avoid updating the primary key values. If these are internal keys that are not visible to the user, then there is little value in including them in the update statement. <text:span text:style-name="T261">Computed By columns are refreshed after the update using the UPDATE...RETURNING clause.</text:span></text:p>
      <text:p text:style-name="P58">Note: The Insert SQL <text:span text:style-name="T260">Property </text:span>Editor separately lists Identity Columns. When SQL is generated, these are not included in the list of fields to be inserted. However, a RETURNING clause is added to return the assigned values of these columns.</text:p>
      <text:list text:continue-numbering="true" text:style-name="L54">
        <text:list-item>
          <text:p text:style-name="P1140">Double-clicking on a <text:span text:style-name="T242">table or</text:span> column name will cause that name to be inserted in the SQL statement.</text:p>
        </text:list-item>
        <text:list-item>
          <text:p text:style-name="P1140">The “Test” button can be used to <text:span text:style-name="T193">validate</text:span> the current SQL statement. The error generated by the database engine, if any, will be <text:span text:style-name="T193">shown to the user</text:span>.</text:p>
        </text:list-item>
      </text:list>
      <text:p text:style-name="P56">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59">The “Quote Identifiers” option places double quotes around all Field and Table Names. </text:p>
      <text:p text:style-name="P59"><text:span text:style-name="T265">T</text:span>he “Allow DSQL Placeholders” option allows the use of the “?” placeholder in parameterised queries <text:span text:style-name="T193">(see below)</text:span>.</text:p>
      <text:p text:style-name="P57">SynEdit with SQL syntax highlighting is used to edit the statement. A toolbar <text:span text:style-name="T257">and a right click popup menu are</text:span> also included for common operations including manually initiated wrap on SQL token boundaries in order to display the entire text in the width of the current window.</text:p>
      <text:p text:style-name="P754">Note: all SQL Property editors are sizeable using the mouse.</text:p>
      <text:p text:style-name="P60">A Select SQL Statement is normally generated from tables and views. However, stored procedures that return a dataset are also <text:span text:style-name="T257">a </text:span>potential source. Hence the tab available for a list of suitable stored procedures <text:span text:style-name="T265">(see </text:span><text:span text:style-name="T265"><text:sequence-ref text:reference-format="category-and-value" text:ref-name="refIllustration7">Illustration 8</text:sequence-ref></text:span><text:span text:style-name="T265">)</text:span>.</text:p>
      <text:p text:style-name="P61"><text:soft-page-break/>In the Procedures <text:span text:style-name="T26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6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18" text:outline-level="3"><draw:frame draw:style-name="fr3" draw:name="Frame18" text:anchor-type="paragraph" svg:width="6.6953in" draw:z-index="44"><draw:text-box fo:min-height="4.9937in"><text:p text:style-name="Illustration"><draw:frame draw:style-name="fr14" draw:name="Image40" text:anchor-type="as-char" svg:width="6.6953in" style:rel-width="100%" svg:height="4.6091in" style:rel-height="scale" draw:z-index="45"><draw:image xlink:href="Pictures/10000000000002EF00000205F0BA773E.png" xlink:type="simple" xlink:show="embed" xlink:actuate="onLoad" draw: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481">In this context, a parameterised query is an SQL statement given as the value of a <text:span text:style-name="Symbol">TIBQuery</text:span>'s SQL property and which has <text:span text:style-name="T193">(named) </text:span>parameter placeholders included in the statement.</text:p>
      <text:p text:style-name="P48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60">ibnongui.lpk</text:span></text:p>
      <text:p text:style-name="P144">In normal Firebird <text:span text:style-name="T81">Dynamic </text:span>SQL, query parameters are represented by a '?' placeholder and are manipulated as positional parameters. IBX <text:span text:style-name="T139">does allow this approach to be used but also</text:span> borrows from the Firebird Procedure and Trigger Language and <text:span text:style-name="T139">additionally allows the </text:span>use <text:span text:style-name="T139">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39">This enhancement is essential for support of update objects (see </text:span><text:span text:style-name="T139"><text:bookmark-ref text:reference-format="number" text:ref-name="__RefHeading__6726_274617472">6.6</text:bookmark-ref></text:span><text:span text:style-name="T139">). The actual implementation of parameterised queries is supported by the </text:span><text:span text:style-name="T16">fbintf</text:span><text:span text:style-name="T139"> package. See section 6.1.1 of the Firebird Pascal API Guide.</text:span></text:p>
      <text:p text:style-name="P144">For a select query, the parameter value must be specified before the query is activated. For example:</text:p>
      <text:p text:style-name="P145">IBQuery1.ParamByName('EMP_NO').AsInteger := 1;</text:p>
      <text:p text:style-name="P145">IBQuery1.Active := true;</text:p>
      <text:p text:style-name="P144">If a <text:span text:style-name="Symbol">TIBQuery</text:span> with a parameterised Select query is activated without a parameter value assigned, and the query has a DataSource property set, the component will query the Dataset <text:span text:style-name="T139">linked to</text:span> <text:span text:style-name="Symbol">DataSource,</text:span> <text:span text:style-name="T139">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44">I<text:span text:style-name="T139">n practice, the </text:span><text:span text:style-name="Symbol"><text:span text:style-name="T139">TIBQuery</text:span></text:span><text:span text:style-name="T139">'s </text:span><text:span text:style-name="Symbol"><text:span text:style-name="T139">BeforeOpen</text:span></text:span><text:span text:style-name="T139"> event handler is a good place to set any parameter values that are not automatically set from a </text:span><text:span text:style-name="Symbol"><text:span text:style-name="T139">DataSource</text:span></text:span><text:span text:style-name="T139">. Placing them here ensures the parameter values are always set before the dataset is opened.</text:span></text:p>
      <text:h text:style-name="P919" text:outline-level="3"><text:bookmark-start text:name="__RefHeading___Toc15165_623318093"/>Filters<text:bookmark-end text:name="__RefHeading___Toc15165_623318093"/></text:h>
      <text:p text:style-name="P612">Proir to IBX 2.3.3, TIBQuery only supported client side filtering using the “OnFilterRecord”. From IBX 2.3.3 it also supports server side filtering using the “<text:span text:style-name="T364">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57"><text:bookmark-ref text:reference-format="number" text:ref-name="__RefHeading__27675_1844166745">7.3</text:bookmark-ref></text:span><text:span text:style-name="T357">).</text:span></text:p>
      <text:p text:style-name="P613">The TIBQuery implementation of server side filtering also uses the TSelectSQLParser and is compatible with general use of the TSelectSQLParser. In practice, when the “<text:span text:style-name="T364">SQL</text:span>Filtered” property is true, the <text:span text:style-name="T375">list of conditions</text:span> <text:span text:style-name="T375">provided by</text:span> the “<text:span text:style-name="T364">SQLFilterParams</text:span>” property provides additional element <text:span text:style-name="T375">s</text:span>of the select query “Where” clause ANDed with a<text:span text:style-name="T360">ny</text:span> “Where” clause in the original select query. The result of this may be further manipulated using the “Parser” property as described in <text:span text:style-name="T357"><text:bookmark-ref text:reference-format="number" text:ref-name="__RefHeading__27675_1844166745">7.3</text:bookmark-ref></text:span><text:span text:style-name="T357">.</text:span></text:p>
      <text:p text:style-name="P612">If only a simple filter (SQL conditional statement) is required then use of the “<text:span text:style-name="T364">SQL</text:span>Filter<text:span text:style-name="T364">ed</text:span>” property is probably sufficient and the more general approach described in <text:span text:style-name="T357"><text:bookmark-ref text:reference-format="number" text:ref-name="__RefHeading__27675_1844166745">7.3</text:bookmark-ref></text:span><text:span text:style-name="T357"><text:s/></text:span>can be avoided.</text:p>
      <text:p text:style-name="P764">Note: The TDataSet Filtered property is inherited by TIBTable, but is ignored.</text:p>
      <text:h text:style-name="P847" text:outline-level="2"><text:bookmark-start text:name="__RefHeading__6726_274617472"/>Update Objects<text:bookmark-end text:name="__RefHeading__6726_274617472"/></text:h>
      <text:p text:style-name="P485"><text:span text:style-name="Symbol">TIBQuery</text:span> on its own only provides a read only dataset. If the dataset is to be updateable then a <text:span text:style-name="T193">TIBUpdateSQL</text:span> <text:span text:style-name="T224">or TIBUpdate </text:span>must also be <text:span text:style-name="T257">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485">The <text:span text:style-name="Symbol"><text:span text:style-name="T193">TIBUpdateSQL</text:span></text:span> provides the Modify, Insert, Delete and Refresh SQL statements needed to make the dataset updateable.</text:p>
      <text:h text:style-name="Heading_20_4" text:outline-level="4"><text:bookmark-start text:name="__RefHeading___Toc15652_148275515"/><text:soft-page-break/>Highlighted Properties<text:bookmark-end text:name="__RefHeading___Toc15652_148275515"/></text:h>
      <table:table table:name="Table37" table:style-name="Table37">
        <table:table-column table:style-name="Table37.A"/>
        <table:table-column table:style-name="Table37.B"/>
        <table:table-row>
          <table:table-cell table:style-name="Table37.A1" office:value-type="string">
            <text:p text:style-name="P484"><text:span text:style-name="Symbol">RefreshSQL</text:span></text:p>
          </table:table-cell>
          <table:table-cell table:style-name="Table37.B1" office:value-type="string">
            <text:p text:style-name="P484">A StringList that defines an SQL Statement used to refresh a single row in the dataset <text:span text:style-name="T274">(see </text:span><text:span text:style-name="T274"><text:bookmark-ref text:reference-format="number" text:ref-name="__RefHeading___Toc11258_67450469">6.6.9</text:bookmark-ref></text:span><text:span text:style-name="T274">)</text:span>.</text:p>
          </table:table-cell>
        </table:table-row>
        <table:table-row>
          <table:table-cell table:style-name="Table37.A2" office:value-type="string">
            <text:p text:style-name="P484"><text:span text:style-name="Symbol">ModifySQL</text:span></text:p>
          </table:table-cell>
          <table:table-cell table:style-name="Table37.B2" office:value-type="string">
            <text:p text:style-name="P490">A StringList that defines an SQL Statement used to update a single row in the database from updated field values in the current row of the dataset. <text:s/><text:span text:style-name="T257">(the UPDATE... RETURNING clause is supported see </text:span><text:span text:style-name="T257"><text:bookmark-ref text:reference-format="number" text:ref-name="__RefHeading___Toc9861_600433823">6.6.1.4</text:bookmark-ref></text:span><text:span text:style-name="T257">)</text:span></text:p>
          </table:table-cell>
        </table:table-row>
        <table:table-row>
          <table:table-cell table:style-name="Table37.A2" office:value-type="string">
            <text:p text:style-name="P484"><text:span text:style-name="Symbol">InsertSQL</text:span></text:p>
          </table:table-cell>
          <table:table-cell table:style-name="Table37.B2" office:value-type="string">
            <text:p text:style-name="P484">A StringList that defines an SQL Statement used to insert a single row into the database from field values in the current row of the dataset <text:span text:style-name="T257">(the INSERT... RETURNING clause is supported see </text:span><text:span text:style-name="T257"><text:bookmark-ref text:reference-format="number" text:ref-name="__RefHeading___Toc9861_600433823">6.6.1.4</text:bookmark-ref></text:span><text:span text:style-name="T257">)</text:span></text:p>
          </table:table-cell>
        </table:table-row>
        <table:table-row>
          <table:table-cell table:style-name="Table37.A2" office:value-type="string">
            <text:p text:style-name="P484"><text:span text:style-name="Symbol">DeleteSQL</text:span></text:p>
          </table:table-cell>
          <table:table-cell table:style-name="Table37.B2" office:value-type="string">
            <text:p text:style-name="P484">A StringList that defines an SQL Statement used to delete a single row in the database corresponding to the deleted (current) row of the dataset.</text:p>
          </table:table-cell>
        </table:table-row>
      </table:table>
      <text:p text:style-name="P491"/>
      <text:p text:style-name="P496">Property editors are available for each of the above and follow the same pattern as for the TIBQuery SQL property editor. <text:span text:style-name="T193">The </text:span><text:span text:style-name="Symbol"><text:span text:style-name="T193">TIBUpdateSQL</text:span></text:span><text:span text:style-name="T193">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543">Note: from IBX 2.<text:span text:style-name="T272">2</text:span>.<text:span text:style-name="T272">0</text:span> onwards, Insert and Update SQL may contain a RETURNING clause (see <text:bookmark-ref text:reference-format="number" text:ref-name="__RefHeading___Toc9861_600433823">6.6.1.4</text:bookmark-ref>).</text:p>
      <text:p text:style-name="P483">Each of the SQL Statements given in an UpdateObject are parameterised queries:</text:p>
      <text:list text:style-name="L55">
        <text:list-item>
          <text:p text:style-name="P1080">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3">(typically using the Primary Key as the select criteria)</text:span>. e.g.</text:p>
        </text:list-item>
      </text:list>
      <text:p text:style-name="P767">Select A.EMP_NO, A.FIRST_NAME, A.LAST_NAME, A.PHONE_EXT, A.HIRE_DATE, A.DEPT_NO, A.JOB_CODE, A.JOB_GRADE, A.JOB_COUNTRY, A.SALARY, A.FULL_NAME From EMPLOYEE A <text:line-break/>Where A.EMP_NO = :EMP_NO </text:p>
      <text:list text:continue-numbering="true" text:style-name="L55">
        <text:list-item>
          <text:p text:style-name="P1081">A Modify SQL query is an update SQL statement that updates a single row in the database using the current dataset row as its data source <text:span text:style-name="T193">(note the use of the :OLD_ convention for a last parameter -see </text:span><text:span text:style-name="T193"><text:bookmark-ref text:reference-format="number" text:ref-name="__RefHeading__14636_274617472">6.6.1.3</text:bookmark-ref></text:span><text:span text:style-name="T193">)</text:span> <text:span text:style-name="T140">e.g.</text:span></text:p>
        </text:list-item>
      </text:list>
      <text:p text:style-name="P767">Update EMPLOYEE A Set </text:p>
      <text:p text:style-name="P767"><text:s text:c="2"/>A.EMP_NO = :EMP_NO, </text:p>
      <text:p text:style-name="P767"><text:s text:c="2"/>A.FIRST_NAME = :FIRST_NAME, </text:p>
      <text:p text:style-name="P767"><text:s text:c="2"/>A.LAST_NAME = :LAST_NAME, </text:p>
      <text:p text:style-name="P767"><text:s text:c="2"/>A.PHONE_EXT = :PHONE_EXT, </text:p>
      <text:p text:style-name="P767"><text:s text:c="2"/>A.HIRE_DATE = :HIRE_DATE, </text:p>
      <text:p text:style-name="P767"><text:s text:c="2"/>A.DEPT_NO = :DEPT_NO, </text:p>
      <text:p text:style-name="P767"><text:s text:c="2"/>A.JOB_CODE = :JOB_CODE, </text:p>
      <text:p text:style-name="P767"><text:s text:c="2"/>A.JOB_GRADE = :JOB_GRADE, </text:p>
      <text:p text:style-name="P767"><text:s text:c="2"/>A.JOB_COUNTRY = :JOB_COUNTRY, </text:p>
      <text:p text:style-name="P767"><text:soft-page-break/><text:s text:c="2"/>A.SALARY = :SALARY </text:p>
      <text:p text:style-name="P767">Where A.EMP_NO = :OLD_EMP_NO </text:p>
      <text:p text:style-name="P256">RETURNING FULL_NAME</text:p>
      <text:list text:continue-numbering="true" text:style-name="L55">
        <text:list-item>
          <text:p text:style-name="P1080">An Insert SQL query is an insert SQL statement that inserts a single row into the database using the current dataset row as its data source. <text:span text:style-name="T140">e.g.</text:span></text:p>
        </text:list-item>
      </text:list>
      <text:p text:style-name="P767">Insert Into EMPLOYEE(EMP_NO, FIRST_NAME, LAST_NAME, PHONE_EXT, HIRE_DATE, DEPT_NO, JOB_CODE, JOB_GRADE, JOB_COUNTRY, SALARY) </text:p>
      <text:p text:style-name="P767">Values(:EMP_NO, :FIRST_NAME, :LAST_NAME, :PHONE_EXT, :HIRE_DATE, :DEPT_NO, :JOB_CODE, :JOB_GRADE, :JOB_COUNTRY, :SALARY) </text:p>
      <text:p text:style-name="P256">RETURNING FULL_NAME</text:p>
      <text:list text:continue-numbering="true" text:style-name="L55">
        <text:list-item>
          <text:p text:style-name="P1080">A Delete SQL query is a delete SQL statement that deletes a single row from the database using the current dataset row as its data source. <text:span text:style-name="T140">e.g.</text:span></text:p>
        </text:list-item>
      </text:list>
      <text:p text:style-name="P767">Delete From EMPLOYEE A Where A.EMP_NO = :EMP_NO </text:p>
      <text:p text:style-name="P14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72">(alias)</text:span> name.</text:p>
      <text:list text:style-name="L56">
        <text:list-item>
          <text:p text:style-name="P1142">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41"><text:span text:style-name="T141">In the update query, each field in the database is updated from its corresponding field in the current row. However, note the “OLD_” convention used in the “where” clause. This is discussed below in </text:span><text:span text:style-name="T141"><text:bookmark-ref text:reference-format="number" text:ref-name="__RefHeading__14636_274617472">6.6.1.3</text:bookmark-ref></text:span><text:span text:style-name="T141">. Otherwise, it should select the corresponding row in the database similar to the refresh statement.</text:span></text:p>
        </text:list-item>
        <text:list-item>
          <text:p text:style-name="P1142">In the insert query, each field in the database is also updated from its corresponding field in the current row.</text:p>
        </text:list-item>
        <text:list-item>
          <text:p text:style-name="P1142">In the delete query, the “where” clause selects the row in the database to be deleted and should be identical to the “where” clause in the refresh statement.</text:p>
        </text:list-item>
      </text:list>
      <text:p text:style-name="P255">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420">These are typically used in Modify SQL statements. <text:span text:style-name="T141">For example,</text:span> when the primary key value is changed. In this case, the row to be updated needs to be selected by the original value of the primary key, while the <text:span text:style-name="T141">field(s) that corresponds to the primary key</text:span> needs to be set to the new value. In order to support this capability, IBX allows parameter names to be prefixed by "OLD_" and "NEW_" where the former references the fields value when it was <text:span text:style-name="T194">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740">UPDATE MYTABLE Set Key1 = :NEW_KEY1, COL2 = :COL2 Where Key1 = :OLD_KEY1; </text:p>
      <text:p text:style-name="P420"><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46">The “OLD_” convention can also be used for setting field values in an update statement where there is a need to preserve the previous value (e.g. in a different field). For example:</text:p>
      <text:p text:style-name="P768">Update EMPLOYEE A Set </text:p>
      <text:p text:style-name="P768"><text:s text:c="2"/>A.EMP_NO = :EMP_NO, </text:p>
      <text:p text:style-name="P768"><text:s text:c="2"/><text:span text:style-name="T141">A</text:span>.LAST_NAME = :LAST_NAME, </text:p>
      <text:p text:style-name="P768"><text:s text:c="2"/><text:span text:style-name="T141">A.PREVIOUS_NAME = :OLD_LAST_NAME,</text:span></text:p>
      <text:p text:style-name="P768">Where A.EMP_NO = :OLD_EMP_NO </text:p>
      <text:p text:style-name="P805">The “OLD_” convention should <text:span text:style-name="T194">not </text:span>be used with <text:span text:style-name="Symbol">Refresh</text:span> <text:span text:style-name="T142">as refresh cannot be used unless the dataset is in “browse” mode i.e. the current row is not being edited or inserted. Delete queries should normally use the current value for the key rather than the old value.</text:span></text:p>
      <text:p text:style-name="Highlighted">Note. While a dataset is in the “edit” state, the previous value can also be accessed at runtime using the Tfield.OldValue property e.g.</text:p>
      <text:p text:style-name="Highlighted"><text:span text:style-name="T58">writeln(MyDataSet.FieldByName('EMP_NO').OldValue</text:span>);</text:p>
      <text:p text:style-name="P979">Note. The OldValue TField property is of type variant and returns NULL when an oldValue is not available e.g. when a Dataset is not in the “edit” state.</text:p>
      <text:h text:style-name="P967" text:outline-level="4"><text:bookmark-start text:name="__RefHeading___Toc9861_600433823"/>Insert and Update Returning Clauses<text:bookmark-end text:name="__RefHeading___Toc9861_600433823"/></text:h>
      <text:p text:style-name="P542"><text:span text:style-name="T274">From Firebird 2.1 onwards, </text:span>Firebird supports Insert and Update Queries with “RETURNING” clauses. After the query has been executed, this clause allows the query to return the current values for the named columns. <text:span text:style-name="T274">From IBX 2.2.0 onwards, </text:span>IBX updateable datasets support Insert and Update Queries with “RETURNING” clauses by:</text:p>
      <text:list text:style-name="L57">
        <text:list-item>
          <text:p text:style-name="P1082">Once the query is executed a check is made for any returned values.</text:p>
        </text:list-item>
        <text:list-item>
          <text:p text:style-name="P1082">For each returned value, the name of the returned value (its <text:span text:style-name="T263">alias</text:span> name) is matched against the list of alias names for the dataset columns. </text:p>
        </text:list-item>
        <text:list-item>
          <text:p text:style-name="P1082">If a match is found then the returned value replaces the current value for that column in the current row.</text:p>
        </text:list-item>
      </text:list>
      <text:p text:style-name="P756">Note: if, for some reason, the data type of the returned data is incompatible with the data type of the column, then an exception is raised.</text:p>
      <text:h text:style-name="P968" text:outline-level="4"><text:bookmark-start text:name="__RefHeading___Toc10846_1038461802"/>Delete Returning Clauses<text:bookmark-end text:name="__RefHeading___Toc10846_1038461802"/></text:h>
      <text:p text:style-name="P572">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text:soft-page-break/>whatever action is necessary. For example to confirm, to the user, the deletion of a row with the returned values. <text:s/></text:p>
      <text:h text:style-name="Heading_20_4" text:outline-level="4"><text:bookmark-start text:name="__RefHeading___Toc15656_148275515"/>Using Stored Procedures for Insert, Update or Delete<text:bookmark-end text:name="__RefHeading___Toc15656_148275515"/></text:h>
      <text:p text:style-name="P258">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63">ecute Procedure MyProc :Arg1, :Arg2</text:span></text:p>
      <text:p text:style-name="P257">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20" text:outline-level="3"><text:bookmark-start text:name="__RefHeading___Toc15658_148275515"/>TIBUpdate<text:bookmark-end text:name="__RefHeading___Toc15658_148275515"/></text:h>
      <text:p text:style-name="P692">This component can <text:span text:style-name="T224">also </text:span>be linked from <text:span text:style-name="T227">a</text:span> TIBQuery component and is <text:span text:style-name="T224">a more general way</text:span> to support updateable queries <text:span text:style-name="T22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41">Examples of use include:</text:p>
      <text:list text:style-name="L58">
        <text:list-item>
          <text:p text:style-name="P1112">Updating a dataset listing user privileges and roles, with Update, Insert and Delete translated into one or more Grant and Revoke statements.</text:p>
        </text:list-item>
        <text:list-item>
          <text:p text:style-name="P1112">Implementing a writeable view programmatically rather than through triggers. This may be necessary when <text:span text:style-name="T243">a </text:span>schema update to add triggers to (e.g.) an existing view is not permitted, or when access to information not readily available at the trigger level is required.</text:p>
        </text:list-item>
        <text:list-item>
          <text:p text:style-name="P1112">Filtering of dataset updates including silent discard of updates.</text:p>
        </text:list-item>
      </text:list>
      <text:p text:style-name="P699">An example of the use of TIBUpdate to support Firebird 3 User Management (e.g. with multiple security databases) is available in examples/FB3UserManager.</text:p>
      <text:h text:style-name="P969"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table-cell table:style-name="Table48.A1" office:value-type="string">
            <text:p text:style-name="P488"><text:span text:style-name="Symbol">RefreshSQL</text:span></text:p>
          </table:table-cell>
          <table:table-cell table:style-name="Table48.B1" office:value-type="string">
            <text:p text:style-name="P488">A StringList that defines an SQL Statement used to refresh a single row in the dataset.</text:p>
          </table:table-cell>
        </table:table-row>
        <table:table-row>
          <table:table-cell table:style-name="Table48.A2" office:value-type="string">
            <text:p text:style-name="P488"><text:span text:style-name="Symbol"><text:span text:style-name="T224">DataSet</text:span></text:span></text:p>
          </table:table-cell>
          <table:table-cell table:style-name="Table48.B2" office:value-type="string">
            <text:p text:style-name="P541">A read only property referencing the dataset <text:s/><text:span text:style-name="T225">being updated.</text:span></text:p>
          </table:table-cell>
        </table:table-row>
        <table:table-row>
          <table:table-cell table:style-name="Table48.A2" office:value-type="string">
            <text:p text:style-name="P489"><text:span text:style-name="Symbol"><text:span text:style-name="T225">OnApplyUpdates</text:span></text:span></text:p>
          </table:table-cell>
          <table:table-cell table:style-name="Table48.B2" office:value-type="string">
            <text:p text:style-name="P693">This event is called in response to the dataset posting an Update, Insert or Delete action. The event handler is provided with the:</text:p>
            <text:list text:style-name="L3">
              <text:list-item>
                <text:p text:style-name="P1113">Update action requested (Update, Insert or Delete), and</text:p>
              </text:list-item>
              <text:list-item>
                <text:p text:style-name="P1113"><text:soft-page-break/>An ISQLParams interface giving access by name to all field values: both <text:span text:style-name="T226">current and “old” values. The “old” values (i.e. prior to the update) are accessed by prefixing the field name with “OLD_”. All accesses by name are case insensitive.</text:span></text:p>
              </text:list-item>
            </text:list>
          </table:table-cell>
        </table:table-row>
      </table:table>
      <text:p text:style-name="P540"/>
      <text:h text:style-name="Heading_20_3" text:outline-level="3"><text:bookmark-start text:name="__RefHeading__25873_1844166745"/>Generators<text:bookmark-end text:name="__RefHeading__25873_1844166745"/></text:h>
      <text:p text:style-name="P492">A Firebird Generator (known also as <text:span text:style-name="T194">a </text:span>Sequence) is used to generat<text:span text:style-name="T243">e</text:span> a unique sequence number independent of transactions. A typical use is to generate a new primary key for a table which is guaranteed to not clash when another user also adding a record to the same table.</text:p>
      <text:p text:style-name="P492">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492">To specify a generator and the linked field, at design time, open the <text:span text:style-name="Symbol">GeneratorField</text:span> property editor by clicking on the button next to the property in the Object Inspector. The property editor should then appear.</text:p>
      <text:p text:style-name="P495">Note: this property is part of the dataset (e.g. TIBQuery) and not the update object.</text:p>
      <text:p text:style-name="P493"><draw:frame draw:style-name="fr2" draw:name="Frame16" text:anchor-type="paragraph" svg:width="4.2327in" draw:z-index="21"><draw:text-box fo:min-height="3.5917in"><text:p text:style-name="Illustration"><draw:frame draw:style-name="fr13" draw:name="Image38" text:anchor-type="paragraph" svg:width="4.2327in" style:rel-width="100%" svg:height="3.2154in" style:rel-height="scale" draw:z-index="22"><draw:image xlink:href="Pictures/10000000000001E20000018C49E9BFBD.png" xlink:type="simple" xlink:show="embed" xlink:actuate="onLoad" draw: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21" text:outline-level="3"><text:bookmark-start text:name="__RefHeading___Toc15662_148275515"/>Updating Datasets<text:bookmark-end text:name="__RefHeading___Toc15662_148275515"/></text:h>
      <text:p text:style-name="P394">The following rules apply:</text:p>
      <text:list text:style-name="L59">
        <text:list-item>
          <text:p text:style-name="P1083"><text:soft-page-break/>Only the current row can be modified at any one time.</text:p>
        </text:list-item>
        <text:list-item>
          <text:p text:style-name="P1083">Before a row can be modified, the dataset must be placed into the edit state by calling the <text:span text:style-name="Symbol">Edit</text:span> method.</text:p>
        </text:list-item>
      </text:list>
      <text:p text:style-name="P393">Note that data aware controls usually call the “Edit” method automatically whenever the data they present is modified.</text:p>
      <text:list text:continue-numbering="true" text:style-name="L59">
        <text:list-item>
          <text:p text:style-name="P1083">A new row can be added by calling the <text:span text:style-name="Symbol">Append, AppendRecord, Insert or InsertRecord</text:span> method. The dataset then enters the “insert” state. </text:p>
        </text:list-item>
        <text:list-item>
          <text:p text:style-name="P1083">Changes are written to the database by the <text:span text:style-name="Symbol">Post</text:span> method. This can be used whenever the dataset is in the “edit” or “insert” state. On completion, the dataset returns to the “browse” state.</text:p>
        </text:list-item>
        <text:list-item>
          <text:p text:style-name="P1083">Changes can be abandoned <text:span text:style-name="T258">(before a post) </text:span>using the <text:span text:style-name="Symbol">Cancel</text:span> method.</text:p>
        </text:list-item>
      </text:list>
      <text:p text:style-name="P395">Note that enabling ForceRefresh is useful whenever the dataset includes <text:span text:style-name="T258">dependent </text:span>fields <text:span text:style-name="T258">in the query (e.g. from a “JOINed” table)</text:span> and ensures that the dataset presented <text:span text:style-name="T258">is </text:span>always <text:span text:style-name="T258">consistent with</text:span> the data in the database.</text:p>
      <text:h text:style-name="Heading_20_3" text:outline-level="3"><text:bookmark-start text:name="__RefHeading__25434_1844166745"/>Automatic Posting<text:bookmark-end text:name="__RefHeading__25434_1844166745"/></text:h>
      <text:p text:style-name="P641"><text:span text:style-name="T142">An updateable IBX dataset</text:span> will automatically post a modified record when scrolling between rows. <text:span text:style-name="T142">When the dataset is closed, the behaviour depends on the setting of the </text:span><text:span text:style-name="Symbol"><text:span text:style-name="T194">DataSetCloseAction</text:span></text:span><text:span text:style-name="T142"> property:</text:span></text:p>
      <text:list text:style-name="L60">
        <text:list-item>
          <text:p text:style-name="P1084">If set to discard changes (the default) a modified record is “cancelled” and the changes lost. </text:p>
        </text:list-item>
        <text:list-item>
          <text:p text:style-name="P1084">If set to save changes, the modified record is “posted” before the dataset is closed. <text:span text:style-name="T143">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2">This event <text:span text:style-name="T144">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text:style-name="L61">
        <text:list-item>
          <text:p text:style-name="P1143">OnValidatePost (returns CancelPost = false)</text:p>
        </text:list-item>
        <text:list-item>
          <text:p text:style-name="P1143">OnBeforePost</text:p>
        </text:list-item>
        <text:list-item>
          <text:p text:style-name="P1143">OnAfterPost</text:p>
        </text:list-item>
        <text:list-item>
          <text:p text:style-name="P1143">OnBeforeScroll</text:p>
        </text:list-item>
        <text:list-item>
          <text:p text:style-name="P1143">OnAfterScroll</text:p>
        </text:list-item>
      </text:list>
      <text:p text:style-name="P82">or </text:p>
      <text:list text:continue-numbering="true" text:style-name="L61">
        <text:list-item>
          <text:p text:style-name="P1143">OnValidatePost (returns CancelPost = true)</text:p>
        </text:list-item>
        <text:list-item>
          <text:p text:style-name="P1143">OnBeforeCancel</text:p>
        </text:list-item>
        <text:list-item>
          <text:p text:style-name="P1143"><text:soft-page-break/>OnAfterCancel</text:p>
        </text:list-item>
        <text:list-item>
          <text:p text:style-name="P1143">OnBeforeScroll</text:p>
        </text:list-item>
        <text:list-item>
          <text:p text:style-name="P1143">OnAfterScroll</text:p>
        </text:list-item>
      </text:list>
      <text:p text:style-name="Highlighted">Note that trying to call “Cancel” in an OnBeforePost handler does not work as the Post still proceeds and, <text:span text:style-name="T194">in</text:span> IBX, an error will be reported.</text:p>
      <text:p text:style-name="P83">An exception could be raised in <text:span text:style-name="T78">either </text:span>the <text:span text:style-name="Symbol">OnValidatePost</text:span> handler or in the <text:span text:style-name="Symbol">OnBeforePost</text:span> handler to report an actual error in the <text:span text:style-name="T194">data</text:span>.</text:p>
      <text:h text:style-name="P922" text:outline-level="3"><text:bookmark-start text:name="__RefHeading___Toc12744_67450469"/>Cached Updates<text:bookmark-end text:name="__RefHeading___Toc12744_67450469"/></text:h>
      <text:p text:style-name="P494">If an updatable dataset's <text:span text:style-name="Symbol">CachedUpdates</text:span> property is set to true then updates are cached rather th<text:span text:style-name="T194">a</text:span>n written through to the database when <text:span text:style-name="Symbol"><text:span text:style-name="T243">P</text:span></text:span><text:span text:style-name="Symbol">ost</text:span> is called. <text:span text:style-name="T194">Instead, t</text:span>hey are only written <text:span text:style-name="T194">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4">Note that if </text:span><text:span text:style-name="Symbol"><text:span text:style-name="T145">DatasetCloseAction is</text:span></text:span> <text:span text:style-name="T144">set to Save Changes then ApplyUpdates is automatically called after any pending change has been posted.</text:span></text:p>
      <text:p text:style-name="P498">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4">may be</text:span> called and the changes are not written through to the database.</text:p>
      <text:p text:style-name="P498">The same effect could be achieved with transactions, but this may not be always as useful or efficient.</text:p>
      <text:h text:style-name="P970" text:outline-level="4"><text:bookmark-start text:name="__RefHeading___Toc15666_148275515"/>Cached Updates using OnUpdateRecord<text:bookmark-end text:name="__RefHeading___Toc15666_148275515"/></text:h>
      <text:p text:style-name="P57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414">The ApplyUpdates method will cycle through all modified, inserted or deleted records in the record cache in turn. For each one, i<text:span text:style-name="T277">t</text:span> will call the <text:span text:style-name="T275">OnUpdateRecord event handler </text:span>specifying the UpdateKind as ukModify, ukInsert or ukDelete respectively and expecting the event handler to return with an appropriate UpdateAction specified. </text:p>
      <text:p text:style-name="P414">When <text:span text:style-name="T275">OnUpdateRecord </text:span>is called, the current dataset record is set to the row for which an UpdateAction is requested and hence the <text:span text:style-name="T275">OnUpdateRecord </text:span>event handler can determine the field values for this row by using TDataset.Fields or TDataset.FieldByName as normal.</text:p>
      <text:p text:style-name="P411">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696"><text:span text:style-name="Symbol"><text:span text:style-name="T276">uaFail</text:span></text:span></text:p>
          </table:table-cell>
          <table:table-cell table:style-name="Table53.B1" office:value-type="string">
            <text:p text:style-name="P413">ApplyUpdates terminates with a user abort error.</text:p>
          </table:table-cell>
        </table:table-row>
        <table:table-row>
          <table:table-cell table:style-name="Table53.A2" office:value-type="string">
            <text:p text:style-name="P696"><text:span text:style-name="Symbol"><text:span text:style-name="T276">uaAbort</text:span></text:span></text:p>
          </table:table-cell>
          <table:table-cell table:style-name="Table53.B2" office:value-type="string">
            <text:p text:style-name="P413">Sysutils.Abort is called</text:p>
          </table:table-cell>
        </table:table-row>
        <table:table-row>
          <table:table-cell table:style-name="Table53.A2" office:value-type="string">
            <text:p text:style-name="P696"><text:span text:style-name="Symbol"><text:span text:style-name="T276">uaSkip</text:span></text:span></text:p>
          </table:table-cell>
          <table:table-cell table:style-name="Table53.B2" office:value-type="string">
            <text:p text:style-name="P413">The current record is skipped by ApplyUpdates and remains in the cache with <text:soft-page-break/>its cache status unchanged i.e. as a modified, inserted or deleted record.</text:p>
          </table:table-cell>
        </table:table-row>
        <table:table-row>
          <table:table-cell table:style-name="Table53.A2" office:value-type="string">
            <text:p text:style-name="P696"><text:span text:style-name="Symbol"><text:span text:style-name="T276">uaRetry</text:span></text:span></text:p>
          </table:table-cell>
          <table:table-cell table:style-name="Table53.B2" office:value-type="string">
            <text:p text:style-name="P697">The OnUpdateRecord event handler will be recalled.</text:p>
          </table:table-cell>
        </table:table-row>
        <table:table-row>
          <table:table-cell table:style-name="Table53.A2" office:value-type="string">
            <text:p text:style-name="P696"><text:span text:style-name="Symbol"><text:span text:style-name="T276">uaApply</text:span></text:span></text:p>
          </table:table-cell>
          <table:table-cell table:style-name="Table53.B2" office:value-type="string">
            <text:p text:style-name="P697">The updated should be applied by IBX. </text:p>
          </table:table-cell>
        </table:table-row>
        <table:table-row>
          <table:table-cell table:style-name="Table53.A2" office:value-type="string">
            <text:p text:style-name="P696"><text:span text:style-name="Symbol"><text:span text:style-name="T276">uaApplied</text:span></text:span></text:p>
          </table:table-cell>
          <table:table-cell table:style-name="Table53.B2" office:value-type="string">
            <text:p text:style-name="P697">The OnUpdateRecord handler has performed the database update itself.</text:p>
            <text:p text:style-name="P698">Note: returning uaApplied without actually performing the update will leave the dataset out of sync with the database.</text:p>
          </table:table-cell>
        </table:table-row>
      </table:table>
      <text:p text:style-name="P412"/>
      <text:h text:style-name="P971" text:outline-level="4"><text:bookmark-start text:name="__RefHeading___Toc15668_148275515"/>The OnUpdateError Event<text:bookmark-end text:name="__RefHeading___Toc15668_148275515"/></text:h>
      <text:p text:style-name="P571">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571">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23" text:outline-level="3"><text:bookmark-start text:name="__RefHeading___Toc10610_600433823"/>Identity Columns<text:bookmark-end text:name="__RefHeading___Toc10610_600433823"/></text:h>
      <text:p text:style-name="P544"><text:span text:style-name="T229">Firebird 3 has introduced the Identity column, where a</text:span>n identity column is a column associated with an internal sequence generator. Its value is set automatically when the column is omitted in an INSERT statement.</text:p>
      <text:p text:style-name="P246">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246">For example, if a simple example table is defined as:</text:p>
      <text:p text:style-name="P247">CREATE TABLE ITEST</text:p>
      <text:p text:style-name="P247">(</text:p>
      <text:p text:style-name="P744"><text:span text:style-name="T229"><text:s text:c="2"/>MYKEY integer </text:span>GENERATED BY DEFAULT AS IDENTITY<text:span text:style-name="T229">,</text:span></text:p>
      <text:p text:style-name="P247"><text:s text:c="2"/>SOMETEXT varchar(64),</text:p>
      <text:p text:style-name="P247"><text:s text:c="2"/>PRIMARY KEY (<text:span text:style-name="T258">MY</text:span>KEY)</text:p>
      <text:p text:style-name="P247">);</text:p>
      <text:p text:style-name="P245">then an appropriate Insert SQL would be:</text:p>
      <text:p text:style-name="P247">Insert Into ITEST(SOMETEXT)</text:p>
      <text:p text:style-name="P247">Values(:SOMETEXT) RETURNING <text:span text:style-name="T258">MY</text:span>KEY;</text:p>
      <text:p text:style-name="P245">When IBX executes the above Insert statement, the current value of the “SOMETEXT” column is inserted into a new dataset row and the value of the KEY column is set (by Firebird) to the next value returned from the corresponding generator. Once the statement has been executed, IBX <text:soft-page-break/>reads the returned value of the <text:span text:style-name="T258">MY</text:span>KEY column and replaces the current value of the <text:span text:style-name="T258">MY</text:span>KEY <text:span text:style-name="T258">field</text:span> (NULL) with the returned value i.e. the value inserted into the new row.</text:p>
      <text:p text:style-name="P245">When using IBX with an Identity column, you should note the following:</text:p>
      <text:list text:style-name="L62">
        <text:list-item>
          <text:p text:style-name="P1144">The Identity column should not be included in the Insert SQL list of inserted values.</text:p>
        </text:list-item>
        <text:list-item>
          <text:p text:style-name="P1144">The Identity column should be included in the values returned by the Insert statement's RETURNING clause.</text:p>
        </text:list-item>
        <text:list-item>
          <text:p text:style-name="P1144">Until a new dataset row has been posted, the value of the Identity column in the current row is null. This is true between executing TDataset.Append and TDataset.Post.</text:p>
        </text:list-item>
        <text:list-item>
          <text:p text:style-name="P1144">The generated value of the Identity column is available from the TDataset.AfterPost event handler onwards.</text:p>
        </text:list-item>
        <text:list-item>
          <text:p text:style-name="P1145">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254">The IBX InsertSQL property editor generates an Insert SQL statement compatible with the above.</text:p>
      <text:p text:style-name="P259">An example of the use of Identity columns is provided in examples/IdentityColumn.</text:p>
      <text:h text:style-name="P924" text:outline-level="3"><text:bookmark-start text:name="__RefNumPara__22017_1614309218"/><text:bookmark-start text:name="__RefHeading___Toc11258_67450469"/>Row Refresh<text:bookmark-end text:name="__RefNumPara__22017_1614309218"/><text:bookmark-end text:name="__RefHeading___Toc11258_67450469"/></text:h>
      <text:p text:style-name="P63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409">Prior to IBX 2.<text:span text:style-name="T433">6</text:span>.0, the <text:span text:style-name="T272">TDataset.Refresh method </text:span>could be called to explicitly perform a row refresh. However, this was not in agreement with Delphi or the FPC Manual which states:</text:p>
      <text:p text:style-name="P408"><text:span text:style-name="Variable">“Refresh</text:span> posts any pending edits, and refetches the data in the dataset from the underlying database, and attempts to reposition the cursor on the same record as it was. This operation is not supported by all datasets, and should be used with care.”</text:p>
      <text:p text:style-name="P409">From IBX 2.<text:span text:style-name="T433">6</text:span>.0, <text:span text:style-name="T272">TDataset.Refresh </text:span>complies with the FPC Manual.</text:p>
      <text:p text:style-name="P633"><text:span text:style-name="T429">A</text:span><text:span text:style-name="T272"> row Refresh is performed </text:span><text:span text:style-name="T430">i</text:span><text:span text:style-name="T272">mmediately after an inserted or updated row is posted </text:span><text:span text:style-name="T430">and </text:span><text:span text:style-name="T272">a Refresh Query is present, and:</text:span></text:p>
      <text:list text:style-name="L63">
        <text:list-item>
          <text:p text:style-name="P1085"><text:span text:style-name="T429">A Field is present in the dataset with the Provider Flag </text:span><text:span text:style-name="T23">pfRefreshOnInsert</text:span><text:span text:style-name="T429"> set and the </text:span><text:span text:style-name="T430">r</text:span><text:span text:style-name="T372">ow had been inserted</text:span><text:span text:style-name="T272">, or</text:span></text:p>
        </text:list-item>
        <text:list-item>
          <text:p text:style-name="P1086"><text:span text:style-name="T429">A Field is present in the dataset with the Provider Flag </text:span><text:span text:style-name="T23">pfRefreshOnUpdate</text:span><text:span text:style-name="T429"> </text:span><text:span text:style-name="T430">is present and the row had been updated, or</text:span></text:p>
        </text:list-item>
        <text:list-item>
          <text:p text:style-name="P1086"><text:span text:style-name="T272">The </text:span><text:span text:style-name="T430">Dataset's </text:span><text:span text:style-name="T272">ForcedRefresh property is true, </text:span><text:span text:style-name="T430">or</text:span></text:p>
        </text:list-item>
        <text:list-item>
          <text:p text:style-name="P1087"><text:soft-page-break/><text:span text:style-name="T272">The dataset's select query contains read only (computed by) fields </text:span><text:span text:style-name="T273">and the Insert, or Update query used to update the database did not return </text:span><text:span text:style-name="T372">the value of any such field</text:span><text:span text:style-name="T273">.</text:span></text:p>
        </text:list-item>
        <text:list-item>
          <text:p text:style-name="P1088">The dataset has blob and/or array fields and <text:s/><text:span text:style-name="T273">and the Insert, or Update query used to update the database did not return </text:span><text:span text:style-name="T368">the value of any such field.</text:span></text:p>
        </text:list-item>
      </text:list>
      <text:p text:style-name="P261">In general, using INSERT...RETURNING or UPDATE...RETURNING is a more efficient way of returning the updated value of fields than is a row refresh (which involves executing a <text:s/>select query) and is hence preferred.</text:p>
      <text:p text:style-name="P261">Prior to IBX 2.2.0, INSERT...RETURNING and UPDATE...RETURNING was not supported and hence a row refresh was always performed after an inserted or updated row was posted to the database when the <text:span text:style-name="T274">dataset </text:span>fields contained read only (computed by) fields. </text:p>
      <text:p text:style-name="P261">The ForcedRefresh property can always be used to ensure a row refresh after an inserted or updated row has been posted regardless of whether INSERT...RETURNING or UPDATE...RETURNING is or is not used. </text:p>
      <text:p text:style-name="P262">Note: the AfterRefresh event is only called when a refresh is performed by a call to TDataset.Refresh.</text:p>
      <text:p text:style-name="P263">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264">Note: cached updates may not be appropriate when the application demands that a dataset row is up-to-date immediately after a TDataset.Post.</text:p>
      <text:h text:style-name="P848" text:outline-level="2"><text:bookmark-start text:name="__RefHeading__24565_1844166745"/>TIBDataSet<text:bookmark-end text:name="__RefHeading__24565_1844166745"/></text:h>
      <text:p text:style-name="P494">The <text:span text:style-name="Symbol">TIBDataset</text:span> is <text:span text:style-name="Symbol">TIBQuery</text:span> and <text:span text:style-name="Symbol">TIBUpdate</text:span><text:span text:style-name="Symbol"><text:span text:style-name="T194">SQL</text:span></text:span> rolled into one. It defines an updateable dataset and in a single object. All of the above applies.</text:p>
      <text:h text:style-name="P925" text:outline-level="3"><text:bookmark-start text:name="__RefHeading___Toc15670_148275515"/>Highlighted Properties<text:bookmark-end text:name="__RefHeading___Toc15670_148275515"/></text:h>
      <table:table table:name="Table38" table:style-name="Table38">
        <table:table-column table:style-name="Table38.A"/>
        <table:table-column table:style-name="Table38.B"/>
        <table:table-row>
          <table:table-cell table:style-name="Table38.A1" office:value-type="string">
            <text:p text:style-name="P546"><text:span text:style-name="Symbol">SelectSQL</text:span></text:p>
          </table:table-cell>
          <table:table-cell table:style-name="Table38.B1" office:value-type="string">
            <text:p text:style-name="P487">A StringList that defines a <text:span text:style-name="T146">select</text:span> SQL Statement <text:span text:style-name="T146">used to define the dataset.</text:span></text:p>
          </table:table-cell>
        </table:table-row>
        <table:table-row>
          <table:table-cell table:style-name="Table38.A2" office:value-type="string">
            <text:p text:style-name="P486"><text:span text:style-name="Symbol">RefreshSQL</text:span></text:p>
          </table:table-cell>
          <table:table-cell table:style-name="Table38.B2" office:value-type="string">
            <text:p text:style-name="P486">A StringList that defines an SQL Statement used to refresh a single row in the dataset.</text:p>
          </table:table-cell>
        </table:table-row>
        <table:table-row>
          <table:table-cell table:style-name="Table38.A2" office:value-type="string">
            <text:p text:style-name="P486"><text:span text:style-name="Symbol">ModifySQL</text:span></text:p>
          </table:table-cell>
          <table:table-cell table:style-name="Table38.B2" office:value-type="string">
            <text:p text:style-name="P486">A StringList that defines an SQL Statement used to update a single row in the database from updated field values in the current row of the dataset.</text:p>
          </table:table-cell>
        </table:table-row>
        <table:table-row>
          <table:table-cell table:style-name="Table38.A2" office:value-type="string">
            <text:p text:style-name="P486"><text:span text:style-name="Symbol">InsertSQL</text:span></text:p>
          </table:table-cell>
          <table:table-cell table:style-name="Table38.B2" office:value-type="string">
            <text:p text:style-name="P486">A StringList that defines an SQL Statement used to insert a single row into the database from field values in the current row of the dataset</text:p>
          </table:table-cell>
        </table:table-row>
        <table:table-row>
          <table:table-cell table:style-name="Table38.A2" office:value-type="string">
            <text:p text:style-name="P486"><text:span text:style-name="Symbol">DeleteSQL</text:span></text:p>
          </table:table-cell>
          <table:table-cell table:style-name="Table38.B2" office:value-type="string">
            <text:p text:style-name="P486">A StringList that defines an SQL Statement used to delete a single row in the database corresponding to the deleted (current) row of the dataset.</text:p>
          </table:table-cell>
        </table:table-row>
      </table:table>
      <text:p text:style-name="P497"/>
      <text:p text:style-name="P545"><text:soft-page-break/>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49" text:outline-level="2"><text:bookmark-start text:name="__RefHeading___Toc11725_27826370"/>Dataset Fields<text:bookmark-end text:name="__RefHeading___Toc11725_27826370"/></text:h>
      <text:p text:style-name="P551">The TDataset model introduces both FieldDefs and Fields where:</text:p>
      <text:list text:style-name="L64">
        <text:list-item>
          <text:p text:style-name="P1089">a FieldDef (base class TFieldDef) is created for each column in a dataset and defines various properties including the data type and size. Under IBX, the Fielddef is created from the underlying select query metadata.</text:p>
        </text:list-item>
        <text:list-item>
          <text:p text:style-name="P1089">A Field (base class TField) is either dynamically created for each column when the dataset is opened or is created at design time as a published property of the Form on which the dataset is placed, and bound to the dataset column when the dataset is opened. <text:span text:style-name="T231">The Field provides the interface between the dataset column and the dataset user and all data access and modification is performed through a Field. Fields are created from the FieldDefs.</text:span></text:p>
        </text:list-item>
      </text:list>
      <text:h text:style-name="P926" text:outline-level="3"><text:bookmark-start text:name="__RefHeading___Toc15672_148275515"/>FieldDefs<text:bookmark-end text:name="__RefHeading___Toc15672_148275515"/></text:h>
      <text:p text:style-name="P551">IBX subclasses T<text:span text:style-name="T258">IB</text:span>FieldDef <text:span text:style-name="T248">from</text:span> TFieldDef in order to hold extended Firebird specific information about each database column. <text:span text:style-name="T23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47"><text:span text:style-name="Symbol"><text:span text:style-name="T230">CharacterSetName</text:span></text:span></text:p>
          </table:table-cell>
          <table:table-cell table:style-name="Table49.B1" office:value-type="string">
            <text:p text:style-name="P615">Applies to string and Blob string fields and gives the Firebird character set name of the string's character set.</text:p>
          </table:table-cell>
        </table:table-row>
        <table:table-row>
          <table:table-cell table:style-name="Table49.A2" office:value-type="string">
            <text:p text:style-name="P615"><text:span text:style-name="Symbol">CharacterSetSize</text:span></text:p>
          </table:table-cell>
          <table:table-cell table:style-name="Table49.B2" office:value-type="string">
            <text:p text:style-name="P615">Applies to string and Blob string fields and gives the <text:span text:style-name="T233">maximum </text:span>number of bytes in each character.</text:p>
          </table:table-cell>
        </table:table-row>
        <table:table-row>
          <table:table-cell table:style-name="Table49.A2" office:value-type="string">
            <text:p text:style-name="P615"><text:span text:style-name="Symbol">CodePage</text:span></text:p>
          </table:table-cell>
          <table:table-cell table:style-name="Table49.B2" office:value-type="string">
            <text:p text:style-name="P615">Applies to string and Blob string fields and gives the AnsiString code page associated with the <text:span text:style-name="T233">column's</text:span> Firebird Character Set.</text:p>
          </table:table-cell>
        </table:table-row>
        <table:table-row>
          <table:table-cell table:style-name="Table49.A2" office:value-type="string">
            <text:p text:style-name="P615"><text:span text:style-name="Symbol">DataSize</text:span></text:p>
          </table:table-cell>
          <table:table-cell table:style-name="Table49.B2" office:value-type="string">
            <text:p text:style-name="P615">The maximum number of bytes required to hold data in this column.</text:p>
          </table:table-cell>
        </table:table-row>
        <table:table-row>
          <table:table-cell table:style-name="Table49.A2" office:value-type="string">
            <text:p text:style-name="P615"><text:span text:style-name="Symbol">RelationName</text:span></text:p>
          </table:table-cell>
          <table:table-cell table:style-name="Table49.B2" office:value-type="string">
            <text:p text:style-name="P615">The Firebird Table Name in which the column is located, if any.</text:p>
          </table:table-cell>
        </table:table-row>
        <table:table-row>
          <table:table-cell table:style-name="Table49.A2" office:value-type="string">
            <text:p text:style-name="P615"><text:span text:style-name="Symbol">ArrayDimensions</text:span></text:p>
          </table:table-cell>
          <table:table-cell table:style-name="Table49.B2" office:value-type="string">
            <text:p text:style-name="P615">Applies to array columns only and gives the number of dimensions in the array.</text:p>
          </table:table-cell>
        </table:table-row>
        <table:table-row>
          <table:table-cell table:style-name="Table49.A2" office:value-type="string">
            <text:p text:style-name="P615"><text:span text:style-name="Symbol">ArrayBounds</text:span></text:p>
          </table:table-cell>
          <table:table-cell table:style-name="Table49.B2" office:value-type="string">
            <text:p text:style-name="P615">Applies to array columns only and gives the bounds for each dimension.</text:p>
          </table:table-cell>
        </table:table-row>
        <table:table-row>
          <table:table-cell table:style-name="Table49.A2" office:value-type="string">
            <text:p text:style-name="P615"><text:span text:style-name="Symbol">IdentityColumn</text:span></text:p>
          </table:table-cell>
          <table:table-cell table:style-name="Table49.B2" office:value-type="string">
            <text:p text:style-name="P615">Applies to integer and numeric columns <text:span text:style-name="T248">only </text:span>and is set to true if the underlying column is an “Identity Column”.</text:p>
          </table:table-cell>
        </table:table-row>
      </table:table>
      <text:p text:style-name="P552"/>
      <text:p text:style-name="P614">The FieldDefs can be accessed using the TDataset.FieldsDefs property. This returns a list of FieldDefs of type TFieldDef. For IBX Datasets these may be cast to TIBFieldDef in order to access the extended properties.</text:p>
      <text:h text:style-name="P927" text:outline-level="3"><text:bookmark-start text:name="__RefHeading___Toc26109_2462897014"/><text:soft-page-break/>Field Subclasses<text:bookmark-end text:name="__RefHeading___Toc26109_2462897014"/></text:h>
      <text:p text:style-name="P620"><text:span text:style-name="T361">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620">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table-cell table:style-name="Table82.A1" office:value-type="string">
              <text:p text:style-name="P166">SQL Type</text:p>
            </table:table-cell>
            <table:table-cell table:style-name="Table82.A1" office:value-type="string">
              <text:p text:style-name="P166">TField Subclass</text:p>
            </table:table-cell>
            <table:table-cell table:style-name="Table82.C1" office:value-type="string">
              <text:p text:style-name="P166">Notes</text:p>
            </table:table-cell>
          </table:table-row>
        </table:table-header-rows>
        <table:table-row>
          <table:table-cell table:style-name="Table82.A2" office:value-type="string">
            <text:p text:style-name="P621">VarChar, or Char</text:p>
          </table:table-cell>
          <table:table-cell table:style-name="Table82.A2" office:value-type="string">
            <text:p text:style-name="P621">TIBStringField</text:p>
          </table:table-cell>
          <table:table-cell table:style-name="Table82.C2" office:value-type="string">
            <text:p text:style-name="P621">See <text:bookmark-ref text:reference-format="number" text:ref-name="__RefHeading___Toc24377_2462897014">6.8.3.2</text:bookmark-ref></text:p>
          </table:table-cell>
        </table:table-row>
        <table:table-row>
          <table:table-cell table:style-name="Table82.A2" office:value-type="string">
            <text:p text:style-name="P731">Float or Double</text:p>
          </table:table-cell>
          <table:table-cell table:style-name="Table82.A2" office:value-type="string">
            <text:p text:style-name="P621">TfloatField</text:p>
          </table:table-cell>
          <table:table-cell table:style-name="Table82.C2" office:value-type="string">
            <text:p text:style-name="Table_20_Contents"/>
          </table:table-cell>
        </table:table-row>
        <table:table-row>
          <table:table-cell table:style-name="Table82.A2" office:value-type="string">
            <text:p text:style-name="P731">Integer</text:p>
          </table:table-cell>
          <table:table-cell table:style-name="Table82.A2" office:value-type="string">
            <text:p text:style-name="P621">TIBIntegerField</text:p>
          </table:table-cell>
          <table:table-cell table:style-name="Table82.C2" office:value-type="string">
            <text:p text:style-name="P621"/>
          </table:table-cell>
        </table:table-row>
        <table:table-row>
          <table:table-cell table:style-name="Table82.A2" office:value-type="string">
            <text:p text:style-name="P731">Smallint</text:p>
          </table:table-cell>
          <table:table-cell table:style-name="Table82.A2" office:value-type="string">
            <text:p text:style-name="P731">TIBSmallIntField</text:p>
          </table:table-cell>
          <table:table-cell table:style-name="Table82.C2" office:value-type="string">
            <text:p text:style-name="P621"/>
          </table:table-cell>
        </table:table-row>
        <table:table-row>
          <table:table-cell table:style-name="Table82.A2" office:value-type="string">
            <text:p text:style-name="P731">Bigint</text:p>
          </table:table-cell>
          <table:table-cell table:style-name="Table82.A2" office:value-type="string">
            <text:p text:style-name="P731">TIBLargeIntField</text:p>
          </table:table-cell>
          <table:table-cell table:style-name="Table82.C2" office:value-type="string">
            <text:p text:style-name="P621"/>
          </table:table-cell>
        </table:table-row>
        <table:table-row>
          <table:table-cell table:style-name="Table82.A2" office:value-type="string">
            <text:p text:style-name="P731">Numeric or Decimal</text:p>
          </table:table-cell>
          <table:table-cell table:style-name="Table82.A2" office:value-type="string">
            <text:p text:style-name="P731">TIBBcdField</text:p>
            <text:p text:style-name="P731">or TFmtBCDField</text:p>
          </table:table-cell>
          <table:table-cell table:style-name="Table82.C2" office:value-type="string">
            <text:p text:style-name="P731">Unless defined with zero decimal places when an integer type is used.</text:p>
            <text:p text:style-name="P731">TfmtBCDField is used for Firebird 4 extended Numeric precision</text:p>
          </table:table-cell>
        </table:table-row>
        <table:table-row>
          <table:table-cell table:style-name="Table82.A2" office:value-type="string">
            <text:p text:style-name="P731">DecFloat <text:span text:style-name="T366">or INT128</text:span></text:p>
          </table:table-cell>
          <table:table-cell table:style-name="Table82.A2" office:value-type="string">
            <text:p text:style-name="P731">TfmtBCDField</text:p>
          </table:table-cell>
          <table:table-cell table:style-name="Table82.C2" office:value-type="string">
            <text:p text:style-name="P731">Firebird 4 only</text:p>
          </table:table-cell>
        </table:table-row>
        <table:table-row>
          <table:table-cell table:style-name="Table82.A2" office:value-type="string">
            <text:p text:style-name="P731">Date</text:p>
          </table:table-cell>
          <table:table-cell table:style-name="Table82.A2" office:value-type="string">
            <text:p text:style-name="P731">TdateTimeField</text:p>
          </table:table-cell>
          <table:table-cell table:style-name="Table82.C2" office:value-type="string">
            <text:p text:style-name="P731"/>
          </table:table-cell>
        </table:table-row>
        <table:table-row>
          <table:table-cell table:style-name="Table82.A2" office:value-type="string">
            <text:p text:style-name="P731">Time</text:p>
          </table:table-cell>
          <table:table-cell table:style-name="Table82.A2" office:value-type="string">
            <text:p text:style-name="P731">TIBTimeField</text:p>
          </table:table-cell>
          <table:table-cell table:style-name="Table82.C2" office:value-type="string">
            <text:p text:style-name="P731"/>
          </table:table-cell>
        </table:table-row>
        <table:table-row>
          <table:table-cell table:style-name="Table82.A2" office:value-type="string">
            <text:p text:style-name="P731">Time with Time Zone</text:p>
          </table:table-cell>
          <table:table-cell table:style-name="Table82.A2" office:value-type="string">
            <text:p text:style-name="P731">TIBTimeField</text:p>
          </table:table-cell>
          <table:table-cell table:style-name="Table82.C2" office:value-type="string">
            <text:p text:style-name="P731">Firebird 4 only</text:p>
          </table:table-cell>
        </table:table-row>
        <table:table-row>
          <table:table-cell table:style-name="Table82.A2" office:value-type="string">
            <text:p text:style-name="P731">Timestamp</text:p>
          </table:table-cell>
          <table:table-cell table:style-name="Table82.A2" office:value-type="string">
            <text:p text:style-name="P731">TIBDateTimeField</text:p>
          </table:table-cell>
          <table:table-cell table:style-name="Table82.C2" office:value-type="string">
            <text:p text:style-name="P731">Firebird 4 only</text:p>
          </table:table-cell>
        </table:table-row>
        <table:table-row>
          <table:table-cell table:style-name="Table82.A2" office:value-type="string">
            <text:p text:style-name="P731">Timestamp with Time Zone</text:p>
          </table:table-cell>
          <table:table-cell table:style-name="Table82.A2" office:value-type="string">
            <text:p text:style-name="P731">TIBDateTimeField</text:p>
          </table:table-cell>
          <table:table-cell table:style-name="Table82.C2" office:value-type="string">
            <text:p text:style-name="P731">Firebird 4 only</text:p>
          </table:table-cell>
        </table:table-row>
        <table:table-row>
          <table:table-cell table:style-name="Table82.A2" office:value-type="string">
            <text:p text:style-name="P731">Blob</text:p>
          </table:table-cell>
          <table:table-cell table:style-name="Table82.A2" office:value-type="string">
            <text:p text:style-name="P731">TBlobField or TIBMemoField</text:p>
          </table:table-cell>
          <table:table-cell table:style-name="Table82.C2" office:value-type="string">
            <text:p text:style-name="P731">TIBMemoField is used for Blob sub type 1 (i.e. text blobs)</text:p>
          </table:table-cell>
        </table:table-row>
        <table:table-row>
          <table:table-cell table:style-name="Table82.A2" office:value-type="string">
            <text:p text:style-name="P731">Arrays</text:p>
          </table:table-cell>
          <table:table-cell table:style-name="Table82.A2" office:value-type="string">
            <text:p text:style-name="P731">TIBArrayField</text:p>
          </table:table-cell>
          <table:table-cell table:style-name="Table82.C2" office:value-type="string">
            <text:p text:style-name="P731">Regardless of the data type of the array element</text:p>
          </table:table-cell>
        </table:table-row>
      </table:table>
      <text:p text:style-name="P620"/>
      <text:h text:style-name="P928" text:outline-level="3"><text:bookmark-start text:name="__RefHeading___Toc24374_2462897014"/><text:soft-page-break/>IBX Fields<text:bookmark-end text:name="__RefHeading___Toc24374_2462897014"/></text:h>
      <text:p text:style-name="P553">IBX defines several extended TField subclasses (e.g. TIBStringField is subclassed from TStringField) in order to provide extended functionality and to make available Firebird specific column properties.</text:p>
      <text:p text:style-name="P560">A field is typically accessed using the TDataset.FieldByName method or, for fields created at design time as Form properties, by the corresponding identif<text:span text:style-name="T248">i</text:span>er name given to the Form property.</text:p>
      <text:h text:style-name="P972" text:outline-level="4"><text:bookmark-start text:name="__RefHeading___Toc15674_148275515"/>TIBBCDField, TIBSmallintField, TIBIntegerField and TIBLargeIntField<text:bookmark-end text:name="__RefHeading___Toc15674_148275515"/></text:h>
      <text:p text:style-name="P553">These are subclasses of <text:span text:style-name="T248">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616">IdentityColumn</text:p>
          </table:table-cell>
          <table:table-cell table:style-name="Table50.B1" office:value-type="string">
            <text:p text:style-name="P616"><text:span text:style-name="T231">S</text:span>et to true if the underlying column is an “Identity Column” <text:span text:style-name="T233">(see </text:span><text:span text:style-name="T233"><text:bookmark-ref text:reference-format="number" text:ref-name="__RefHeading___Toc10610_600433823">6.6.8</text:bookmark-ref></text:span><text:span text:style-name="T233">).</text:span></text:p>
          </table:table-cell>
        </table:table-row>
      </table:table>
      <text:p text:style-name="P553"/>
      <text:h text:style-name="P973" text:outline-level="4"><text:bookmark-start text:name="__RefHeading___Toc24377_2462897014"/>TIBStringField<text:bookmark-end text:name="__RefHeading___Toc24377_2462897014"/></text:h>
      <text:p text:style-name="P554">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33">to that expected by Firebird</text:span>.</text:p>
      <text:p text:style-name="P554">It also provided the following properties:</text:p>
      <table:table table:name="Table51" table:style-name="Table51">
        <table:table-column table:style-name="Table51.A"/>
        <table:table-column table:style-name="Table51.B"/>
        <table:table-row>
          <table:table-cell table:style-name="Table51.A1" office:value-type="string">
            <text:p text:style-name="P548"><text:span text:style-name="Symbol"><text:span text:style-name="T230">CharacterSetName</text:span></text:span></text:p>
          </table:table-cell>
          <table:table-cell table:style-name="Table51.B1" office:value-type="string">
            <text:p text:style-name="P617"><text:span text:style-name="T232">T</text:span>he Firebird character set name of the string's character set.</text:p>
          </table:table-cell>
        </table:table-row>
        <table:table-row>
          <table:table-cell table:style-name="Table51.A2" office:value-type="string">
            <text:p text:style-name="P617"><text:span text:style-name="Symbol">CharacterSetSize</text:span></text:p>
          </table:table-cell>
          <table:table-cell table:style-name="Table51.B2" office:value-type="string">
            <text:p text:style-name="P617"><text:span text:style-name="T232">T</text:span>he <text:span text:style-name="T259">maximum </text:span>number of bytes in each character.</text:p>
          </table:table-cell>
        </table:table-row>
        <table:table-row>
          <table:table-cell table:style-name="Table51.A2" office:value-type="string">
            <text:p text:style-name="P617"><text:span text:style-name="Symbol">CodePage</text:span></text:p>
          </table:table-cell>
          <table:table-cell table:style-name="Table51.B2" office:value-type="string">
            <text:p text:style-name="P617"><text:span text:style-name="T232">T</text:span>he AnsiString code page associated with the Firebird Character Set.</text:p>
          </table:table-cell>
        </table:table-row>
        <table:table-row>
          <table:table-cell table:style-name="Table51.A2" office:value-type="string">
            <text:p text:style-name="P555"><text:span text:style-name="Symbol">AutoFieldSize</text:span></text:p>
          </table:table-cell>
          <table:table-cell table:style-name="Table51.B2" office:value-type="string">
            <text:p text:style-name="P55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55">It is very rare that AutoFieldSize is not set to true. If the value set at design time is too small then this could lead to memory corruption.</text:p>
          </table:table-cell>
        </table:table-row>
      </table:table>
      <text:p text:style-name="P554"/>
      <text:h text:style-name="P974" text:outline-level="4"><text:bookmark-start text:name="__RefHeading___Toc15676_148275515"/>TIBMemoField<text:bookmark-end text:name="__RefHeading___Toc15676_148275515"/></text:h>
      <text:p text:style-name="P556">This is subclass of TMemoField and is used for text blobs <text:span text:style-name="T249">(see also </text:span><text:span text:style-name="T249"><text:bookmark-ref text:reference-format="number" text:ref-name="__RefHeading___Toc15457_620837195">8.1.1</text:bookmark-ref></text:span><text:span text:style-name="T249">)</text:span>. It is similar to TIBStringField in that it also manages string code pages and provides for automatic transliteration of strings written to the database. </text:p>
      <text:p text:style-name="P556">Additionally, it also allows for automatic string truncation when the contents is retrieved as “DisplayText”. This is the case when, for example, a blob string is the source for a column of a <text:soft-page-break/>TDBGrid. When a TIBMemoField's contents is retrieved as DisplayText then, depending on its DisplayTextAsClassName property:</text:p>
      <text:list text:style-name="L65">
        <text:list-item>
          <text:p text:style-name="P1090">The text returned is the field's classname enclosed in brackets (FCL default).</text:p>
        </text:list-item>
        <text:list-item>
          <text:p text:style-name="P1090">The text returned is the contents of the field truncated, if necessary, to the number of characters (including trailing <text:span text:style-name="T259">ellipses</text:span>) given by the inherited DisplayWidth property.</text:p>
        </text:list-item>
      </text:list>
      <text:p text:style-name="P55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49"><text:span text:style-name="Symbol"><text:span text:style-name="T230">CharacterSetName</text:span></text:span></text:p>
          </table:table-cell>
          <table:table-cell table:style-name="Table52.B1" office:value-type="string">
            <text:p text:style-name="P618"><text:span text:style-name="T232">T</text:span>he Firebird character set name of the string's character set.</text:p>
          </table:table-cell>
        </table:table-row>
        <table:table-row>
          <table:table-cell table:style-name="Table52.A2" office:value-type="string">
            <text:p text:style-name="P618"><text:span text:style-name="Symbol">CharacterSetSize</text:span></text:p>
          </table:table-cell>
          <table:table-cell table:style-name="Table52.B2" office:value-type="string">
            <text:p text:style-name="P618"><text:span text:style-name="T232">T</text:span>he <text:span text:style-name="T259">maximum </text:span>number of bytes in each character.</text:p>
          </table:table-cell>
        </table:table-row>
        <table:table-row>
          <table:table-cell table:style-name="Table52.A2" office:value-type="string">
            <text:p text:style-name="P618"><text:span text:style-name="Symbol">CodePage</text:span></text:p>
          </table:table-cell>
          <table:table-cell table:style-name="Table52.B2" office:value-type="string">
            <text:p text:style-name="P618"><text:span text:style-name="T232">T</text:span>he AnsiString code page associated with the Firebird Character Set.</text:p>
          </table:table-cell>
        </table:table-row>
        <table:table-row>
          <table:table-cell table:style-name="Table52.A2" office:value-type="string">
            <text:p text:style-name="P557"><text:span text:style-name="Symbol">DisplayTextAsClassName</text:span></text:p>
          </table:table-cell>
          <table:table-cell table:style-name="Table52.B2" office:value-type="string">
            <text:p text:style-name="P557">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556"/>
      <text:h text:style-name="P975" text:outline-level="4"><text:bookmark-start text:name="__RefHeading___Toc15678_148275515"/>TIBArrayField<text:bookmark-end text:name="__RefHeading___Toc15678_148275515"/></text:h>
      <text:p text:style-name="P560">This is a specialised TField subclass used for Firebird array columns. It is described in section <text:bookmark-ref text:reference-format="number" text:ref-name="__RefHeading___Toc11723_27826370">9.2</text:bookmark-ref>.</text:p>
      <text:h text:style-name="P976" text:outline-level="4"><text:bookmark-start text:name="__RefHeading___Toc26107_2462897014"/>TIBDateTimeField<text:bookmark-end text:name="__RefHeading___Toc26107_2462897014"/></text:h>
      <text:p text:style-name="P622">This is a subclass of TDateTimeField and holds additional information needed for time zone support. When the data type does not include a time zone then it behaves identically to TDateTimeField.</text:p>
      <text:p text:style-name="P625">For a general discussion of the Firebird 4 TIMESTAMP/TIME WITH TIME ZONE data types, see appendix C of The Firebird Pascal API Guide <text:span text:style-name="T28">[</text:span><text:span text:style-name="T28"><text:bookmark-ref text:reference-format="number" text:ref-name="__RefNumPara__23913_622456310">6</text:bookmark-ref></text:span><text:span text:style-name="T28">]</text:span><text:span text:style-name="T42">.</text:span></text:p>
      <text:p text:style-name="P558">The field provides the following additional properties:</text:p>
      <table:table table:name="Table83" table:style-name="Table83">
        <table:table-column table:style-name="Table83.A"/>
        <table:table-column table:style-name="Table83.B"/>
        <table:table-row>
          <table:table-cell table:style-name="Table83.A1" office:value-type="string">
            <text:p text:style-name="P550"><text:span text:style-name="Symbol">HasTimeZone</text:span></text:p>
          </table:table-cell>
          <table:table-cell table:style-name="Table83.B1" office:value-type="string">
            <text:p text:style-name="P623">True if the data type includes a time zone</text:p>
          </table:table-cell>
        </table:table-row>
        <table:table-row>
          <table:table-cell table:style-name="Table83.A2" office:value-type="string">
            <text:p text:style-name="P619"><text:span text:style-name="Symbol">TimeZoneName</text:span></text:p>
          </table:table-cell>
          <table:table-cell table:style-name="Table83.B2" office:value-type="string">
            <text:p text:style-name="P623">The time zone name (e.g. CET or Europe/London) or the time zone offset is no time zone name was assigned (e.g. -08:00).</text:p>
            <text:p text:style-name="P732">Read/Write. If the time zone name is changed, the date time is left unchanged.</text:p>
          </table:table-cell>
        </table:table-row>
        <table:table-row>
          <table:table-cell table:style-name="Table83.A2" office:value-type="string">
            <text:p text:style-name="P619"><text:span text:style-name="Symbol"><text:span text:style-name="T362">TimeZoneID</text:span></text:span></text:p>
          </table:table-cell>
          <table:table-cell table:style-name="Table83.B2" office:value-type="string">
            <text:p text:style-name="P623">The Firebird (0..65535) time zone identifier (used by internal functions).</text:p>
            <text:p text:style-name="P732">Read/Write. If the time zone ID is changed, the date time is left unchange</text:p>
          </table:table-cell>
        </table:table-row>
        <text:soft-page-break/>
        <table:table-row>
          <table:table-cell table:style-name="Table83.A2" office:value-type="string">
            <text:p text:style-name="P559"><text:span text:style-name="Symbol">TimeZoneFormat</text:span></text:p>
          </table:table-cell>
          <table:table-cell table:style-name="Table83.B2" office:value-type="string">
            <text:p text:style-name="P623">Set to tfOffsetFromGMT or tfTimeZoneNameIfKnown (default).</text:p>
            <text:p text:style-name="P623">When the timestamp is formatted as a st<text:span text:style-name="T366">r</text:span>ing and includes a time zone, setting the property to tfOffsetFromGMT forces the time zone name to always be rendered as a time zone offset. Otherwise, the value of the TimeZoneName property is used.</text:p>
          </table:table-cell>
        </table:table-row>
      </table:table>
      <text:p text:style-name="P558"/>
      <text:p text:style-name="P622">The field provides the following additional methods:</text:p>
      <text:p text:style-name="P750">function GetAsDateTimeTZ(var aDateTime: TDateTime; </text:p>
      <text:p text:style-name="P750"><text:s text:c="21"/>var aTimeZoneID: TFBTimeZoneID): boolean; overload;</text:p>
      <text:p text:style-name="P750">function GetAsDateTimeTZ(var aDateTime: TDateTime; </text:p>
      <text:p text:style-name="P750"><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table-cell table:style-name="Table84.A1" office:value-type="string">
            <text:p text:style-name="P550"><text:span text:style-name="Symbol">GetAsDateTimeTZ</text:span></text:p>
          </table:table-cell>
          <table:table-cell table:style-name="Table84.B1" office:value-type="string">
            <text:p text:style-name="P732">Returns both the date time value and the time zone name (or ID). Note that T<text:span text:style-name="T366">D</text:span>ateTimeField.AsDateTime may still be used. However, this only returns the date time component. If there is no time zone component then the time zone is always GMT.</text:p>
          </table:table-cell>
        </table:table-row>
        <table:table-row>
          <table:table-cell table:style-name="Table84.A2" office:value-type="string">
            <text:p text:style-name="P732"><text:span text:style-name="Symbol">GetAsUTCDateTime</text:span></text:p>
          </table:table-cell>
          <table:table-cell table:style-name="Table84.B2" office:value-type="string">
            <text:p text:style-name="P732">The date time is convert to UTC (GMT in this context) before being returned as the function value.</text:p>
          </table:table-cell>
        </table:table-row>
        <table:table-row>
          <table:table-cell table:style-name="Table84.A2" office:value-type="string">
            <text:p text:style-name="P732"><text:span text:style-name="Symbol">SetAsDateTimeTZ</text:span></text:p>
          </table:table-cell>
          <table:table-cell table:style-name="Table84.B2" office:value-type="string">
            <text:p text:style-name="P732">Sets the date time and time zone either by name or ID.</text:p>
          </table:table-cell>
        </table:table-row>
      </table:table>
      <text:p text:style-name="P622"/>
      <text:h text:style-name="P977" text:outline-level="4"><text:bookmark-start text:name="__RefHeading___Toc15680_148275515"/>TIBTimeField<text:bookmark-end text:name="__RefHeading___Toc15680_148275515"/></text:h>
      <text:p text:style-name="P624">This is a subclass of TIBDateTimeField and exists only to ensure that when rendered as a string, there is no (empty) date included in the string.</text:p>
      <text:h text:style-name="P850" text:outline-level="2"><text:bookmark-start text:name="__RefHeading___Toc23916_622456310"/>Query Statistics<text:bookmark-end text:name="__RefHeading___Toc23916_622456310"/></text:h>
      <text:p text:style-name="P331">TIBDataSet, TIBQuery and TIBTable can all return query statistics.</text:p>
      <text:h text:style-name="P929" text:outline-level="3"><text:bookmark-start text:name="__RefHeading___Toc15682_148275515"/>Select Query Statistics<text:bookmark-end text:name="__RefHeading___Toc15682_148275515"/></text:h>
      <text:p text:style-name="P604">The following are supported by <text:span text:style-name="T320">TIBDataSet, TIBQuery and TIBTable.</text:span></text:p>
      <text:p text:style-name="P332"><text:s text:c="4"/>function GetPerfStatistics(var stats: TPerfCounters): boolean;</text:p>
      <text:p text:style-name="P332"><text:s text:c="4"/>property EnableStatistics: boolean read FEnableStatistics write SetEnableStatistics;</text:p>
      <text:p text:style-name="P330">If EnableStatistics is true when a dataset is opened then performance statistics will be accumulated for the select query used to read the dataset from the database. <text:span text:style-name="T321">This is a published property and can be set at design time if required.</text:span></text:p>
      <text:p text:style-name="P330">The function GetPerfStatistics can be called at any time after the dataset has been opened and will return the accumulated select query statistics. The statistics are initialised after the dataset is <text:soft-page-break/>opened and then accumulate until the last record has been <text:span text:style-name="T337">fetched</text:span> from the dataset. The statistics counters returned are described in the Firebird Pascal API Guide <text:span text:style-name="T25">[</text:span><text:span text:style-name="T25"><text:bookmark-ref text:reference-format="number" text:ref-name="__RefNumPara__23913_622456310">6</text:bookmark-ref></text:span><text:span text:style-name="T25">]</text:span><text:span text:style-name="T29"> section 6.9.</text:span></text:p>
      <text:p text:style-name="P209">The function returns false if statistics have not be requested or the dataset is not open.</text:p>
      <text:h text:style-name="P929"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331">After changes to a dataset have been posted, or a row deleted, the GetRowsAffected function may be called to retrieve the affected rows counts. <text:span text:style-name="T321">These counts are updated after each such action.</text:span></text:p>
      <text:p text:style-name="P331">The function returns false if the dataset is closed.</text:p>
      <text:h text:style-name="P930" text:outline-level="3"><text:bookmark-start text:name="__RefHeading___Toc15686_148275515"/>GetRowsAffected for Select Queries<text:bookmark-end text:name="__RefHeading___Toc15686_148275515"/></text:h>
      <text:p text:style-name="P334">It is also possible to obtain the affected rows statistics for select queries if useful. IBX Datasets, <text:s/>also expose the select query statement handle as:</text:p>
      <text:p text:style-name="pascalcode">property SelectStmtHandle: IStatement <text:span text:style-name="T318">{TIBDataset and TIBTable)</text:span></text:p>
      <text:p text:style-name="P333">or</text:p>
      <text:p text:style-name="pascalcode">property StatementType: IStatement {TIBQuery}</text:p>
      <text:p text:style-name="P333">In turn, this offers direct assess to the IStatement GetRowsAffected method. <text:span text:style-name="T319">For example:</text:span></text:p>
      <text:p text:style-name="P749">var SelectCount, InsertCount, UpdateCount, DeleteCount: integer;</text:p>
      <text:p text:style-name="P749">begin</text:p>
      <text:p text:style-name="P749"><text:s text:c="2"/>with TIBQuery.Create(Application) do</text:p>
      <text:p text:style-name="P749"><text:s text:c="2"/>try</text:p>
      <text:p text:style-name="P749"><text:s text:c="4"/>Active := true;</text:p>
      <text:p text:style-name="P749"><text:s text:c="4"/>Last; {fetchall}</text:p>
      <text:p text:style-name="P749"><text:s text:c="4"/>if StmtHandle.GetRowsAffected(SelectCount, InsertCount, UpdateCount, DeleteCount) then</text:p>
      <text:p text:style-name="P749"><text:s text:c="5"/>begin</text:p>
      <text:p text:style-name="P749"><text:s text:c="7"/>writeln('Selects = ',SelectCount);</text:p>
      <text:p text:style-name="P749"><text:s text:c="7"/>writeln('Inserts = ',InsertCount);</text:p>
      <text:p text:style-name="P749"><text:s text:c="7"/>writeln('Updates = ',UpdateCount);</text:p>
      <text:p text:style-name="P749"><text:s text:c="7"/>writeln('Deletes = ',DeleteCount);</text:p>
      <text:p text:style-name="P749"><text:s text:c="5"/>end;</text:p>
      <text:p text:style-name="P749"><text:s text:c="2"/>finally</text:p>
      <text:p text:style-name="P749"><text:s text:c="4"/>Free</text:p>
      <text:p text:style-name="P749"><text:s text:c="2"/>end;</text:p>
      <text:p text:style-name="P749">end;</text:p>
      <text:h text:style-name="P851" text:outline-level="2"><text:bookmark-start text:name="__RefHeading___Toc15093_562995282"/>User Permissions<text:bookmark-end text:name="__RefHeading___Toc15093_562995282"/></text:h>
      <text:p text:style-name="P400">IBX assumes that the logged on user has the appropriate permissions to perform the requested SQL queries.</text:p>
      <text:list text:style-name="L66">
        <text:list-item>
          <text:p text:style-name="P1091">When using TIBTable, <text:span text:style-name="T350">the user must have Select, Insert, Update, References and Delete privileges on the </text:span>named<text:span text:style-name="T350"> </text:span>database Table. <text:span text:style-name="T350">If the user does not have sufficient privilege for any of the above, then an exception is raised when the dataset is opened.</text:span></text:p>
        </text:list-item>
        <text:list-item>
          <text:p text:style-name="P1092">When using TIBDataSet, the user must have Select, Insert, Update, References and Delete privileges on the database objects identified in the respective, Select, Refresh, Insert, <text:soft-page-break/>Modify and Delete queries. If the user does not have sufficient privilege for any of the above, then an exception is raised when the dataset is opened.</text:p>
        </text:list-item>
      </text:list>
      <text:p text:style-name="P399"><text:span text:style-name="T359">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51">a row in </text:span>the dataset will fail – but then the user was not allowed to do this <text:span text:style-name="T352">in the first place</text:span>,</text:p>
      <text:list text:style-name="L67">
        <text:list-item>
          <text:p text:style-name="P1093">When using TIBQuery, the user must have the select privilege on the database objects contained in the SQL query. If the user does not have <text:span text:style-name="T351">the Select Privilege</text:span>, then an exception is raised when the dataset is opened.</text:p>
        </text:list-item>
        <text:list-item>
          <text:p text:style-name="P1094">When using TIBUpdateSQL, the user must have the <text:span text:style-name="T350">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50"> the dataset </text:span>are posted, or a row is deleted, respectively. </text:p>
        </text:list-item>
      </text:list>
      <text:p text:style-name="P401">An important difference when using TIBQuery/T<text:span text:style-name="T359">U</text:span>pdateSQL, instead of TIBDataSet, is that in the former case, the dataset may be opened even when an <text:span text:style-name="T35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401">The use of TIBQuery/TUpdateSQL instead of TIBDataSet is thus preferred when developing an application for multiple users with different access rights.</text:p>
      <text:list text:style-name="L68">
        <text:list-item>
          <text:p text:style-name="P1146">When using TIBStoredProc, the user must have the Execute privilege on the named procedure.</text:p>
        </text:list-item>
      </text:list>
      <text:h text:style-name="P81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51">TIBXScript script engine runs an SQL script from a file or stream. The text is parsed into SQL statements which are executed in turn. The intention is to be compatible <text:span text:style-name="T195">with Firebird's </text:span>ISQL <text:span text:style-name="T195">command line utility,</text:span> but with extensions:</text:p>
      <text:list text:style-name="L69">
        <text:list-item>
          <text:p text:style-name="P1147">All DML and DDL Statements are supported.</text:p>
        </text:list-item>
        <text:list-item>
          <text:p text:style-name="P1147">CREATE DATABASE, DROP DATABASE, CONNECT and COMMIT are supported.</text:p>
        </text:list-item>
        <text:list-item>
          <text:p text:style-name="P1147">The following SET statements are supported:</text:p>
          <text:list>
            <text:list-item>
              <text:p text:style-name="P1148">SET SQL DIALECT</text:p>
            </text:list-item>
            <text:list-item>
              <text:p text:style-name="P1149">SET TERM</text:p>
            </text:list-item>
            <text:list-item>
              <text:p text:style-name="P1149">SET AUTODDL</text:p>
            </text:list-item>
            <text:list-item>
              <text:p text:style-name="P1149">SET BAIL</text:p>
            </text:list-item>
            <text:list-item>
              <text:p text:style-name="P1149">SET ECHO</text:p>
            </text:list-item>
            <text:list-item>
              <text:p text:style-name="P1149">SET COUNT</text:p>
            </text:list-item>
            <text:list-item>
              <text:p text:style-name="P1149">SET STATS</text:p>
            </text:list-item>
            <text:list-item>
              <text:p text:style-name="P1149">SET NAMES &lt;character set&gt; </text:p>
            </text:list-item>
            <text:list-item>
              <text:p text:style-name="P1150">SET GENERATOR</text:p>
            </text:list-item>
          </text:list>
        </text:list-item>
        <text:list-item>
          <text:p text:style-name="P1151">New Command: RECONNECT. Performs a commit followed by disconnecting and reconnecting to the database <text:span text:style-name="T339">(calls TIBDatabase.Reconnect – see </text:span><text:span text:style-name="T339"><text:bookmark-ref text:reference-format="number" text:ref-name="__RefHeading___Toc13953_1132224903">5.1.7</text:bookmark-ref></text:span><text:span text:style-name="T339">)</text:span>.</text:p>
        </text:list-item>
        <text:list-item>
          <text:p text:style-name="P1151">Procedure Bodies (BEGIN .. END blocks) are self-<text:span text:style-name="T61">delimiting</text:span> and do not need an extra terminator. If a terminator is present, this is treated as an empty statement. The result is ISQL compatible, but does not require the use of SET TERM.</text:p>
        </text:list-item>
        <text:list-item>
          <text:p text:style-name="P115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47">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43">ed</text:span> by TIBExtract (see <text:bookmark-ref text:reference-format="number" text:ref-name="__RefHeading__24778_1844166745">7.6</text:bookmark-ref>) are supported.</text:p>
        </text:list-item>
        <text:list-item>
          <text:p text:style-name="P1152">C++ style comment lines.</text:p>
        </text:list-item>
      </text:list>
      <text:p text:style-name="P153">Select SQL statements are not directly supported but can be handled by:</text:p>
      <text:list text:style-name="L70">
        <text:list-item>
          <text:p text:style-name="P1153">An external handler (OnSelectSQL event). </text:p>
        </text:list-item>
        <text:list-item>
          <text:p text:style-name="P1153">A DataOutputFormatter. This formats the dataset returned by the select statement and writes the result to the Output Log.</text:p>
        </text:list-item>
      </text:list>
      <text:p text:style-name="P248">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212"><text:span text:style-name="Symbol">Database</text:span></text:p>
          </table:table-cell>
          <table:table-cell table:style-name="Table43.B1" office:value-type="string">
            <text:p text:style-name="Table_20_Contents">Link to <text:span text:style-name="T195">a</text:span> <text:span text:style-name="Symbol">TIBDatabase</text:span> component</text:p>
          </table:table-cell>
        </table:table-row>
        <table:table-row>
          <table:table-cell table:style-name="Table43.A2" office:value-type="string">
            <text:p text:style-name="P212"><text:span text:style-name="Symbol">Transaction</text:span></text:p>
          </table:table-cell>
          <table:table-cell table:style-name="Table43.B2" office:value-type="string">
            <text:p text:style-name="Table_20_Contents">Link to <text:span text:style-name="T195">a </text:span><text:span text:style-name="Symbol"><text:span text:style-name="T195">TIB</text:span></text:span><text:span text:style-name="Symbol">Transaction</text:span>. Defaults to internal transaction (concurrency, wait)</text:p>
          </table:table-cell>
        </table:table-row>
        <table:table-row>
          <table:table-cell table:style-name="Table43.A2" office:value-type="string">
            <text:p text:style-name="P213"><text:span text:style-name="Symbol">AutoDDL</text:span></text:p>
          </table:table-cell>
          <table:table-cell table:style-name="Table43.B2" office:value-type="string">
            <text:p text:style-name="P689">When true, DDL statements are always committed after execution</text:p>
          </table:table-cell>
        </table:table-row>
        <table:table-row>
          <table:table-cell table:style-name="Table43.A2" office:value-type="string">
            <text:p text:style-name="P212"><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21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21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220"><text:span text:style-name="Symbol">IgnoreCreateDatabase</text:span></text:p>
          </table:table-cell>
          <table:table-cell table:style-name="Table43.B2" office:value-type="string">
            <text:p text:style-name="P610">When true, any CREATE DATABASE statements are silently discarded.</text:p>
          </table:table-cell>
        </table:table-row>
        <table:table-row>
          <table:table-cell table:style-name="Table43.A2" office:value-type="string">
            <text:p text:style-name="P213"><text:span text:style-name="Symbol">ShowAffectedRows</text:span></text:p>
          </table:table-cell>
          <table:table-cell table:style-name="Table43.B2" office:value-type="string">
            <text:p text:style-name="P689">When true, the number of affected rows is written to the log after a DML statement is executed.</text:p>
          </table:table-cell>
        </table:table-row>
        <table:table-row>
          <table:table-cell table:style-name="Table43.A2" office:value-type="string">
            <text:p text:style-name="P213"><text:span text:style-name="Symbol">ShowPerformanceStats</text:span></text:p>
          </table:table-cell>
          <table:table-cell table:style-name="Table43.B2" office:value-type="string">
            <text:p text:style-name="P689">When true, performance statistics (in ISQL format) are written to the log after a DML statement is executed.</text:p>
          </table:table-cell>
        </table:table-row>
        <table:table-row>
          <table:table-cell table:style-name="Table43.A2" office:value-type="string">
            <text:p text:style-name="P213"><text:span text:style-name="Symbol">DataOutputFormatter</text:span></text:p>
          </table:table-cell>
          <table:table-cell table:style-name="Table43.B2" office:value-type="string">
            <text:p text:style-name="P689">Identifies a Data Output Formatter component used to format the results of executing a Select Statement.</text:p>
          </table:table-cell>
        </table:table-row>
      </table:table>
      <text:p text:style-name="Text_20_body"/>
      <text:h text:style-name="P931"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table-cell table:style-name="Table44.A1" office:value-type="string">
            <text:p text:style-name="P202"><text:span text:style-name="Symbol">GetParamValue</text:span></text:p>
          </table:table-cell>
          <table:table-cell table:style-name="Table44.B1" office:value-type="string">
            <text:p text:style-name="P358">called when an SQL parameter is found (in PSQL :name format). This is only called for blob fields. Handler should return the BlobID to be used as the parameter value. If not present an exception is raised when a parameter is found.</text:p>
            <text:p text:style-name="Text_20_body">Hint: use TIBBlobStream to create and read the blob from a file.</text:p>
          </table:table-cell>
        </table:table-row>
        <table:table-row>
          <table:table-cell table:style-name="Table44.A2" office:value-type="string">
            <text:p text:style-name="P202"><text:span text:style-name="Symbol">OnOutputLog</text:span></text:p>
          </table:table-cell>
          <table:table-cell table:style-name="Table44.B2" office:value-type="string">
            <text:p text:style-name="P150">Called to write SQL Statements to the log (stdout)</text:p>
          </table:table-cell>
        </table:table-row>
        <table:table-row>
          <table:table-cell table:style-name="Table44.A2" office:value-type="string">
            <text:p text:style-name="P202"><text:span text:style-name="Symbol">OnErrorLog</text:span></text:p>
          </table:table-cell>
          <table:table-cell table:style-name="Table44.B2" office:value-type="string">
            <text:p text:style-name="P150">Called to write all other messages to the log (stderr)</text:p>
          </table:table-cell>
        </table:table-row>
        <table:table-row>
          <table:table-cell table:style-name="Table44.A2" office:value-type="string">
            <text:p text:style-name="P202"><text:span text:style-name="Symbol">OnProgressEvent</text:span></text:p>
          </table:table-cell>
          <table:table-cell table:style-name="Table44.B2" office:value-type="string">
            <text:p text:style-name="P150">Progress bar support. If Reset is true the value is maximum value of progress bar. Otherwise called to step progress bar.</text:p>
          </table:table-cell>
        </table:table-row>
        <table:table-row>
          <table:table-cell table:style-name="Table44.A2" office:value-type="string">
            <text:p text:style-name="P202"><text:span text:style-name="Symbol">OnSelectSQL</text:span></text:p>
          </table:table-cell>
          <table:table-cell table:style-name="Table44.B2" office:value-type="string">
            <text:p text:style-name="P152">handler for select SQL statements. If not present, <text:span text:style-name="T214">then the DataOutputFormatter is used to process </text:span>select SQL statements. <text:span text:style-name="T214">If neither an OnSelect Handler or a DataOutputFormatter is defined then select statements.</text:span> result in an exception. </text:p>
            <text:p text:style-name="P23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207"><text:span text:style-name="Symbol">OnSetStatement</text:span></text:p>
          </table:table-cell>
          <table:table-cell table:style-name="Table44.B2" office:value-type="string">
            <text:p text:style-name="P229">Handler for unrecognised SET Statements.</text:p>
          </table:table-cell>
        </table:table-row>
        <table:table-row>
          <table:table-cell table:style-name="Table44.A2" office:value-type="string">
            <text:p text:style-name="P208"><text:span text:style-name="Symbol">OnCreateDatabase</text:span></text:p>
          </table:table-cell>
          <table:table-cell table:style-name="Table44.B2" office:value-type="string">
            <text:p text:style-name="P242">This event is called immediately prior to executing a Create Database SQL statement. <text:span text:style-name="T244">For example, i</text:span>t gives an opportunity to review the filename given for the database and to replace it with an alternative.</text:p>
          </table:table-cell>
        </table:table-row>
      </table:table>
      <text:p text:style-name="Text_20_body"/>
      <text:h text:style-name="P932" text:outline-level="3"><text:bookmark-start text:name="__RefHeading___Toc15690_148275515"/>Usage<text:bookmark-end text:name="__RefHeading___Toc15690_148275515"/></text:h>
      <text:p text:style-name="P233">The following TIBXScript functions may be used to execute an SQL statement or script:</text:p>
      <text:p text:style-name="P234"><text:s text:c="4"/>function RunScript(SQLFile: string): boolean; overload;</text:p>
      <text:p text:style-name="P234"><text:s text:c="4"/>function RunScript(SQLStream: TStream): boolean; overload;</text:p>
      <text:p text:style-name="P234"><text:s text:c="4"/>function RunScript(SQLLines: TStrings): boolean; overload;</text:p>
      <text:p text:style-name="P234"><text:s text:c="4"/>function ExecSQLScript(sql: string): boolean;</text:p>
      <text:p text:style-name="P232">An SQL script may be passed as a File, a stream, a T<text:span text:style-name="T215">S</text:span>trings or <text:span text:style-name="T21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33" text:outline-level="3"><text:bookmark-start text:name="__RefHeading___Toc15167_623318093"/>Processing a Create Database Statement<text:bookmark-end text:name="__RefHeading___Toc15167_623318093"/></text:h>
      <text:p text:style-name="P609">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54">filespec” (see </text:span><text:span text:style-name="T27">[</text:span><text:span text:style-name="T27"><text:bookmark-ref text:reference-format="number" text:ref-name="__RefNumPara__14759_623318093">2</text:bookmark-ref></text:span><text:span text:style-name="T27">]</text:span><text:span text:style-name="T41">)</text:span> taken from the original database <text:span text:style-name="T354">connect string (DatabaseName property)</text:span> and the user name and password from the TIBDatabase referenced from the TIBXScript.</text:p>
      <text:p text:style-name="Standard"><text:span text:style-name="T353">The </text:span><text:span text:style-name="Symbol"><text:span text:style-name="T40">OnCreateDatabase is</text:span></text:span> <text:span text:style-name="T353">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54">Two example programs are provided in the “ibx/examples<text:span text:style-name="T195">”</text:span> directory that illustrate the use of <text:span text:style-name="Symbol">TIBXScript</text:span> in both GUI and console mode. These are:</text:p>
      <text:list text:style-name="L71">
        <text:list-item>
          <text:p text:style-name="P1154"><text:a xlink:type="simple" xlink:href="#1.3.1.The Script Engine Example|outline" text:style-name="Internet_20_link" text:visited-style-name="Visited_20_Internet_20_Link">ibx/examples/scriptengine</text:a></text:p>
        </text:list-item>
        <text:list-item>
          <text:p text:style-name="P1154"><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54">This example application illustrates use of the TIBXScript SQL script engine. It works with the example employee database and <text:span text:style-name="T61">comes </text:span>with various test scripts to illustrate how it works. These are all located in the "tests" directory. </text:p>
      <text:p text:style-name="P15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5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54">The test scripts are loaded in the left hand text box by clicking on the "Load Script" button. The <text:span text:style-name="T244">provided </text:span>scripts are: </text:p>
      <text:p text:style-name="P157">1. CreateCountriesTable.sql </text:p>
      <text:p text:style-name="P154">This adds a new table "COUNTRIES" to the employee database and then populates it with country data including the country name and ISO2 and 3 character short names. <text:span text:style-name="T61">At the end of the script, the contents of the new table are displayed.</text:span></text:p>
      <text:p text:style-name="P156">2. CreateCountriesTablewithError.sql </text:p>
      <text:p text:style-name="P154">This does the same as the above, except that the first insert statement <text:span text:style-name="T62">contains</text:span> a syntax error. It may be used to experiment with the "Stop on First Error" checkbox, and shows how the script engine can recover and continue from (some) syntax errors. </text:p>
      <text:p text:style-name="P156">3. DeptListView.sql </text:p>
      <text:p text:style-name="P154">This script adds a complex View to the database and tests the script engine in complex scenarios, such as recursive queries. </text:p>
      <text:p text:style-name="P156">4. createproc.sql </text:p>
      <text:p text:style-name="P154"><text:soft-page-break/>This script adds three simple stored procedures. It demonstrates the different ways that procedure bodies can be declared (ISQL compatible, standard terminator and no terminator). Use of comments is also demonstrated. </text:p>
      <text:p text:style-name="P156">5. ParameterisedQueries.sql </text:p>
      <text:p text:style-name="P154">This script demonstrates the use of <text:span text:style-name="T62">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54">You should locate and return the "flag_en.png" file. </text:p>
      <text:p text:style-name="P15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56">6. Reverseall.sql </text:p>
      <text:p text:style-name="P154">Reverses out the above. </text:p>
      <text:p text:style-name="P156">7. SelectQuery.sql </text:p>
      <text:p text:style-name="P154">Illustrates handling of select queries. </text:p>
      <text:h text:style-name="P934" text:outline-level="3"><text:bookmark-start text:name="__RefHeading___Toc15696_148275515"/>The fbsql Console Mode Application<text:bookmark-end text:name="__RefHeading___Toc15696_148275515"/></text:h>
      <text:p text:style-name="P168"><text:span text:style-name="T12">fbsql</text:span> is more than just a simple example and is an ISQL replacement console mode program for <text:span text:style-name="T213">both interactive and </text:span>non-interactive use. fbsql uses <text:span text:style-name="Symbol">TIBXScript</text:span> as its SQL Script Engine and <text:span text:style-name="Symbol">TIBExtract</text:span> <text:span text:style-name="T195">(See </text:span><text:span text:style-name="T195"><text:bookmark-ref text:reference-format="number" text:ref-name="__RefHeading__24778_1844166745">7.6</text:bookmark-ref></text:span><text:span text:style-name="T195">) </text:span>to extract metadata from the database. Select queries are handled by by outputing the query results to <text:span text:style-name="T12">stdout</text:span> in CSV format suitable for loading into a spreadsheet, <text:span text:style-name="T213">as insert statements, or in a block format</text:span>. <text:span text:style-name="T215">It also includes an interactive version of TIBXScript.</text:span></text:p>
      <text:p text:style-name="P167">Usage: fbsql &lt;options&gt; &lt;database name&gt;</text:p>
      <text:p text:style-name="P42">O<text:span text:style-name="T63">ptions:</text:span></text:p>
      <text:p text:style-name="P39">-a <text:s text:c="11"/>write database metadata to stdout</text:p>
      <text:p text:style-name="P39">-A <text:s text:c="11"/>write database metadata and table data to stdout</text:p>
      <text:p text:style-name="P39">-b <text:s text:c="11"/>stop on first error</text:p>
      <text:p text:style-name="P39">-e <text:s text:c="11"/>echo sql statements to stdout</text:p>
      <text:p text:style-name="P39">-i &lt;filename&gt; execute SQL script from file</text:p>
      <text:p text:style-name="P39">-h <text:s text:c="11"/>show this information</text:p>
      <text:p text:style-name="P39">-o &lt;filename&gt; output to this file instead of stdout</text:p>
      <text:p text:style-name="P39">-p &lt;password&gt; provide password on command line (insecure)</text:p>
      <text:p text:style-name="P39">-r &lt;rolename&gt; open database with this rolename</text:p>
      <text:p text:style-name="P39">-s &lt;sql&gt; <text:s text:c="5"/>Execute SQL text</text:p>
      <text:p text:style-name="P39">-t <text:s text:c="11"/>specify output format for SQL Statements</text:p>
      <text:p text:style-name="P39"><text:s text:c="14"/>BLK (default) for block format</text:p>
      <text:p text:style-name="P39"><text:s text:c="14"/>CSV (default) for CSV format</text:p>
      <text:p text:style-name="P39"><text:s text:c="14"/>INS (default) for Insert Statement format</text:p>
      <text:p text:style-name="P39">-u &lt;username&gt; open database with this username (defaults to SYSDBA)</text:p>
      <text:p text:style-name="P167"/>
      <text:p text:style-name="P37"><text:soft-page-break/>Environment Variables:</text:p>
      <text:p text:style-name="P37">ISC_USER <text:s text:c="5"/>Login user Name</text:p>
      <text:p text:style-name="P37">ISC_PASSWORD <text:s/>Login password</text:p>
      <text:p text:style-name="P167">Saving the username and/or password as environment variables avoids having to enter them on the command line and is a more secure means of provding the password.</text:p>
      <text:p text:style-name="P230">If no password is provided on the command line or through the environment, then the user is prompted for a password to be entered securely.</text:p>
      <text:p text:style-name="P230">If neither an "-s" or a "-i" option is provided on the command line, then fbsql runs interactively.</text:p>
      <text:p text:style-name="P167"><text:span text:style-name="T24">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230">SQL Statements Supported</text:p>
      <text:list text:style-name="L72">
        <text:list-item>
          <text:p text:style-name="P1155">All DML and DDL Statements are supported.</text:p>
        </text:list-item>
        <text:list-item>
          <text:p text:style-name="P1155">CREATE DATABASE, DROP DATABASE, CONNECT and COMMIT are supported.</text:p>
        </text:list-item>
        <text:list-item>
          <text:p text:style-name="P1155">Additionally, RECONNECT is interpreted as dropping the connection and reconnecting.</text:p>
        </text:list-item>
      </text:list>
      <text:p text:style-name="P231">ISQL Command Support</text:p>
      <text:list text:style-name="L73">
        <text:list-item>
          <text:p text:style-name="P1156">SET SQL DIALECT</text:p>
        </text:list-item>
        <text:list-item>
          <text:p text:style-name="P1156">SET TERM</text:p>
        </text:list-item>
        <text:list-item>
          <text:p text:style-name="P1156">SET AUTODDL</text:p>
        </text:list-item>
        <text:list-item>
          <text:p text:style-name="P1156">SET BAIL</text:p>
        </text:list-item>
        <text:list-item>
          <text:p text:style-name="P1156">SET ECHO</text:p>
        </text:list-item>
        <text:list-item>
          <text:p text:style-name="P1156">SET COUNT</text:p>
        </text:list-item>
        <text:list-item>
          <text:p text:style-name="P1156">SET STATS</text:p>
        </text:list-item>
        <text:list-item>
          <text:p text:style-name="P1156">SET NAMES &lt;character set&gt;</text:p>
        </text:list-item>
        <text:list-item>
          <text:p text:style-name="P1156">SET HEADING</text:p>
        </text:list-item>
        <text:list-item>
          <text:p text:style-name="P1156">SET ROWCOUNT</text:p>
        </text:list-item>
        <text:list-item>
          <text:p text:style-name="P1156">SET PLAN</text:p>
        </text:list-item>
        <text:list-item>
          <text:p text:style-name="P1156">SET PLAN ONLY</text:p>
        </text:list-item>
        <text:list-item>
          <text:p text:style-name="P1156">QUIT</text:p>
        </text:list-item>
        <text:list-item>
          <text:p text:style-name="P1156">EXIT</text:p>
        </text:list-item>
      </text:list>
      <text:p text:style-name="P167">To use, compile the program in the Lazarus IDE and run it from the command line. <text:span text:style-name="T215">See above for</text:span> the command line parameters. For example:</text:p>
      <text:p text:style-name="P36">fbsql -a -u SYSDBA -p masterkey employee</text:p>
      <text:p text:style-name="P167">will write out the metadata for the local employee database to <text:span text:style-name="T12">stdout</text:span> (assuming default password).</text:p>
      <text:p text:style-name="P38">fbsql -A -u SYSDBA -p masterkey -o employeedump.sql employee</text:p>
      <text:p text:style-name="P230">will dump the employee database, <text:span text:style-name="T215">include data, </text:span>to a text file (employeedump.sql).</text:p>
      <text:p text:style-name="P38">fbsql -u SYSDBA -p masterkey -i employeedump.sql</text:p>
      <text:p text:style-name="P230">will recreate the database dumped in the file "employeedump.sql". Note that the "CREATE DATABASE" statement is at the start of this file and should be edited to identify the database file that is to be created. Alternatively,</text:p>
      <text:p text:style-name="P38"><text:soft-page-break/>fbsql -u SYSDBA -p masterkey -i employeedump.sql new-employee.fdb</text:p>
      <text:p text:style-name="P230">will restore the database to the database file 'new-employee.fdb' provided that it has already been created as an empty database. Note that in this case, the "CREATE DATABASE" statement should remain commented out.</text:p>
      <text:p text:style-name="P36">fbsql -s "Select * From EMPLOYEE" -u SYSDBA -p masterkey employee</text:p>
      <text:p text:style-name="P167">will write out the contents of the EMPLOYEE table in the local employee database to stdout (assuming default password).</text:p>
      <text:p text:style-name="P36">fbsql -b -e ../scriptengine/tests/CreateCountriesTable.sql -u SYSDBA -p masterkey employee</text:p>
      <text:p text:style-name="P167">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67">cd to the example directory "ibx/examples/fbsql"</text:p>
      <text:p text:style-name="P167">run the program as "./fbsql" e.g.</text:p>
      <text:p text:style-name="P36">./fbsql -a -u SYSDBA -p masterkey employee</text:p>
      <text:h text:style-name="P852" text:outline-level="2"><text:bookmark-start text:name="__RefHeading___Toc10934_867646742"/>The Data Output Formatters<text:bookmark-end text:name="__RefHeading___Toc10934_867646742"/></text:h>
      <text:p text:style-name="P237">These are helper components, primarily for use with TIBXScript, but which are also used by TIBExt<text:span text:style-name="T220">r</text:span>act (for formatting data as SQL Insert statements). Their purpose is to execute SQL SELECT statements and to format the results of the query. Data Output Formatters are currently available for:</text:p>
      <text:list text:style-name="L74">
        <text:list-item>
          <text:p text:style-name="P1095">Block Format Output <text:tab/>(TIBBlockFormatOut)</text:p>
        </text:list-item>
        <text:list-item>
          <text:p text:style-name="P1096">CSV Format <text:tab/>(TIBCSVDataOut)</text:p>
        </text:list-item>
        <text:list-item>
          <text:p text:style-name="P1097">SQL Insert Statements <text:tab/>(TIBInsertStmtsOut).</text:p>
        </text:list-item>
      </text:list>
      <text:h text:style-name="P935" text:outline-level="3"><text:bookmark-start text:name="__RefHeading___Toc15698_148275515"/>Usage<text:bookmark-end text:name="__RefHeading___Toc15698_148275515"/></text:h>
      <text:p text:style-name="P237">For use with IBXScript: simply drop the appropriate component on to your form and link the TIBXScript DataOutputFormatter property to the required Data Output Formatter.</text:p>
      <text:p text:style-name="P237">The Data Output Formatters may also be used directly. The properties listed below apply. All components support the following methods:</text:p>
      <text:p text:style-name="P239"><text:s text:c="4"/>procedure Assign(Source: TPersistent); override;</text:p>
      <text:p text:style-name="P239"><text:s text:c="4"/>procedure DataOut(SelectQuery: string; Add2Log: TAdd2Log);</text:p>
      <text:p text:style-name="P239"><text:s text:c="4"/>procedure SetCommand(command, aValue, stmt: string; var Done: boolean); virtual;</text:p>
      <text:p text:style-name="P239"><text:s text:c="4"/>class procedure ShowPerfStats(Statement: IStatement; Add2Log: TAdd2Log);</text:p>
      <text:p text:style-name="P236"><text:span text:style-name="Symbol">Assign</text:span>: is used to copy the properties from one component to another.</text:p>
      <text:p text:style-name="P236"><text:span text:style-name="Symbol">DataOut</text:span>: executes the supplied query. It formats the results as one or more lines and returns each line by calling the supplied “Add2Log” event handler.</text:p>
      <text:p text:style-name="P236"><text:soft-page-break/><text:span text:style-name="Symbol">SetCommand</text:span>: is used by TIBXScript <text:s/>to extend the processing of SET commands to the Data Output Formatter. SET (HEADING | ROWCOUNT | PLAN | PLANON<text:span text:style-name="T245">L</text:span>Y) commands are <text:span text:style-name="T218">handled</text:span> this way.</text:p>
      <text:p text:style-name="Text_20_body"><text:span text:style-name="Symbol">ShowPerfStats</text:span>: <text:span text:style-name="T217">is a common utility function used to format IStatement performance statistics in an ISQL compatiable fashion.</text:span></text:p>
      <text:h text:style-name="P935"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table-cell table:style-name="Table47.A1" office:value-type="string">
            <text:p text:style-name="P215"><text:span text:style-name="Symbol">Database</text:span></text:p>
          </table:table-cell>
          <table:table-cell table:style-name="Table47.B1" office:value-type="string">
            <text:p text:style-name="P690">Link to <text:span text:style-name="T195">a</text:span> <text:span text:style-name="Symbol">TIBDatabase</text:span> component</text:p>
          </table:table-cell>
        </table:table-row>
        <table:table-row>
          <table:table-cell table:style-name="Table47.A2" office:value-type="string">
            <text:p text:style-name="P215"><text:span text:style-name="Symbol">Transaction</text:span></text:p>
          </table:table-cell>
          <table:table-cell table:style-name="Table47.B2" office:value-type="string">
            <text:p text:style-name="P690">Link to <text:span text:style-name="T195">a </text:span><text:span text:style-name="Symbol"><text:span text:style-name="T195">TIB</text:span></text:span><text:span text:style-name="Symbol">Transaction</text:span>. Defaults to internal transaction (concurrency, wait)</text:p>
          </table:table-cell>
        </table:table-row>
        <table:table-row>
          <table:table-cell table:style-name="Table47.A2" office:value-type="string">
            <text:p text:style-name="P214"><text:span text:style-name="Symbol"><text:span text:style-name="T217">PlanOptions</text:span></text:span></text:p>
          </table:table-cell>
          <table:table-cell table:style-name="Table47.B2" office:value-type="string">
            <text:p text:style-name="P238">Determines whether the execution plan is returned instead of, with, or not at all, when the query results are formatted.</text:p>
          </table:table-cell>
        </table:table-row>
        <table:table-row>
          <table:table-cell table:style-name="Table47.A2" office:value-type="string">
            <text:p text:style-name="P216"><text:span text:style-name="Symbol">RowCount</text:span></text:p>
          </table:table-cell>
          <table:table-cell table:style-name="Table47.B2" office:value-type="string">
            <text:p text:style-name="P238">When non-zero, limits the number of output rows.</text:p>
          </table:table-cell>
        </table:table-row>
        <table:table-row>
          <table:table-cell table:style-name="Table47.A2" office:value-type="string">
            <text:p text:style-name="P217"><text:span text:style-name="Symbol">ShowPerformanceStats</text:span></text:p>
          </table:table-cell>
          <table:table-cell table:style-name="Table47.B2" office:value-type="string">
            <text:p text:style-name="P691">When true, ISQL compatible Performance Statistics are included after the query results.</text:p>
          </table:table-cell>
        </table:table-row>
        <table:table-row>
          <table:table-cell table:style-name="Table47.A2" office:value-type="string">
            <text:p text:style-name="P217"><text:span text:style-name="Symbol">IncludeHeader</text:span></text:p>
          </table:table-cell>
          <table:table-cell table:style-name="Table47.B2" office:value-type="string">
            <text:p text:style-name="P691">When true, a header row is included in the results (CSV and Block Formats only).</text:p>
          </table:table-cell>
        </table:table-row>
        <table:table-row>
          <table:table-cell table:style-name="Table47.A2" office:value-type="string">
            <text:p text:style-name="P217"><text:span text:style-name="Symbol">QuoteChar</text:span></text:p>
          </table:table-cell>
          <table:table-cell table:style-name="Table47.B2" office:value-type="string">
            <text:p text:style-name="P691">Character used to delimit text in CSV format output (defaults to single quotes).</text:p>
          </table:table-cell>
        </table:table-row>
        <table:table-row>
          <table:table-cell table:style-name="Table47.A2" office:value-type="string">
            <text:p text:style-name="P218"><text:span text:style-name="Symbol">QuoteStrings</text:span></text:p>
          </table:table-cell>
          <table:table-cell table:style-name="Table47.B2" office:value-type="string">
            <text:p text:style-name="P729">If false then strings are in CSV format are unquoted, otherwise, the QuoteChar property value is used to delimit each and every string in the output. </text:p>
          </table:table-cell>
        </table:table-row>
        <table:table-row>
          <table:table-cell table:style-name="Table47.A2" office:value-type="string">
            <text:p text:style-name="P217"><text:span text:style-name="Symbol">IncludeBlobsAndArrays</text:span></text:p>
          </table:table-cell>
          <table:table-cell table:style-name="Table47.B2" office:value-type="string">
            <text:p text:style-name="P691">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table-cell table:style-name="Table47.A2" office:value-type="string">
            <text:p text:style-name="P218"><text:span text:style-name="Symbol">FieldSeparator</text:span></text:p>
          </table:table-cell>
          <table:table-cell table:style-name="Table47.B2" office:value-type="string">
            <text:p text:style-name="P729">The separator character(s) used to separate fields in data rows. <text:s/>Defaults to ','. (CSV format only)</text:p>
          </table:table-cell>
        </table:table-row>
        <table:table-row>
          <table:table-cell table:style-name="Table47.A2" office:value-type="string">
            <text:p text:style-name="P218"><text:span text:style-name="Symbol">HeaderSeparator</text:span></text:p>
          </table:table-cell>
          <table:table-cell table:style-name="Table47.B2" office:value-type="string">
            <text:p text:style-name="P729">The separator character(s) used to separate fields in header rows. <text:s/>Defaults to ','. (CSV format only)</text:p>
          </table:table-cell>
        </table:table-row>
        <table:table-row>
          <table:table-cell table:style-name="Table47.A2" office:value-type="string">
            <text:p text:style-name="P218"><text:span text:style-name="Symbol">TimestampFormat</text:span></text:p>
          </table:table-cell>
          <table:table-cell table:style-name="Table47.B2" office:value-type="string">
            <text:p text:style-name="P729">The date time format templates for the SQL type: TIMESTAMP.</text:p>
            <text:p text:style-name="P729">The format string uses the standard FPC date/time format characters. If <text:s/>set to an empty string, then the locale default is used. This uses the ShortDateFormat and the LongTimeFormat. The locale default LongTimeFormat <text:s/>is extended by appending '.zzz' to include milliseconds.</text:p>
            <text:p text:style-name="P729">Note: the CSV Formatter by default sets this property to the empty <text:soft-page-break/>string.</text:p>
          </table:table-cell>
        </table:table-row>
        <table:table-row>
          <table:table-cell table:style-name="Table47.A2" office:value-type="string">
            <text:p text:style-name="P218"><text:span text:style-name="Symbol">DateFormat</text:span></text:p>
          </table:table-cell>
          <table:table-cell table:style-name="Table47.B2" office:value-type="string">
            <text:p text:style-name="P729">The date time format templates for the SQL type: DATE.</text:p>
            <text:p text:style-name="P729">The format string uses the standard FPC date/time format <text:s text:c="2"/>characters. If <text:s/>set to an empty string, then the locale default is used. This uses the ShortDateFormat.</text:p>
            <text:p text:style-name="P729">Note: the CSV Formatter by default sets this property to the empty string.</text:p>
          </table:table-cell>
        </table:table-row>
        <table:table-row>
          <table:table-cell table:style-name="Table47.A2" office:value-type="string">
            <text:p text:style-name="P218"><text:span text:style-name="Symbol">TimeFormat</text:span></text:p>
          </table:table-cell>
          <table:table-cell table:style-name="Table47.B2" office:value-type="string">
            <text:p text:style-name="P729">The date time format templates for the SQL type: TIME.</text:p>
            <text:p text:style-name="P729">The format string uses the standard FPC date/time format <text:s text:c="2"/>characters. If <text:s/>set to an empty string, then the locale default is used. This uses the LongTimeFormat.</text:p>
            <text:p text:style-name="P729">Note: the CSV Formatter by default sets this property to the empty string.</text:p>
          </table:table-cell>
        </table:table-row>
      </table:table>
      <text:p text:style-name="Text_20_body"/>
      <text:h text:style-name="P936"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table-cell table:style-name="Table81.A1" office:value-type="string">
            <text:p text:style-name="P219"><text:span text:style-name="Symbol"><text:span text:style-name="T349">OnFormatTextString</text:span></text:span></text:p>
          </table:table-cell>
          <table:table-cell table:style-name="Table81.B1" office:value-type="string">
            <text:p text:style-name="P730">This event handler can be used to process text strings before they are included in the output e.g. to replace unprintable characters with alternative strings.</text:p>
            <text:p text:style-name="P730">This only applies to columns with an SQL Type of SQL_VARYING and SQL_TEXT.</text:p>
          </table:table-cell>
        </table:table-row>
      </table:table>
      <text:p text:style-name="Text_20_body"/>
      <text:h text:style-name="P825" text:outline-level="2"><text:bookmark-start text:name="__RefHeading__27675_1844166745"/>The SQL Parser<text:bookmark-end text:name="__RefHeading__27675_1844166745"/></text:h>
      <text:p text:style-name="P507">IBX 1.2 introduce<text:span text:style-name="T104">d</text:span> the <text:span text:style-name="Symbol">TSelectSQLParser</text:span> class (<text:span text:style-name="T104">located in the </text:span><text:span text:style-name="Symbol">IBSQLParser</text:span> unit). This class supports the parsing and modification of Firebird Select SQL statements. It is intended to parse all such statements including UNIONs and Common Table Expressions. </text:p>
      <text:p text:style-name="P390"><text:span text:style-name="T52">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he Parser<text:bookmark-end text:name="__RefHeading___Toc15704_148275515"/></text:h>
      <text:p text:style-name="P507">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53">is </text:span>used when the dataset is opened.</text:p>
      <text:p text:style-name="P507">An example of use may be found in ibx/examples/employee where it is used to filter the EMPLOYEE table query according to user selectable criteria. In this example, the BeforeOpen handler is </text:p>
      <text:p text:style-name="P389"><text:soft-page-break/>procedure TForm1.EmployeesBeforeOpen(DataSet: TDataSet);</text:p>
      <text:p text:style-name="P389">begin</text:p>
      <text:p text:style-name="P389"><text:s text:c="2"/>if BeforeDate.Date &gt; 0 then</text:p>
      <text:p text:style-name="P389"><text:s text:c="5"/>(DataSet as TIBParserDataSet).Parser.Add2WhereClause('HIRE_DATE &lt; :BeforeDate');</text:p>
      <text:p text:style-name="P389"><text:s text:c="2"/>if AfterDate.Date &gt; 0 then</text:p>
      <text:p text:style-name="P389"><text:s text:c="5"/>(DataSet as TIBParserDataSet).Parser.Add2WhereClause('HIRE_DATE &gt; :AfterDate');</text:p>
      <text:p text:style-name="P389"/>
      <text:p text:style-name="P389"><text:s text:c="2"/>case SalaryRange.ItemIndex of</text:p>
      <text:p text:style-name="P389"><text:s text:c="2"/>1:</text:p>
      <text:p text:style-name="P389"><text:s text:c="4"/>(DataSet as TIBParserDataSet).Parser.Add2WhereClause('Salary &lt; 40000');</text:p>
      <text:p text:style-name="P389"><text:s text:c="2"/>2:</text:p>
      <text:p text:style-name="P389"><text:s text:c="4"/>(DataSet as TIBParserDataSet).Parser.Add2WhereClause('Salary &gt;= 40000 </text:p>
      <text:p text:style-name="P389"><text:s text:c="62"/>and Salary &lt; 100000');</text:p>
      <text:p text:style-name="P389"><text:s text:c="2"/>3:</text:p>
      <text:p text:style-name="P389"><text:s text:c="4"/>(DataSet as TIBParserDataSet).Parser.Add2WhereClause('Salary &gt;= 100000');</text:p>
      <text:p text:style-name="P389"><text:s text:c="2"/>end;</text:p>
      <text:p text:style-name="P389"/>
      <text:p text:style-name="P389"><text:s text:c="2"/><text:span text:style-name="T25">{Parameter value must be set after all SQL changes have been made}</text:span></text:p>
      <text:p text:style-name="P389"><text:s text:c="2"/>if BeforeDate.Date &gt; 0 then</text:p>
      <text:p text:style-name="P389"><text:s text:c="5"/>(DataSet as TIBParserDataSet).ParamByName('BeforeDate').AsDateTime </text:p>
      <text:p text:style-name="P389"><text:s text:c="61"/>:= BeforeDate.Date;</text:p>
      <text:p text:style-name="P389"><text:s text:c="2"/>if AfterDate.Date &gt; 0 then</text:p>
      <text:p text:style-name="P389"><text:s text:c="3"/>(DataSet as TIBParserDataSet).ParamByName('AfterDate').AsDateTime := AfterDate.Date;</text:p>
      <text:p text:style-name="P389">end; <text:s text:c="3"/></text:p>
      <text:p text:style-name="P388"><text:span text:style-name="T53">In the example, t</text:span>wo fil<text:span text:style-name="T54">ters are available for user use:</text:span></text:p>
      <text:list text:style-name="L75">
        <text:list-item>
          <text:p text:style-name="P1098">Restriction of “Hire Date” to a selected date range</text:p>
        </text:list-item>
        <text:list-item>
          <text:p text:style-name="P1098">Restriction of salary to a drop down list of salary bands.</text:p>
        </text:list-item>
      </text:list>
      <text:p text:style-name="P505">In each case, the filters need to be added to the SQL“Where” clause. </text:p>
      <text:p text:style-name="P505">When the Parser object is first invoked, it is created using the origin<text:span text:style-name="T246">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53">(not shown)</text:span>.</text:p>
      <text:p text:style-name="P505">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46">in order </text:span>to ensure that the semantics of the original condition are maintained.</text:p>
      <text:p text:style-name="P505">In this example, the requested Hire Date could have been formatted as text e.g.</text:p>
      <text:p text:style-name="P505">HIRE_DATE &lt; '2015-01-01'</text:p>
      <text:p text:style-name="P505">However, it is generally more reliable to let IBX handle date time conversions and so a <text:span text:style-name="T53">parametrised</text:span> query is used instead, with the parameter value being applied later on in the event handler. </text:p>
      <text:p text:style-name="P390">Note that <text:span text:style-name="T52">the example</text:span> also illustrates <text:span text:style-name="T5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508">In use, when a user changes a filter selection, the <text:span text:style-name="T150">d</text:span>ata<text:span text:style-name="T150">s</text:span>et is closed and re-opened causing the SQL to be re-generated and the result set appears with the filter applied.</text:p>
      <text:p text:style-name="P509"><text:soft-page-break/>A <text:span text:style-name="Symbol">TIBDataSet</text:span> <text:span text:style-name="Symbol"><text:span text:style-name="T150">SelectSQL</text:span></text:span><text:span text:style-name="T150"> </text:span>or <text:span text:style-name="T150">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88">The TSelectSQLParser is used by <text:span text:style-name="T246">the</text:span> IBControls <text:span text:style-name="T150">(see chapter </text:span><text:span text:style-name="T150"><text:bookmark-ref text:reference-format="number" text:ref-name="__RefHeading__16255_274617472">Error: Reference source not found</text:bookmark-ref></text:span><text:span text:style-name="T150">)</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88">An example of direct use of the T<text:span text:style-name="T56">S</text:span>electSQLParser can be found in ibx/examples/sqlparser. This is a simple form that can be used to experiment with the parser and see how the SQL statement is affected by calling methods such as <text:span text:style-name="Symbol">Add2WhereClause</text:span>.</text:p>
      <text:p text:style-name="P506">As shown in <text:sequence-ref text:reference-format="category-and-value" text:ref-name="refIllustration9">Illustration 10</text:sequence-ref>, you can use the example program to test out the parser by:</text:p>
      <text:list text:style-name="L76">
        <text:list-item>
          <text:p text:style-name="P1099">pasting an SQL Query into the “Original SQL” text box</text:p>
        </text:list-item>
        <text:list-item>
          <text:p text:style-name="P1099">entering an SQL Condition into one or more of the text boxes below</text:p>
        </text:list-item>
        <text:list-item>
          <text:p text:style-name="P1099">selecting the required options,</text:p>
        </text:list-item>
        <text:list-item>
          <text:p text:style-name="P1099">and clicking on the “Generate Updated SQL” button.</text:p>
        </text:list-item>
      </text:list>
      <text:p text:style-name="P506">The updated SQL Statement should now appear in the right hand text box.</text:p>
      <text:p text:style-name="P506">The example chosen here is a fairly trivial one taken from the ibx/examples/employee program and shows a single filter clause being added to the SQL used to generate the employees list.</text:p>
      <text:p text:style-name="P388"><draw:frame draw:style-name="fr1" draw:name="Frame4" text:anchor-type="paragraph" svg:width="6.6929in" draw:z-index="23"><draw:text-box fo:min-height="5.039in"><text:p text:style-name="Illustration"><draw:frame draw:style-name="fr13" draw:name="Image1" text:anchor-type="paragraph" svg:width="6.6929in" style:rel-width="100%" svg:height="5.039in" style:rel-height="scale" draw:z-index="24"><draw:image xlink:href="Pictures/100000000000035A00000286A400F36E.png" xlink:type="simple" xlink:show="embed" xlink:actuate="onLoad" draw: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69">For all properties and methods consult the source code. The following are those intended to be used in <text:span text:style-name="T57">a BeforeOpen event handler:</text:span></text:p>
      <text:list text:style-name="L77">
        <text:list-item>
          <text:p text:style-name="P1189">procedure Add2WhereClause(const Condition: string; OrClause: boolean=false; IncludeUnions: boolean = false);</text:p>
        </text:list-item>
      </text:list>
      <text:p text:style-name="P396">This method is used to <text:span text:style-name="T53">add</text:span> an SQL condition to an SQL “Where” clause. If one does not exist in the original query, then the clause is added. By default, the condition is ANDed with the current “Where” condition. If the “OrClause” argument is true, then it is ORed. </text:p>
      <text:p text:style-name="P396">By default, the condition is only added to the first select statement in a UNION. If the “IncludeUnions” argument is true, then it is added to every select statement in the UNION.</text:p>
      <text:list text:style-name="L78">
        <text:list-item>
          <text:p text:style-name="P1190">procedure Add2HavingClause(const Condition: string; OrClause: boolean=false; IncludeUnions: boolean = false);</text:p>
        </text:list-item>
      </text:list>
      <text:p text:style-name="P387"><text:span text:style-name="T57">The behaviour of this method is identical to </text:span><text:span text:style-name="T59">Add2WhereClause</text:span><text:span text:style-name="T60">, </text:span>except that it applies to the “Having” clause of the select statement.</text:p>
      <text:list text:style-name="L79">
        <text:list-item>
          <text:p text:style-name="P1191">property Union: TselectSQLParser;</text:p>
        </text:list-item>
      </text:list>
      <text:p text:style-name="P387"><text:soft-page-break/>When the select statement is a union, the second select statement is accessible through the “Union” property. Each select statement in the union is recursively added to the preceding statement via this property.</text:p>
      <text:list text:style-name="L80">
        <text:list-item>
          <text:p text:style-name="P1192">property OrderByClause: string;</text:p>
        </text:list-item>
      </text:list>
      <text:p text:style-name="P387">The current “Order By” is accessed and replaced via this property. The text is the clause less the “Order by” keyword.</text:p>
      <text:list text:style-name="L81">
        <text:list-item>
          <text:p text:style-name="P1193">property SQLText: string</text:p>
        </text:list-item>
      </text:list>
      <text:p text:style-name="P387">This property returns the current SQL statement complete with any modifications. This property may be useful when debugging.</text:p>
      <text:h text:style-name="P830" text:outline-level="2"><text:bookmark-start text:name="__RefHeading__24773_1844166745"/>ISQL Monitor<text:bookmark-end text:name="__RefHeading__24773_1844166745"/></text:h>
      <text:p text:style-name="P222">The <text:span text:style-name="Symbol"><text:span text:style-name="T197">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196">IB</text:span>ISQLMonitor<text:bookmark-end text:name="__RefHeading___Toc15712_148275515"/></text:h>
      <text:p text:style-name="P223">This component needs only to dropped on to a form and its <text:span text:style-name="Symbol">Enabled</text:span> property set tp true in order to start monitoring. It does not have to be connected to any other IBX component. A <text:span text:style-name="Symbol"><text:span text:style-name="T197">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224">The <text:span text:style-name="Symbol"><text:span text:style-name="T187">TIBDatabase</text:span></text:span><text:span text:style-name="Symbol"> TraceFlags</text:span> property determines the SQL actions to be reported <text:span text:style-name="T187">to a </text:span><text:span text:style-name="Symbol"><text:span text:style-name="T187">TIBSQLMonitor</text:span></text:span><text:span text:style-name="T187"> object</text:span>. The available actions are:</text:p>
      <text:p text:style-name="P224">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188">The </text:span><text:span text:style-name="Symbol"><text:span text:style-name="T188">TIBSQLMonitor OnSQL</text:span></text:span><text:span text:style-name="T188"> event handler is used to report each SQL action as a text message. Define a suitable event handler to receive text reports. These can be written to stdout, some log file or added to a </text:span><text:span text:style-name="Symbol"><text:span text:style-name="T188">TMemo</text:span></text:span><text:span text:style-name="T188"> for on screen reporting. The </text:span><text:span text:style-name="Symbol"><text:span text:style-name="T188">TIBSQLMonitor TraceFlags</text:span></text:span> <text:span text:style-name="T187">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224">Once a <text:span text:style-name="Symbol">TIBSQLMonitor</text:span> has been enabled, its output is available to other applications running on the same computer. Under Unix derivatives, this is limited to other applications running under the same user.</text:p>
      <text:p text:style-name="P2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390">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510">There are two simple example applications used here to show the power of <text:span text:style-name="Symbol">T</text:span><text:span text:style-name="Symbol"><text:span text:style-name="T196">IB</text:span></text:span><text:span text:style-name="Symbol">ISQLMon</text:span><text:span text:style-name="Symbol"><text:span text:style-name="T196">i</text:span></text:span><text:span text:style-name="Symbol">tor</text:span>. <text:span text:style-name="T196">These are located in “ibx/examples/isqlmonitor”</text:span></text:p>
      <text:h text:style-name="Heading_20_4" text:outline-level="4"><text:bookmark-start text:name="__RefHeading___Toc15722_148275515"/>Integrated Monitoring <text:bookmark-end text:name="__RefHeading___Toc15722_148275515"/></text:h>
      <text:p text:style-name="P510">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225">This example show how <text:span text:style-name="Symbol"><text:span text:style-name="T197">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53" text:outline-level="2"><text:bookmark-start text:name="__RefHeading__24365_1844166745"/><text:bookmark-start text:name="__RefNumPara__31052_1160916553"/>TIBDatabaseInfo<text:bookmark-end text:name="__RefHeading__24365_1844166745"/><text:bookmark-end text:name="__RefNumPara__31052_1160916553"/></text:h>
      <text:p text:style-name="P521">Firebird provides access to database properties and statistics and this access is supported in IBX through the <text:span text:style-name="Symbol">TIBDatabaseInfo</text:span> component.</text:p>
      <text:p text:style-name="P521">To use this component simply drop it on to a form and link it to the database for which information is required. You can have more than one TIBDatabaseInfo component linked to the same database.</text:p>
      <text:p text:style-name="P521">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72"><text:span text:style-name="Symbol">DBFileName</text:span></text:p>
          </table:table-cell>
          <table:table-cell table:style-name="Table40.B1" office:value-type="string">
            <text:p text:style-name="P788">Database File Name </text:p>
          </table:table-cell>
        </table:table-row>
        <table:table-row>
          <table:table-cell table:style-name="Table40.A2" office:value-type="string">
            <text:p text:style-name="P771"><text:span text:style-name="Symbol">DBSiteName</text:span></text:p>
          </table:table-cell>
          <table:table-cell table:style-name="Table40.B2" office:value-type="string">
            <text:p text:style-name="P787">Database site name</text:p>
          </table:table-cell>
        </table:table-row>
        <table:table-row>
          <table:table-cell table:style-name="Table40.A2" office:value-type="string">
            <text:p text:style-name="P771"><text:span text:style-name="Symbol">Allocation</text:span></text:p>
          </table:table-cell>
          <table:table-cell table:style-name="Table40.B2" office:value-type="string">
            <text:p text:style-name="P787">Number of database pages allocated</text:p>
          </table:table-cell>
        </table:table-row>
        <table:table-row>
          <table:table-cell table:style-name="Table40.A2" office:value-type="string">
            <text:p text:style-name="P771"><text:span text:style-name="Symbol">BaseLevel</text:span></text:p>
          </table:table-cell>
          <table:table-cell table:style-name="Table40.B2" office:value-type="string">
            <text:p text:style-name="P787">Database Version (level) number</text:p>
          </table:table-cell>
        </table:table-row>
        <table:table-row>
          <table:table-cell table:style-name="Table40.A2" office:value-type="string">
            <text:p text:style-name="P771"><text:span text:style-name="Symbol">DBImplementationNo</text:span></text:p>
          </table:table-cell>
          <table:table-cell table:style-name="Table40.B2" office:value-type="string">
            <text:p text:style-name="P787">Database Implementation Number</text:p>
          </table:table-cell>
        </table:table-row>
        <table:table-row>
          <table:table-cell table:style-name="Table40.A2" office:value-type="string">
            <text:p text:style-name="P771"><text:span text:style-name="Symbol">NoReserve</text:span></text:p>
          </table:table-cell>
          <table:table-cell table:style-name="Table40.B2" office:value-type="string">
            <text:p text:style-name="P787">Is space reserved for backup records</text:p>
          </table:table-cell>
        </table:table-row>
        <table:table-row>
          <table:table-cell table:style-name="Table40.A2" office:value-type="string">
            <text:p text:style-name="P771"><text:span text:style-name="Symbol">ODSMinorVersion</text:span></text:p>
          </table:table-cell>
          <table:table-cell table:style-name="Table40.B2" office:value-type="string">
            <text:p text:style-name="P787">ODS minor version number</text:p>
          </table:table-cell>
        </table:table-row>
        <table:table-row>
          <table:table-cell table:style-name="Table40.A2" office:value-type="string">
            <text:p text:style-name="P771"><text:span text:style-name="Symbol">ODSMajorVersion</text:span></text:p>
          </table:table-cell>
          <table:table-cell table:style-name="Table40.B2" office:value-type="string">
            <text:p text:style-name="P787">ODS version number</text:p>
          </table:table-cell>
        </table:table-row>
        <table:table-row>
          <table:table-cell table:style-name="Table40.A2" office:value-type="string">
            <text:p text:style-name="P771"><text:span text:style-name="Symbol">PageSize</text:span></text:p>
          </table:table-cell>
          <table:table-cell table:style-name="Table40.B2" office:value-type="string">
            <text:p text:style-name="P787">Number of bytes per page</text:p>
          </table:table-cell>
        </table:table-row>
        <table:table-row>
          <table:table-cell table:style-name="Table40.A2" office:value-type="string">
            <text:p text:style-name="P771"><text:span text:style-name="Symbol">Version</text:span></text:p>
          </table:table-cell>
          <table:table-cell table:style-name="Table40.B2" office:value-type="string">
            <text:p text:style-name="P787">Database implementation version no. <text:span text:style-name="T387">(InterBase Format. See Firebird Version for the Firebird format version no.)</text:span></text:p>
          </table:table-cell>
        </table:table-row>
        <table:table-row>
          <table:table-cell table:style-name="Table40.A2" office:value-type="string">
            <text:p text:style-name="P522"><text:span text:style-name="Symbol">CurrentMemory</text:span></text:p>
          </table:table-cell>
          <table:table-cell table:style-name="Table40.B2" office:value-type="string">
            <text:p text:style-name="P778">Amount of server memory (in bytes) currently in use</text:p>
          </table:table-cell>
        </table:table-row>
        <text:soft-page-break/>
        <table:table-row>
          <table:table-cell table:style-name="Table40.A2" office:value-type="string">
            <text:p text:style-name="P522">FirebirdVersion</text:p>
          </table:table-cell>
          <table:table-cell table:style-name="Table40.B2" office:value-type="string">
            <text:p text:style-name="P778">This returns the current Firebird version string. Note that the Version property returns an InterBase compatible version string.</text:p>
          </table:table-cell>
        </table:table-row>
        <table:table-row>
          <table:table-cell table:style-name="Table40.A2" office:value-type="string">
            <text:p text:style-name="P522"><text:span text:style-name="Symbol">ForcedWrites</text:span></text:p>
          </table:table-cell>
          <table:table-cell table:style-name="Table40.B2" office:value-type="string">
            <text:p text:style-name="P778">Number specifying the mode in which database writes are performed (0 for asynchronous, 1 for synchronous)</text:p>
          </table:table-cell>
        </table:table-row>
        <table:table-row>
          <table:table-cell table:style-name="Table40.A2" office:value-type="string">
            <text:p text:style-name="P522"><text:span text:style-name="Symbol">MaxMemory</text:span></text:p>
          </table:table-cell>
          <table:table-cell table:style-name="Table40.B2" office:value-type="string">
            <text:p text:style-name="P778">Maximum amount of memory (in bytes) used at one time since the first process attached to the database</text:p>
          </table:table-cell>
        </table:table-row>
        <table:table-row>
          <table:table-cell table:style-name="Table40.A2" office:value-type="string">
            <text:p text:style-name="P522"><text:span text:style-name="Symbol">NumBuffers</text:span></text:p>
          </table:table-cell>
          <table:table-cell table:style-name="Table40.B2" office:value-type="string">
            <text:p text:style-name="P778">Number of memory buffers currently allocated</text:p>
          </table:table-cell>
        </table:table-row>
        <table:table-row>
          <table:table-cell table:style-name="Table40.A2" office:value-type="string">
            <text:p text:style-name="P789"><text:span text:style-name="Symbol">SweepInterval</text:span></text:p>
          </table:table-cell>
          <table:table-cell table:style-name="Table40.B2" office:value-type="string">
            <text:p text:style-name="P778">Number of transactions that are committed between “sweeps” to remove database record versions that are no longer needed</text:p>
          </table:table-cell>
        </table:table-row>
        <table:table-row>
          <table:table-cell table:style-name="Table40.A2" office:value-type="string">
            <text:p text:style-name="P790"><text:span text:style-name="Symbol"><text:span text:style-name="T171">UserNames</text:span></text:span><text:span text:style-name="Symbol"> </text:span></text:p>
          </table:table-cell>
          <table:table-cell table:style-name="Table40.B2" office:value-type="string">
            <text:p text:style-name="P789">List of Logged in users</text:p>
          </table:table-cell>
        </table:table-row>
        <table:table-row>
          <table:table-cell table:style-name="Table40.A2" office:value-type="string">
            <text:p text:style-name="P771"><text:span text:style-name="Symbol">Fetches</text:span></text:p>
          </table:table-cell>
          <table:table-cell table:style-name="Table40.B2" office:value-type="string">
            <text:p text:style-name="P778">Number of reads from the memory buffer cache</text:p>
          </table:table-cell>
        </table:table-row>
        <table:table-row>
          <table:table-cell table:style-name="Table40.A2" office:value-type="string">
            <text:p text:style-name="P771"><text:span text:style-name="Symbol">Marks</text:span></text:p>
          </table:table-cell>
          <table:table-cell table:style-name="Table40.B2" office:value-type="string">
            <text:p text:style-name="P778">Number of writes to the memory buffer cache</text:p>
          </table:table-cell>
        </table:table-row>
        <table:table-row>
          <table:table-cell table:style-name="Table40.A2" office:value-type="string">
            <text:p text:style-name="P771"><text:span text:style-name="Symbol">Reads</text:span></text:p>
          </table:table-cell>
          <table:table-cell table:style-name="Table40.B2" office:value-type="string">
            <text:p text:style-name="P778">Number of page reads</text:p>
          </table:table-cell>
        </table:table-row>
        <table:table-row>
          <table:table-cell table:style-name="Table40.A2" office:value-type="string">
            <text:p text:style-name="P791"><text:span text:style-name="Symbol"><text:span text:style-name="T172">Writes</text:span></text:span><text:span text:style-name="Symbol"> </text:span></text:p>
          </table:table-cell>
          <table:table-cell table:style-name="Table40.B2" office:value-type="string">
            <text:p text:style-name="P778">Number of page writes</text:p>
          </table:table-cell>
        </table:table-row>
        <table:table-row>
          <table:table-cell table:style-name="Table40.A2" office:value-type="string">
            <text:p text:style-name="P793"><text:span text:style-name="Symbol">PagesFree</text:span></text:p>
          </table:table-cell>
          <table:table-cell table:style-name="Table40.B2" office:value-type="string">
            <text:p text:style-name="P793">Number of free pages in the database.</text:p>
          </table:table-cell>
        </table:table-row>
        <table:table-row>
          <table:table-cell table:style-name="Table40.A2" office:value-type="string">
            <text:p text:style-name="P793"><text:span text:style-name="Symbol">PagesUsed</text:span></text:p>
          </table:table-cell>
          <table:table-cell table:style-name="Table40.B2" office:value-type="string">
            <text:p text:style-name="P793">Number of used pages in the database.</text:p>
          </table:table-cell>
        </table:table-row>
        <table:table-row>
          <table:table-cell table:style-name="Table40.A2" office:value-type="string">
            <text:p text:style-name="P771"><text:span text:style-name="Symbol">BackoutCount</text:span></text:p>
          </table:table-cell>
          <table:table-cell table:style-name="Table40.B2" office:value-type="string">
            <text:p text:style-name="P778">Number of removals of a version of a record <text:span text:style-name="T246">by table. Formatted as a string list (see below).</text:span></text:p>
          </table:table-cell>
        </table:table-row>
        <table:table-row>
          <table:table-cell table:style-name="Table40.A2" office:value-type="string">
            <text:p text:style-name="P771"><text:span text:style-name="Symbol">DeleteCount</text:span></text:p>
          </table:table-cell>
          <table:table-cell table:style-name="Table40.B2" office:value-type="string">
            <text:p text:style-name="P777">Number of database deletes since the database was last attached <text:span text:style-name="T246">by table. Formatted as a string list (see below).</text:span></text:p>
          </table:table-cell>
        </table:table-row>
        <table:table-row>
          <table:table-cell table:style-name="Table40.A2" office:value-type="string">
            <text:p text:style-name="P771"><text:span text:style-name="Symbol">ExpungeCount</text:span></text:p>
          </table:table-cell>
          <table:table-cell table:style-name="Table40.B2" office:value-type="string">
            <text:p text:style-name="P777">Number of removals of a record and all of its ancestors, for records whose deletions have been committed <text:span text:style-name="T246">by table. Formatted as a string list (see below).</text:span></text:p>
          </table:table-cell>
        </table:table-row>
        <table:table-row>
          <table:table-cell table:style-name="Table40.A2" office:value-type="string">
            <text:p text:style-name="P771"><text:span text:style-name="Symbol">InsertCount</text:span></text:p>
          </table:table-cell>
          <table:table-cell table:style-name="Table40.B2" office:value-type="string">
            <text:p text:style-name="P777">Number of inserts into the database since the database was last attached <text:span text:style-name="T246">by table. Formatted as a string list (see below).</text:span></text:p>
          </table:table-cell>
        </table:table-row>
        <table:table-row>
          <table:table-cell table:style-name="Table40.A2" office:value-type="string">
            <text:p text:style-name="P771"><text:span text:style-name="Symbol">PurgeCount</text:span></text:p>
          </table:table-cell>
          <table:table-cell table:style-name="Table40.B2" office:value-type="string">
            <text:p text:style-name="P792"><text:span text:style-name="T170">Number of removals of old versions of fully mature records </text:span>(records that are committed, so that older ancestor versions are no longer needed) <text:span text:style-name="T246">by table. Formatted as a string list (see below).</text:span></text:p>
          </table:table-cell>
        </table:table-row>
        <table:table-row>
          <table:table-cell table:style-name="Table40.A2" office:value-type="string">
            <text:p text:style-name="P770"><text:span text:style-name="Symbol">ReadIdxCount</text:span></text:p>
          </table:table-cell>
          <table:table-cell table:style-name="Table40.B2" office:value-type="string">
            <text:p text:style-name="P776">Number of reads done via an index since the data<text:span text:style-name="T228">b</text:span>ase was last attached <text:span text:style-name="T246">by table. Formatted as a string list (see below).</text:span></text:p>
          </table:table-cell>
        </table:table-row>
        <table:table-row>
          <table:table-cell table:style-name="Table40.A2" office:value-type="string">
            <text:p text:style-name="P770"><text:span text:style-name="Symbol">ReadSeqCount</text:span></text:p>
          </table:table-cell>
          <table:table-cell table:style-name="Table40.B2" office:value-type="string">
            <text:p text:style-name="P776">Number of sequential table scans (row reads) done on each table since the database was last attached <text:span text:style-name="T246">by table. Formatted as a string list (see below).</text:span></text:p>
          </table:table-cell>
        </table:table-row>
        <table:table-row>
          <table:table-cell table:style-name="Table40.A2" office:value-type="string">
            <text:p text:style-name="P770"><text:span text:style-name="Symbol">UpdateCount</text:span></text:p>
          </table:table-cell>
          <table:table-cell table:style-name="Table40.B2" office:value-type="string">
            <text:p text:style-name="P775">Number of database updates since the database was last <text:soft-page-break/>attached <text:span text:style-name="T246">by table. Formatted as a string list (see below).</text:span></text:p>
          </table:table-cell>
        </table:table-row>
        <table:table-row>
          <table:table-cell table:style-name="Table40.A2" office:value-type="string">
            <text:p text:style-name="P770"><text:span text:style-name="Symbol">DBSQLDialect</text:span></text:p>
          </table:table-cell>
          <table:table-cell table:style-name="Table40.B2" office:value-type="string">
            <text:p text:style-name="P769">Database SQL Dialect</text:p>
          </table:table-cell>
        </table:table-row>
        <table:table-row>
          <table:table-cell table:style-name="Table40.A2" office:value-type="string">
            <text:p text:style-name="P774"><text:span text:style-name="Symbol">ReadOnly</text:span></text:p>
          </table:table-cell>
          <table:table-cell table:style-name="Table40.B2" office:value-type="string">
            <text:p text:style-name="P773">True if database is read only</text:p>
          </table:table-cell>
        </table:table-row>
        <table:table-row>
          <table:table-cell table:style-name="Table40.A2" office:value-type="string">
            <text:p text:style-name="P269"><text:span text:style-name="Symbol">DateDBCreated</text:span></text:p>
          </table:table-cell>
          <table:table-cell table:style-name="Table40.B2" office:value-type="string">
            <text:p text:style-name="P268">Date/Time when the database was originally created</text:p>
          </table:table-cell>
        </table:table-row>
        <table:table-row>
          <table:table-cell table:style-name="Table40.A2" office:value-type="string">
            <text:p text:style-name="P269"><text:span text:style-name="Symbol">TransactionCount</text:span></text:p>
          </table:table-cell>
          <table:table-cell table:style-name="Table40.B2" office:value-type="string">
            <text:p text:style-name="P268">Number of active transactions.</text:p>
          </table:table-cell>
        </table:table-row>
        <table:table-row>
          <table:table-cell table:style-name="Table40.A2" office:value-type="string">
            <text:p text:style-name="P780"><text:span text:style-name="Symbol">Encrypted</text:span></text:p>
          </table:table-cell>
          <table:table-cell table:style-name="Table40.B2" office:value-type="string">
            <text:p text:style-name="P779">True if database is encrypted (Firebird 3.0.3 and later)</text:p>
          </table:table-cell>
        </table:table-row>
        <table:table-row>
          <table:table-cell table:style-name="Table40.A2" office:value-type="string">
            <text:p text:style-name="P780"><text:span text:style-name="Symbol">EncryptionKeyName</text:span></text:p>
          </table:table-cell>
          <table:table-cell table:style-name="Table40.B2" office:value-type="string">
            <text:p text:style-name="P779">Name of the encryption key if available (Firebird 3.0.3 and later)</text:p>
          </table:table-cell>
        </table:table-row>
      </table:table>
      <text:p text:style-name="P521"/>
      <text:p text:style-name="P266">From IBX 2.2, TIBDatabaseInfo also supports the following function:</text:p>
      <text:p text:style-name="P267">function GetDatabasePage(PageNo: integer): string;</text:p>
      <text:p text:style-name="P265">This returns the contents of database “PageNo” as a string with a codepage of CP_NONE. This feature is allowed only for SYSDBA or database owner for security reasons. Introduced in Firebird v2.5.</text:p>
      <text:h text:style-name="P937" text:outline-level="3"><text:bookmark-start text:name="__RefHeading___Toc15726_148275515"/>Per Table Counts<text:bookmark-end text:name="__RefHeading___Toc15726_148275515"/></text:h>
      <text:p text:style-name="P561">Several of the above properties return database information as a string list giving the count per table. Each line is in the format:</text:p>
      <text:p text:style-name="P561">&lt;Relation ID&gt;=&lt;count&gt;</text:p>
      <text:p text:style-name="P562">The &lt;Relation ID&gt; is an integer and may be resolved to a table name using the <text:span text:style-name="T247">RDB$RELATIONS table. For example, the SQL query:</text:span></text:p>
      <text:p text:style-name="P250">SELECT trim(r.RDB$RELATION_NAME) as RDB$RELATION_NAME</text:p>
      <text:p text:style-name="P250">FROM RDB$RELATIONS r Where r.RDB$RELATION_ID = ?</text:p>
      <text:p text:style-name="P249">may be used to look up the table name from the RDB$RELATIONS table.</text:p>
      <text:h text:style-name="P854" text:outline-level="2"><text:bookmark-start text:name="__RefHeading__24778_1844166745"/>TIBExtract<text:bookmark-end text:name="__RefHeading__24778_1844166745"/></text:h>
      <text:p text:style-name="P639">This component allows the extract of database metadata. <text:span text:style-name="T176">The component is intended to be compliant with all Firebird extensions to the DDL up to and including Firebird 3.</text:span></text:p>
      <text:p text:style-name="P186">The “ibx/examples/fbsql” example provides an example of the use of this component in a console mode application.</text:p>
      <text:p text:style-name="P186">To use: at design time simply drop the component on to a form and, in the Object Inspector, link it to the required TIBDatabase.</text:p>
      <text:h text:style-name="P938"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81"><text:span text:style-name="Symbol"><text:span text:style-name="T326">AlwaysQuoteIdentifiers</text:span></text:span></text:p>
          </table:table-cell>
          <table:table-cell table:style-name="Table80.B1" office:value-type="string">
            <text:p text:style-name="P782">If true then in database dialect 3 SQL identifiers are always delimited by double quotes. If false, then they are only delimited if the identifier is a reserved word, contains lower case or special <text:s text:c="3"/><text:soft-page-break/>characters. </text:p>
          </table:table-cell>
        </table:table-row>
        <table:table-row>
          <table:table-cell table:style-name="Table80.A2" office:value-type="string">
            <text:p text:style-name="P784"><text:span text:style-name="Symbol">CaseSensitiveObjectNames</text:span></text:p>
          </table:table-cell>
          <table:table-cell table:style-name="Table80.B2" office:value-type="string">
            <text:p text:style-name="P783">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83">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25"><text:span text:style-name="Symbol">IncludeMetaDataComments</text:span></text:p>
          </table:table-cell>
          <table:table-cell table:style-name="Table80.B2" office:value-type="string">
            <text:p text:style-name="P724">If true (default) then metadata comments are included in DDL.</text:p>
          </table:table-cell>
        </table:table-row>
        <table:table-row>
          <table:table-cell table:style-name="Table80.A2" office:value-type="string">
            <text:p text:style-name="P786"><text:span text:style-name="Symbol">ShowSystem</text:span></text:p>
          </table:table-cell>
          <table:table-cell table:style-name="Table80.B2" office:value-type="string">
            <text:p text:style-name="P785">Used when extracting comments or using the ListObjectNames method. If true then comments include those on system objects and the object names include system objects.</text:p>
          </table:table-cell>
        </table:table-row>
      </table:table>
      <text:p text:style-name="Text_20_body"/>
      <text:h text:style-name="P938" text:outline-level="3"><text:bookmark-start text:name="__RefHeading___Toc13841_1632266307"/>Usage<text:bookmark-end text:name="__RefHeading___Toc13841_1632266307"/></text:h>
      <text:p text:style-name="P186">At run time, the <text:span text:style-name="Symbol">ExtractObject</text:span> method may be used at any time <text:span text:style-name="T216">when</text:span> the database is connected, <text:span text:style-name="T216">and in order</text:span> to extract selected metadata.</text:p>
      <text:p text:style-name="P640">procedure ExtractObject(ObjectType : TExtractObjectTypes; ObjectName : String = '';</text:p>
      <text:p text:style-name="P640"><text:s text:c="30"/>ExtractTypes : TExtractTypes = [])</text:p>
      <text:p text:style-name="P185">After the method has completed, the <text:span text:style-name="Symbol">TIBExtract.Items</text:span> string list property will hold the extracted metadata.</text:p>
      <text:p text:style-name="P185">The extract object types determine the scope of the metadata extracted, <text:span text:style-name="T177">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164">Extract Object</text:p>
            </table:table-cell>
            <table:table-cell table:style-name="Table42.A1" office:value-type="string">
              <text:p text:style-name="P164">Extract Type</text:p>
            </table:table-cell>
            <table:table-cell table:style-name="Table42.C1" office:value-type="string">
              <text:p text:style-name="P164">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187"/>
          </table:table-cell>
          <table:table-cell table:style-name="Table42.C2" office:value-type="string">
            <text:p text:style-name="P187">The whole database <text:span text:style-name="T206">schema including grants to all objects except users other than user PUBLIC.</text:span></text:p>
          </table:table-cell>
        </table:table-row>
        <table:table-row>
          <table:covered-table-cell table:style-name="Table42.A2"/>
          <table:table-cell table:style-name="Table42.A2" office:value-type="string">
            <text:p text:style-name="P710">etGrantsToUser</text:p>
          </table:table-cell>
          <table:table-cell table:style-name="Table42.C2" office:value-type="string">
            <text:p text:style-name="P710">Include grants to all users.</text:p>
          </table:table-cell>
        </table:table-row>
        <table:table-row>
          <table:covered-table-cell table:style-name="Table42.A2"/>
          <table:table-cell table:style-name="Table42.A2" office:value-type="string">
            <text:p text:style-name="P683">etData</text:p>
          </table:table-cell>
          <table:table-cell table:style-name="Table42.C2" office:value-type="string">
            <text:p text:style-name="P188">The whole database <text:span text:style-name="T206">schema plus the data as DML Insert statements immediately after the table definitions. This include binary Blobs (see </text:span><text:span text:style-name="T206"><text:bookmark-ref text:reference-format="number" text:ref-name="__RefHeading___Toc9201_1283350510">7.6.4</text:bookmark-ref></text:span><text:span text:style-name="T206">) and Array data (see </text:span><text:span text:style-name="T206"><text:bookmark-ref text:reference-format="number" text:ref-name="__RefHeading___Toc9203_1283350510">7.6.5</text:bookmark-ref></text:span><text:span text:style-name="T20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677">etDomain</text:p>
          </table:table-cell>
          <table:table-cell table:style-name="Table42.C2" office:value-type="string">
            <text:p text:style-name="P677">All Domains</text:p>
          </table:table-cell>
        </table:table-row>
        <table:table-row>
          <table:covered-table-cell table:style-name="Table42.A2"/>
          <table:table-cell table:style-name="Table42.A2" office:value-type="string">
            <text:p text:style-name="P677">etTable</text:p>
          </table:table-cell>
          <table:table-cell table:style-name="Table42.C2" office:value-type="string">
            <text:p text:style-name="P677">Domains used in the specified table</text:p>
          </table:table-cell>
        </table:table-row>
        <text:soft-page-break/>
        <table:table-row>
          <table:table-cell table:style-name="Table42.A2" table:number-rows-spanned="8" office:value-type="string">
            <text:p text:style-name="Table_20_Contents">eoTable</text:p>
          </table:table-cell>
          <table:table-cell table:style-name="Table42.A2" office:value-type="string">
            <text:p text:style-name="P677"/>
          </table:table-cell>
          <table:table-cell table:style-name="Table42.C2" office:value-type="string">
            <text:p text:style-name="P677">Specified table or all tables if no table given</text:p>
          </table:table-cell>
        </table:table-row>
        <table:table-row>
          <table:covered-table-cell table:style-name="Table42.A2"/>
          <table:table-cell table:style-name="Table42.A2" office:value-type="string">
            <text:p text:style-name="P677">etDomain</text:p>
          </table:table-cell>
          <table:table-cell table:style-name="Table42.C2" office:value-type="string">
            <text:p text:style-name="P679">Adds domains <text:span text:style-name="T179">defined for</text:span> the table</text:p>
          </table:table-cell>
        </table:table-row>
        <table:table-row>
          <table:covered-table-cell table:style-name="Table42.A2"/>
          <table:table-cell table:style-name="Table42.A2" office:value-type="string">
            <text:p text:style-name="P677">etIndex</text:p>
          </table:table-cell>
          <table:table-cell table:style-name="Table42.C2" office:value-type="string">
            <text:p text:style-name="P679">Adds indexes <text:span text:style-name="T179">defined for</text:span> the table</text:p>
          </table:table-cell>
        </table:table-row>
        <table:table-row>
          <table:covered-table-cell table:style-name="Table42.A2"/>
          <table:table-cell table:style-name="Table42.A2" office:value-type="string">
            <text:p text:style-name="P677">etForeign</text:p>
          </table:table-cell>
          <table:table-cell table:style-name="Table42.C2" office:value-type="string">
            <text:p text:style-name="P679">Adds Foreign Key Constraints <text:span text:style-name="T179">defined for</text:span> the table</text:p>
          </table:table-cell>
        </table:table-row>
        <table:table-row>
          <table:covered-table-cell table:style-name="Table42.A2"/>
          <table:table-cell table:style-name="Table42.A2" office:value-type="string">
            <text:p text:style-name="P677">etCheck</text:p>
          </table:table-cell>
          <table:table-cell table:style-name="Table42.C2" office:value-type="string">
            <text:p text:style-name="P679">Adds Check Constraints <text:span text:style-name="T179">defined for</text:span> the table</text:p>
          </table:table-cell>
        </table:table-row>
        <table:table-row>
          <table:covered-table-cell table:style-name="Table42.A2"/>
          <table:table-cell table:style-name="Table42.A2" office:value-type="string">
            <text:p text:style-name="P677">etTrigger</text:p>
          </table:table-cell>
          <table:table-cell table:style-name="Table42.C2" office:value-type="string">
            <text:p text:style-name="P679">Adds Table Triggers <text:span text:style-name="T179">defined for</text:span> the table</text:p>
          </table:table-cell>
        </table:table-row>
        <table:table-row>
          <table:covered-table-cell table:style-name="Table42.A2"/>
          <table:table-cell table:style-name="Table42.A2" office:value-type="string">
            <text:p text:style-name="P677">etGrant</text:p>
          </table:table-cell>
          <table:table-cell table:style-name="Table42.C2" office:value-type="string">
            <text:p text:style-name="P679">Adds Table Grants <text:span text:style-name="T179">defined for</text:span> the table</text:p>
          </table:table-cell>
        </table:table-row>
        <table:table-row>
          <table:covered-table-cell table:style-name="Table42.A2"/>
          <table:table-cell table:style-name="Table42.A2" office:value-type="string">
            <text:p text:style-name="P677">etData</text:p>
          </table:table-cell>
          <table:table-cell table:style-name="Table42.C2" office:value-type="string">
            <text:p text:style-name="P67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680">List all views or just the one given by the ObjectName</text:p>
          </table:table-cell>
        </table:table-row>
        <table:table-row>
          <table:covered-table-cell table:style-name="Table42.A2"/>
          <table:table-cell table:style-name="Table42.A2" office:value-type="string">
            <text:p text:style-name="P677">etTrigger</text:p>
          </table:table-cell>
          <table:table-cell table:style-name="Table42.C2" office:value-type="string">
            <text:p text:style-name="P677">Adds Triggers <text:span text:style-name="T179">defined for</text:span> the <text:span text:style-name="T179">view</text:span></text:p>
          </table:table-cell>
        </table:table-row>
        <table:table-row>
          <table:table-cell table:style-name="Table42.A2" office:value-type="string">
            <text:p text:style-name="Standard"/>
          </table:table-cell>
          <table:table-cell table:style-name="Table42.A2" office:value-type="string">
            <text:p text:style-name="P688">etGrant</text:p>
          </table:table-cell>
          <table:table-cell table:style-name="Table42.C2" office:value-type="string">
            <text:p text:style-name="P685">Additionally includes grants <text:span text:style-name="T20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680">List all Procedures or just the one given by the ObjectName</text:p>
          </table:table-cell>
        </table:table-row>
        <table:table-row>
          <table:covered-table-cell table:style-name="Table42.A2"/>
          <table:table-cell table:style-name="Table42.A2" office:value-type="string">
            <text:p text:style-name="P684">etGrant</text:p>
          </table:table-cell>
          <table:table-cell table:style-name="Table42.C2" office:value-type="string">
            <text:p text:style-name="P684">Additionally includes grants to <text:span text:style-name="T207">and on </text:span>the procedure.</text:p>
          </table:table-cell>
        </table:table-row>
        <table:table-row>
          <table:table-cell table:style-name="Table42.A2" table:number-rows-spanned="2" office:value-type="string">
            <text:p text:style-name="Table_20_Contents">eoP<text:span text:style-name="T334">ackage</text:span></text:p>
          </table:table-cell>
          <table:table-cell table:style-name="Table42.A2" office:value-type="string">
            <text:p text:style-name="Table_20_Contents"/>
          </table:table-cell>
          <table:table-cell table:style-name="Table42.C2" office:value-type="string">
            <text:p text:style-name="P680">List all <text:span text:style-name="T334">Package definitions (header and body)</text:span> or just the one given by the ObjectName <text:span text:style-name="T335">(Firebird 3 or later only)</text:span></text:p>
          </table:table-cell>
        </table:table-row>
        <table:table-row>
          <table:covered-table-cell table:style-name="Table42.A2"/>
          <table:table-cell table:style-name="Table42.A2" office:value-type="string">
            <text:p text:style-name="P684">etGrant</text:p>
          </table:table-cell>
          <table:table-cell table:style-name="Table42.C2" office:value-type="string">
            <text:p text:style-name="P684">Additionally includes grants to <text:span text:style-name="T207">and on </text:span>the <text:span text:style-name="T33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68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680">List all Generators or just the one given by the ObjectName</text:p>
          </table:table-cell>
        </table:table-row>
        <table:table-row>
          <table:covered-table-cell table:style-name="Table42.A2"/>
          <table:table-cell table:style-name="Table42.A2" office:value-type="string">
            <text:p text:style-name="P241">etData</text:p>
          </table:table-cell>
          <table:table-cell table:style-name="Table42.C2" office:value-type="string">
            <text:p text:style-name="P686">Additionally <text:span text:style-name="T21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680">List all Exceptions or just the one given by the ObjectName</text:p>
          </table:table-cell>
        </table:table-row>
        <text:soft-page-break/>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680">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680">List all Roles or just the one given by the ObjectName</text:p>
          </table:table-cell>
        </table:table-row>
        <table:table-row>
          <table:covered-table-cell table:style-name="Table42.A2"/>
          <table:table-cell table:style-name="Table42.A2" office:value-type="string">
            <text:p text:style-name="P709">etGrant</text:p>
          </table:table-cell>
          <table:table-cell table:style-name="Table42.C2" office:value-type="string">
            <text:p text:style-name="P687">Additionally includes grants to the <text:span text:style-name="T28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680">List all Triggers or just the one given by the ObjectName</text:p>
          </table:table-cell>
        </table:table-row>
        <table:table-row>
          <table:covered-table-cell table:style-name="Table42.A2"/>
          <table:table-cell table:style-name="Table42.A2" office:value-type="string">
            <text:p text:style-name="P680">etTable</text:p>
          </table:table-cell>
          <table:table-cell table:style-name="Table42.C2" office:value-type="string">
            <text:p text:style-name="P680">List all Triggers for the ObjectName (table name)</text:p>
          </table:table-cell>
        </table:table-row>
        <table:table-row>
          <table:covered-table-cell table:style-name="Table42.A2"/>
          <table:table-cell table:style-name="Table42.A2" office:value-type="string">
            <text:p text:style-name="P722">etDatabaseTriggers</text:p>
          </table:table-cell>
          <table:table-cell table:style-name="Table42.C2" office:value-type="string">
            <text:p text:style-name="P722">List all Database Triggers <text:span text:style-name="T178">or just the one given by the ObjectName</text:span></text:p>
          </table:table-cell>
        </table:table-row>
        <table:table-row>
          <table:covered-table-cell table:style-name="Table42.A2"/>
          <table:table-cell table:style-name="Table42.A2" office:value-type="string">
            <text:p text:style-name="P722">etDDLTriggers</text:p>
          </table:table-cell>
          <table:table-cell table:style-name="Table42.C2" office:value-type="string">
            <text:p text:style-name="P722">List all DDL Triggers <text:span text:style-name="T178">or just the one given by the ObjectName</text:span></text:p>
          </table:table-cell>
        </table:table-row>
        <table:table-row>
          <table:covered-table-cell table:style-name="Table42.A2"/>
          <table:table-cell table:style-name="Table42.A2" office:value-type="string">
            <text:p text:style-name="P684">etGrant</text:p>
          </table:table-cell>
          <table:table-cell table:style-name="Table42.C2" office:value-type="string">
            <text:p text:style-name="P68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680">List all Foreign Keys or just the one given by the ObjectName</text:p>
          </table:table-cell>
        </table:table-row>
        <table:table-row>
          <table:covered-table-cell table:style-name="Table42.A2"/>
          <table:table-cell table:style-name="Table42.A2" office:value-type="string">
            <text:p text:style-name="P680">etTable</text:p>
          </table:table-cell>
          <table:table-cell table:style-name="Table42.C2" office:value-type="string">
            <text:p text:style-name="P68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680">List all indexes or just the one given by the ObjectName</text:p>
          </table:table-cell>
        </table:table-row>
        <table:table-row>
          <table:covered-table-cell table:style-name="Table42.A2"/>
          <table:table-cell table:style-name="Table42.A2" office:value-type="string">
            <text:p text:style-name="P680">etTable</text:p>
          </table:table-cell>
          <table:table-cell table:style-name="Table42.C2" office:value-type="string">
            <text:p text:style-name="P68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680">List all Check Constraints or just the one given by the ObjectName</text:p>
          </table:table-cell>
        </table:table-row>
        <table:table-row>
          <table:covered-table-cell table:style-name="Table42.A2"/>
          <table:table-cell table:style-name="Table42.A2" office:value-type="string">
            <text:p text:style-name="P680">etTable</text:p>
          </table:table-cell>
          <table:table-cell table:style-name="Table42.C2" office:value-type="string">
            <text:p text:style-name="P680">List all Check Constraints for the ObjectName (table name)</text:p>
          </table:table-cell>
        </table:table-row>
        <table:table-row>
          <table:table-cell table:style-name="Table42.A2" office:value-type="string">
            <text:p text:style-name="P723">eoComments</text:p>
          </table:table-cell>
          <table:table-cell table:style-name="Table42.A2" office:value-type="string">
            <text:p text:style-name="Table_20_Contents"/>
          </table:table-cell>
          <table:table-cell table:style-name="Table42.C2" office:value-type="string">
            <text:p text:style-name="P723">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678"><text:span text:style-name="T178">Lists </text:span>table data as DML INSERT statements <text:span text:style-name="T178">for the specified table.</text:span></text:p>
          </table:table-cell>
        </table:table-row>
      </table:table>
      <text:p text:style-name="P185"/>
      <text:p text:style-name="P240">When an entire database is extracted, the order of objects is:</text:p>
      <text:list text:style-name="L82">
        <text:list-item>
          <text:p text:style-name="P1157">Commented out CREATE DATABASE statement</text:p>
        </text:list-item>
        <text:list-item>
          <text:p text:style-name="P1158">Filters</text:p>
        </text:list-item>
        <text:list-item>
          <text:p text:style-name="P1158"><text:soft-page-break/><text:span text:style-name="T363">External </text:span>Functions</text:p>
        </text:list-item>
        <text:list-item>
          <text:p text:style-name="P1158">Domains <text:span text:style-name="T363">(except for Check constraints)</text:span></text:p>
        </text:list-item>
        <text:list-item>
          <text:p text:style-name="P1157">Tables</text:p>
        </text:list-item>
        <text:list-item>
          <text:p text:style-name="P1158">Data (if requested)</text:p>
        </text:list-item>
        <text:list-item>
          <text:p text:style-name="P1158">Indexes</text:p>
        </text:list-item>
        <text:list-item>
          <text:p text:style-name="P1158">Foreign Key constraints</text:p>
        </text:list-item>
        <text:list-item>
          <text:p text:style-name="P1158">Generators including setting the value if requested</text:p>
        </text:list-item>
        <text:list-item>
          <text:p text:style-name="P1158">Views</text:p>
        </text:list-item>
        <text:list-item>
          <text:p text:style-name="P1159">Domain Check Constraints</text:p>
        </text:list-item>
        <text:list-item>
          <text:p text:style-name="P1158">Check Constraints</text:p>
        </text:list-item>
        <text:list-item>
          <text:p text:style-name="P1158">Exceptions</text:p>
        </text:list-item>
        <text:list-item>
          <text:p text:style-name="P1158">Create Procedure Stubs</text:p>
        </text:list-item>
        <text:list-item>
          <text:p text:style-name="P1159">Create Function stubs</text:p>
        </text:list-item>
        <text:list-item>
          <text:p text:style-name="P1158">Triggers</text:p>
        </text:list-item>
        <text:list-item>
          <text:p text:style-name="P1158">Alter Procedure statements to add procedure body</text:p>
        </text:list-item>
        <text:list-item>
          <text:p text:style-name="P1159">Alter Function statements to add function body</text:p>
        </text:list-item>
        <text:list-item>
          <text:p text:style-name="P1160">Metadata Comments on Character Sets and Collations (if any)</text:p>
        </text:list-item>
        <text:list-item>
          <text:p text:style-name="P115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240">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39" text:outline-level="3"><text:bookmark-start text:name="__RefHeading___Toc14753_634109342"/>Listing Database Objects<text:bookmark-end text:name="__RefHeading___Toc14753_634109342"/></text:h>
      <text:p text:style-name="P606">The method:</text:p>
      <text:p text:style-name="pascalcode">procedure ListObjectNames(ObjectType: integer; Names: TStrings);</text:p>
      <text:p text:style-name="P607">may be used to list, in the TStrings “Names”, the names of all objects of the requested type in the database. ObjectType can be either: obj_relation, obj_view, obj_trigger, obj_procedure, <text:s/><text:span text:style-name="T341">obj_function, </text:span>obj_exception, obj_index, obj_character_set, obj_sql_role, obj_generator, obj_blob_filter, obj_collation, obj_package, <text:span text:style-name="T341">obj_domain</text:span>. </text:p>
      <text:h text:style-name="P940" text:outline-level="3"><text:bookmark-start text:name="__RefHeading___Toc9201_1283350510"/>Extract of Binary Blobs<text:bookmark-end text:name="__RefHeading___Toc9201_1283350510"/></text:h>
      <text:p text:style-name="P538">TIBExtract exports binary blobs in a simple XML format and as hexadecimal characters. <text:span text:style-name="T208">For example:</text:span></text:p>
      <text:p text:style-name="P741">&lt;blob subtype="0"&gt;</text:p>
      <text:p text:style-name="P741">89504E470D0A1A0A0000000D4948445200000122000000AE0803000000A565F09300000015504C54</text:p>
      <text:p text:style-name="P741">45FFFFFFCE1124CC0005EDB8BBEEBCBFCD0016E1858B135C5E220000018949444154789CEDDAB10D</text:p>
      <text:p text:style-name="P741">C3301004415AA4D47FC97607133E04EF5470D8F8D69AB5AF0F5C7B78E2B4125189A84454222A1195</text:p>
      <text:p text:style-name="P741">884A4425A2125189A84454222A1195884A4425A2125189A84454222A1195884A4425A2125189A844</text:p>
      <text:p text:style-name="P741">54222A1195884A4425A2125189A84454222A1195884A4425A2125189A84454222A1195884A4425A2</text:p>
      <text:p text:style-name="P741">125189A84454222A1195884A4425A2125189A84454222A1195884A4425A2125189A844749CE84C6F</text:p>
      <text:p text:style-name="P741">DCA3CE732BD1FD9CD98DEB9AC542BF46C3139727FEBB125189A84454222A1195884A4425A2125189</text:p>
      <text:p text:style-name="P741">A84454222A1195884A4425A2125189A84454222A1195884A4425A2125189A84454222A1195884A44</text:p>
      <text:p text:style-name="P741">5DB0A8231F4D5F2DDF70071DD6A9984A4425A2125189A84454222A1195884A4425A2125189A84454</text:p>
      <text:p text:style-name="P741">222A1195884A4425A2125189A84454222A1195884A4425A2125189A84454222A1195884A4425A212</text:p>
      <text:p text:style-name="P741">5189A84454222A1195884A4425A2125189A84454222A1195884A4425A2125189A84454222A119588</text:p>
      <text:p text:style-name="P741">4A4425A2125189A84454222A1195884A4425A21724FA0255D0459DFD53A3DD0000000049454E44AE</text:p>
      <text:p text:style-name="P741">426082</text:p>
      <text:p text:style-name="SQL"><text:soft-page-break/><text:span text:style-name="T209">&lt;/blob</text:span>&gt;</text:p>
      <text:p text:style-name="P226">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226">The above can be placed in a DML statement instead of a placeholder for a blob value. For example:</text:p>
      <text:p text:style-name="P741">INSERT INTO MyTable (KeyValue,BlobData) Values(1,&lt;blob subtype="0"&gt;</text:p>
      <text:p text:style-name="P741">89504E470D0A1A0A0000000D4948445200000122000000AE0803000000A565F09300000015504C54</text:p>
      <text:p text:style-name="P741">...</text:p>
      <text:p text:style-name="P741">&lt;/blob&gt;);</text:p>
      <text:h text:style-name="P940" text:outline-level="3"><text:bookmark-start text:name="__RefHeading___Toc9203_1283350510"/>Extract of Array Data<text:bookmark-end text:name="__RefHeading___Toc9203_1283350510"/></text:h>
      <text:p text:style-name="P228">TIBExtract exports array data in a <text:span text:style-name="T212">similar</text:span> simple XML format. For example:</text:p>
      <text:p text:style-name="P742">&lt;array dim = "1" sqltype = "448" length = "60" relation_name = "JOB" column_name = "LANGUAGE_REQ" charset = "NONE" bounds="1:5"&gt;</text:p>
      <text:p text:style-name="P742"><text:s/>&lt;elt ix="1"&gt;Japanese</text:p>
      <text:p text:style-name="P742">&lt;/elt&gt;</text:p>
      <text:p text:style-name="P742"><text:s/>&lt;elt ix="2"&gt;Mandarin</text:p>
      <text:p text:style-name="P742">&lt;/elt&gt;</text:p>
      <text:p text:style-name="P742"><text:s/>&lt;elt ix="3"&gt;English</text:p>
      <text:p text:style-name="P742">&lt;/elt&gt;</text:p>
      <text:p text:style-name="P742"><text:s/>&lt;elt ix="4"&gt;</text:p>
      <text:p text:style-name="P742">&lt;/elt&gt;</text:p>
      <text:p text:style-name="P742"><text:s/>&lt;elt ix="5"&gt;</text:p>
      <text:p text:style-name="P742">&lt;/elt&gt;</text:p>
      <text:p text:style-name="P742">&lt;/array&gt;</text:p>
      <text:p text:style-name="P227">The above is more complex tha<text:span text:style-name="T216">n</text:span> a blob and reflects the structural information that is necessary to define an array. The above example comes from the example employee database and is the value of a LANGUAGE_REQ column in the JOB table.</text:p>
      <text:p text:style-name="P227">The “array” tag identifies:</text:p>
      <text:list text:style-name="L83">
        <text:list-item>
          <text:p text:style-name="P1161">dim: the number of dimensions in the array</text:p>
        </text:list-item>
        <text:list-item>
          <text:p text:style-name="P1161">sqltype: the SQL type of the array data (using blr type codes)</text:p>
        </text:list-item>
        <text:list-item>
          <text:p text:style-name="P1161">length: the size of each array element in bytes.</text:p>
        </text:list-item>
        <text:list-item>
          <text:p text:style-name="P1161">relation_name: the name of the table in which the array is defined.</text:p>
        </text:list-item>
        <text:list-item>
          <text:p text:style-name="P1161">column_name: the name of the column in that table.</text:p>
        </text:list-item>
        <text:list-item>
          <text:p text:style-name="P1161">charset: the name of the character set (text data only)</text:p>
        </text:list-item>
        <text:list-item>
          <text:p text:style-name="P1161">bounds: a comma separated list of lower and upper bound pairs, one pair for each dimension. Each pair is separated by a ':' character.</text:p>
        </text:list-item>
      </text:list>
      <text:p text:style-name="P227">The array element values are then nested within “elt” tags. The first level element tag is for the first dimension, and provides its index, and then so on. The inner set of “elt” tags encloses the value of the array element.</text:p>
      <text:p text:style-name="P227"><text:soft-page-break/>For example, in a 2D array:</text:p>
      <text:p text:style-name="SQL">&lt;array dim="2" ... <text:span text:style-name="T211">bounds="1:5,1:2"</text:span>&gt;</text:p>
      <text:p text:style-name="SQL"><text:s text:c="2"/><text:span text:style-name="T211">&lt;elt ix="5"&gt;</text:span></text:p>
      <text:p text:style-name="P743"><text:s text:c="4"/><text:span text:style-name="T211">&lt;elt ix="2"&gt;</text:span><text:span text:style-name="T210">English&lt;/elt&gt;</text:span></text:p>
      <text:p text:style-name="P742"><text:s text:c="2"/>&lt;elt&gt;</text:p>
      <text:p text:style-name="P742">&lt;/array&gt;</text:p>
      <text:p text:style-name="P227">In the above, a single element is defined with co-ordinated (<text:span text:style-name="T212">5</text:span>,2).</text:p>
      <text:h text:style-name="P855" text:outline-level="2"><text:bookmark-start text:name="__RefNumPara__50193_1160916553"/><text:bookmark-start text:name="__RefHeading___Toc50197_1160916553"/>TIBJournal<text:bookmark-end text:name="__RefNumPara__50193_1160916553"/><text:bookmark-end text:name="__RefHeading___Toc50197_1160916553"/></text:h>
      <text:p text:style-name="P627">TIBJournal is a non-visible component supporting the use of Client Side Database Journaling. Database Journal is described in the <text:span text:style-name="T21">Firebird Pascal API Guide</text:span><text:span text:style-name="T87"> </text:span><text:span text:style-name="T97">[</text:span><text:span text:style-name="T97"><text:bookmark-ref text:reference-format="number-no-superior" text:ref-name="__RefNumPara__23913_622456310">6</text:bookmark-ref></text:span><text:span text:style-name="T97">] </text:span><text:span text:style-name="T102">section 14</text:span><text:span text:style-name="T99">. This component controls the use of Client Side Database Journaling for a given database.</text:span></text:p>
      <text:h text:style-name="Heading_20_3" text:outline-level="3"><text:bookmark-start text:name="__RefHeading___Toc50199_1160916553"/>Properties<text:bookmark-end text:name="__RefHeading___Toc50199_1160916553"/></text:h>
      <table:table table:name="Table85" table:style-name="Table85">
        <table:table-column table:style-name="Table85.A"/>
        <table:table-column table:style-name="Table85.B"/>
        <table:table-row>
          <table:table-cell table:style-name="Table85.A1" office:value-type="string">
            <text:p text:style-name="P221"><text:span text:style-name="Symbol">Database</text:span></text:p>
          </table:table-cell>
          <table:table-cell table:style-name="Table85.B1" office:value-type="string">
            <text:p text:style-name="P629">Link to <text:span text:style-name="T195">a</text:span> <text:span text:style-name="Symbol">TIBDatabase</text:span> component</text:p>
          </table:table-cell>
        </table:table-row>
        <table:table-row>
          <table:table-cell table:style-name="Table85.A2" office:value-type="string">
            <text:p text:style-name="Table_20_Contents"><text:span text:style-name="Symbol">Enabled</text:span></text:p>
          </table:table-cell>
          <table:table-cell table:style-name="Table85.B2" office:value-type="string">
            <text:p text:style-name="Table_20_Contents"><text:span text:style-name="Symbol"><text:span text:style-name="T332">Set to True to start journaling and to false to stop journaling</text:span></text:span></text:p>
          </table:table-cell>
        </table:table-row>
        <table:table-row>
          <table:table-cell table:style-name="Table85.A2" office:value-type="string">
            <text:p text:style-name="P734">JournalFileTemplate</text:p>
          </table:table-cell>
          <table:table-cell table:style-name="Table85.B2" office:value-type="string">
            <text:p text:style-name="Table_20_Contents">JournalFileTemplate determines the name of the journal file and should include a %d where %d is replaced with the session no at run time</text:p>
          </table:table-cell>
        </table:table-row>
        <table:table-row>
          <table:table-cell table:style-name="Table85.A2" office:value-type="string">
            <text:p text:style-name="P735">Vendor Name</text:p>
          </table:table-cell>
          <table:table-cell table:style-name="Table85.B2" table:number-rows-spanned="2" office:value-type="string">
            <text:p text:style-name="Table_20_Contents">Vendor Name and ApplicationName determine the location of the Journal file.</text:p>
            <text:p text:style-name="Table_20_Contents">The Journal file is saved in:</text:p>
            <text:p text:style-name="Table_20_Contents"><text:s text:c="3"/><text:span text:style-name="T25">Unix</text:span>:</text:p>
            <text:p text:style-name="Table_20_Contents"><text:s text:c="6"/>$HOME/.&lt;vendor name&gt;/&lt;application name&gt;/</text:p>
            <text:p text:style-name="Table_20_Contents"><text:s text:c="3"/><text:span text:style-name="T25">Windows</text:span>:</text:p>
            <text:p text:style-name="Table_20_Contents"><text:s text:c="6"/>&lt;User Application Data Dir&gt;\&lt;vendor name&gt;\&lt;application name&gt;\</text:p>
          </table:table-cell>
        </table:table-row>
        <table:table-row>
          <table:table-cell table:style-name="Table85.A2" office:value-type="string">
            <text:p text:style-name="P735">Application Name</text:p>
          </table:table-cell>
          <table:covered-table-cell table:style-name="Table85.B2"/>
        </table:table-row>
        <table:table-row>
          <table:table-cell table:style-name="Table85.A2" office:value-type="string">
            <text:p text:style-name="P735">RetainJournal</text:p>
          </table:table-cell>
          <table:table-cell table:style-name="Table85.B2" office:value-type="string">
            <text:p text:style-name="Table_20_Contents">If RetainJournal is true then when journaling terminat<text:span text:style-name="T388">e</text:span>s <text:span text:style-name="T388">(</text:span>Enabled := false<text:span text:style-name="T388">)</text:span>, or a normal database close, the journal file and journal table (IBX$JOURNALS) <text:span text:style-name="T388">e</text:span>ntries are retained. Otherwise, they are discarded. Note: <text:span text:style-name="T390">the journal file is </text:span>always retained on a Force<text:span text:style-name="T390">d</text:span> Disconnect or a lost connection. <text:span text:style-name="T389">Default false.</text:span></text:p>
          </table:table-cell>
        </table:table-row>
      </table:table>
      <text:p text:style-name="P628"/>
      <text:h text:style-name="P941" text:outline-level="3"><text:bookmark-start text:name="__RefHeading___Toc50201_1160916553"/>Events<text:bookmark-end text:name="__RefHeading___Toc50201_1160916553"/></text:h>
      <table:table table:name="Table86" table:style-name="Table86">
        <table:table-column table:style-name="Table86.A"/>
        <table:table-column table:style-name="Table86.B"/>
        <table:table-row>
          <table:table-cell table:style-name="Table86.A1" office:value-type="string">
            <text:p text:style-name="Table_20_Contents"><text:span text:style-name="Symbol">OnJournalEntry</text:span></text:p>
          </table:table-cell>
          <table:table-cell table:style-name="Table86.B1" office:value-type="string">
            <text:p text:style-name="P737"><text:span text:style-name="T389">This event is called each time a log entry is written to the journal file. It may be used to </text:span><text:span text:style-name="T370">process the journal entry </text:span><text:span text:style-name="T371">by alternative means</text:span><text:span text:style-name="T370">. If this event handler is present then no entries are written to the log file.</text:span></text:p>
          </table:table-cell>
        </table:table-row>
      </table:table>
      <text:h text:style-name="P942" text:outline-level="3"><text:bookmark-start text:name="__RefHeading___Toc50203_1160916553"/>Usage<text:bookmark-end text:name="__RefHeading___Toc50203_1160916553"/></text:h>
      <text:p text:style-name="P630">TIBJournal is normally added to a project at design time. If Enabled is set to true at Design Time then a journal is always created when the database is opened. Depending on the setting of the RetainJournal property it may be deleted when the database is closed normally.</text:p>
      <text:p text:style-name="P630">When journaling is used to support debugging database access logic, then RetainJournal is normally set to true and the developer can then use the journal to debug logic errors.</text:p>
      <text:p text:style-name="P630">If journaling is used to support recovery when a database connection is lost then then <text:span text:style-name="T391">it should be noted that the</text:span> journal file is always left in place <text:span text:style-name="T391">when a database connection is lost </text:span>even if RetainJournal is false. It may then be played back to restore the database to the intended state.</text:p>
      <text:h text:style-name="P941" text:outline-level="3"><text:bookmark-start text:name="__RefHeading___Toc50205_1160916553"/>Playback<text:bookmark-end text:name="__RefHeading___Toc50205_1160916553"/></text:h>
      <text:p text:style-name="P630">The TIBJournal.ReplayJournal method may be used to restore a database to the intended state following a lost connection.</text:p>
      <text:p text:style-name="P630">This method loads and analyses a journal file, identifying any incomplete read/write transactions and any insert/update/delete queries that had been executed under each such transaction. The playback algorithm will then start each <text:span text:style-name="T391">such </text:span>transaction and execute the queries in temporal order. Once finished, each transaction is finalised using the default completion setting for the transaction.</text:p>
      <text:h text:style-name="P978" text:outline-level="4"><text:bookmark-start text:name="__RefHeading___Toc50207_1160916553"/>Generators<text:bookmark-end text:name="__RefHeading___Toc50207_1160916553"/></text:h>
      <text:p text:style-name="P631">Firebird Generators (Sequences) exist outside of any transaction and once incremented the new value is visible to all active transactions. A lost database connection has no impact on the database's generators.</text:p>
      <text:p text:style-name="P631">If generators are used in the preferred manner for an IBX Dataset i.e. defined and used via the GeneratorField property then playback should give the expected result. This is because the insert/update query contains the literal value returned when the generator is incremented. This should be consistent with any references from other tables to this value. </text:p>
      <text:p text:style-name="P631">However, a problem may result if an insert/update query sets a field value to a value returned by the GEN_ID function <text:span text:style-name="T391">that is part of the query SQL</text:span>. This is always a new value and is different from any returned the first time the query was executed. Any references to the original value in the journal will thus be invalid.</text:p>
      <text:p text:style-name="P766">Note: playback is intended for use on the same database for which the connection was lost. Any other database with the same schema (e.g. an empty database) will have different generator values which are likely to be inconsistent with the journal file.</text:p>
      <text:h text:style-name="P943" text:outline-level="3"><text:bookmark-start text:name="__RefHeading___Toc50209_1160916553"/>Playback in a Client Program<text:bookmark-end text:name="__RefHeading___Toc50209_1160916553"/></text:h>
      <text:p text:style-name="P632">IBX allows for transactions to be given unique names. These names are recorded in the journal file. It is thus possible for a user to write their own playback function using the application's own TIBTransaction objects (located by name). The advantage of this approach is that, assuming the transactions are left open when playback is complete, the application<text:span text:style-name="T391">'</text:span>s IBX Datasets may now be opened and appear to have the same state as when the connection was lost. The application user can now continue to complete their work.</text:p>
      <text:h text:style-name="Heading_20_1" text:outline-level="1"><text:bookmark-start text:name="__RefHeading___Toc15728_148275515"/><text:line-break/><text:span text:style-name="T157">Using Firebird Blobs</text:span><text:bookmark-end text:name="__RefHeading___Toc15728_148275515"/></text:h>
      <text:p text:style-name="P518">Binary Large Objects (Blob<text:span text:style-name="T164">s</text:span>) are containers for almost unlimited amounts of binary data held within a Firebird Database. In practice, Blobs are limited by the database architectural limits and available disk storage but, perhaps the most important point is that their <text:span text:style-name="T165">individual</text:span> size limit is not part of the metadata. <text:span text:style-name="T166">IBX supports the use of Firebird Blobs.</text:span></text:p>
      <text:h text:style-name="P856" text:outline-level="2"><text:bookmark-start text:name="__RefHeading___Toc15730_148275515"/>Blob Types<text:bookmark-end text:name="__RefHeading___Toc15730_148275515"/></text:h>
      <text:p text:style-name="P519">From the IBX viewpoint, there are two types of Firebird Blob:</text:p>
      <text:list text:style-name="L84">
        <text:list-item>
          <text:p text:style-name="P1100">Text mode Blobs <text:span text:style-name="T198">(sub type 1)</text:span> that consist of character data in known character set (e.g. UTF8), or</text:p>
        </text:list-item>
        <text:list-item>
          <text:p text:style-name="P1100">Binary mode Blobs for which the data type is unknown to IBX.</text:p>
        </text:list-item>
      </text:list>
      <text:p text:style-name="P52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519">Text Mode Blobs are represented by a <text:span text:style-name="Symbol">TIBMemoField </text:span>dataset field type. This is a <text:span text:style-name="Symbol">TBlobField</text:span> descendent and provides access to the Blob Data as AnsiStrings:</text:p>
      <text:list xml:id="list2759033064" text:style-name="L85">
        <text:list-item>
          <text:p text:style-name="P1101">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101">Use the <text:span text:style-name="Symbol">SaveToFile</text:span> method to save the contents of a text blob to a file.</text:p>
        </text:list-item>
        <text:list-item>
          <text:p text:style-name="P1101">Use the <text:span text:style-name="Symbol">LoadFromFile</text:span> method to load the contents of a text blob from a file.</text:p>
        </text:list-item>
      </text:list>
      <text:p text:style-name="P519"><text:soft-page-break/>The data aware control <text:span text:style-name="Symbol">TMemo</text:span>, can be used to both display and edit the text in a text blob.</text:p>
      <text:p text:style-name="P519">In practice, the main difference between <text:span text:style-name="Symbol">TIBMemoFields</text:span> and basic string fields is that the former has no strong limits on how long the string is, <text:span text:style-name="T249">and which is </text:span>limited only by architectural constraints.</text:p>
      <text:h text:style-name="Heading_20_3" text:outline-level="3"><text:bookmark-start text:name="__RefHeading___Toc15732_148275515"/>Binary Blobs<text:bookmark-end text:name="__RefHeading___Toc15732_148275515"/></text:h>
      <text:p text:style-name="P519">Binary blobs are used for many different purposes including holding image data. Binary Blobs are represented by the <text:span text:style-name="Symbol">TBlobField</text:span> dataset field type:</text:p>
      <text:list text:continue-numbering="true" text:style-name="L85">
        <text:list-item>
          <text:p text:style-name="P1102">Use the <text:span text:style-name="Symbol">AsString</text:span> property to both read and write the entire text blob. <text:span text:style-name="T167">The string is always read as an untyped string and, on write, any string code page is ignored.</text:span></text:p>
        </text:list-item>
        <text:list-item>
          <text:p text:style-name="P1102">Use the <text:span text:style-name="Symbol">SaveToFile</text:span> method to save the contents of a <text:span text:style-name="T167">binary</text:span> blob to a file.</text:p>
        </text:list-item>
        <text:list-item>
          <text:p text:style-name="P1102">Use the <text:span text:style-name="Symbol">LoadFromFile</text:span> method to load the contents of a <text:span text:style-name="T167">binary</text:span> blob from a file.</text:p>
        </text:list-item>
      </text:list>
      <text:p text:style-name="P172">If the Blob contains image data, then the <text:span text:style-name="Symbol">TDBImage</text:span> control may be used to display and update the Blob data.</text:p>
      <text:h text:style-name="P857" text:outline-level="2"><text:bookmark-start text:name="__RefHeading___Toc15734_148275515"/>Stream Mode access to Blobs<text:bookmark-end text:name="__RefHeading___Toc15734_148275515"/></text:h>
      <text:p text:style-name="P172">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173">function CreateBlobStream(Field: TField; Mode: TBlobStreamMode): TStream;</text:p>
      <text:p text:style-name="P17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71">A Blob stream may be read from or written to in the same way as any other TStream descendent.</text:p>
      <text:p text:style-name="P171">A Blob updated using a Blob stream updates the data in the current row. This must be “posted” in order to be written to the database.</text:p>
      <text:p text:style-name="P251">For example:</text:p>
      <text:p text:style-name="P252">var S, <text:span text:style-name="T250">F</text:span>: TStream;</text:p>
      <text:p text:style-name="P252">begin</text:p>
      <text:p text:style-name="P252"><text:s text:c="2"/>MyDataset.Edit;</text:p>
      <text:p text:style-name="P252"><text:s text:c="2"/>S := MyDataset.CreateBlobStream(MyBlobField,bmWrite);</text:p>
      <text:p text:style-name="P253"><text:s text:c="2"/><text:span text:style-name="T250">F := TFileStream.Create('</text:span>someimage.png',<text:span text:style-name="T250">fmOpenRead);</text:span></text:p>
      <text:p text:style-name="P252"><text:s text:c="2"/><text:span text:style-name="T250">S.CopyFrom(F,0)</text:span>;</text:p>
      <text:p text:style-name="P252"><text:s text:c="2"/>MyDataset.Post;</text:p>
      <text:p text:style-name="P252"><text:s text:c="2"/><text:span text:style-name="T250">S.Free;</text:span></text:p>
      <text:p text:style-name="P252"><text:s text:c="2"/><text:span text:style-name="T250">F.Free;</text:span></text:p>
      <text:h text:style-name="P819" text:outline-level="1"><text:bookmark-start text:name="__RefHeading__23447_1844166745"/><text:line-break/><text:span text:style-name="T157">Using Firebird Arrays</text:span><text:bookmark-end text:name="__RefHeading__23447_1844166745"/></text:h>
      <text:p text:style-name="P15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55">Starting with IBX2, IBX now offers full support for Firebird Arrays:</text:p>
      <text:list text:style-name="L86">
        <text:list-item>
          <text:p text:style-name="P1162">The Firebird Language Bindings <text:span text:style-name="T76">in the </text:span><text:span text:style-name="T19">fbintf</text:span><text:span text:style-name="T7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6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62">The IBControls Package now includes a <text:span text:style-name="Symbol">TIBArrayGrid</text:span> visual control <text:span text:style-name="T199">(see </text:span><text:span text:style-name="T199"><text:bookmark-ref text:reference-format="number" text:ref-name="__RefHeading__26994_1844166745">Error: Reference source not found</text:bookmark-ref></text:span><text:span text:style-name="T199">)</text:span>. This is a <text:span text:style-name="Symbol">TCustomStringGrid</text:span> descendent and may be used to display and edit an array element. Examples are provided for both one and two dimensional arrays.</text:p>
        </text:list-item>
      </text:list>
      <text:p text:style-name="P155">The IArray interface is documented as part of the <text:span text:style-name="T12">fbintf</text:span> package.. <text:span text:style-name="T153">See the Firebird Pascal API Guide chapter 8.</text:span></text:p>
      <text:h text:style-name="P858" text:outline-level="2"><text:bookmark-start text:name="__RefHeading___Toc15736_148275515"/>Defining an Array Element<text:bookmark-end text:name="__RefHeading___Toc15736_148275515"/></text:h>
      <text:p text:style-name="P155">This is fully described in the Firebird Document. For example:</text:p>
      <text:p text:style-name="P391"><text:s/><text:span text:style-name="T105">Alter Table MyData (</text:span></text:p>
      <text:p text:style-name="P391"><text:s text:c="4"/>...</text:p>
      <text:p text:style-name="P391"><text:s text:c="4"/>MyArray VarChar(16) [0:16, -1:7] Character Set UTF8</text:p>
      <text:p text:style-name="P391"><text:soft-page-break/><text:s text:c="2"/>);</text:p>
      <text:p text:style-name="P155"><text:span text:style-name="T77">An</text:span> array may ha<text:span text:style-name="T77">ve</text:span> a different set of values for each row. In the above example, <text:s/>a two dimensional array of strings is defined. The first index may vary from 0 to 16 and the second from -1 to 7.</text:p>
      <text:h text:style-name="P858" text:outline-level="2"><text:bookmark-start text:name="__RefHeading___Toc11723_27826370"/>TIBArrayField<text:bookmark-end text:name="__RefHeading___Toc11723_27826370"/></text:h>
      <text:p text:style-name="P15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55">TIBArrayField <text:span text:style-name="T7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675"><text:span text:style-name="Symbol">ArrayID: TISC_QUAD</text:span></text:p>
          </table:table-cell>
          <table:table-cell table:style-name="Table12.B1" office:value-type="string">
            <text:p text:style-name="P675">This provides access to the Firebird internal array identifier stored in the row itself. This is not normally of direct interest to users.</text:p>
          </table:table-cell>
        </table:table-row>
        <table:table-row>
          <table:table-cell table:style-name="Table12.A2" office:value-type="string">
            <text:p text:style-name="P675"><text:span text:style-name="Symbol">ArrayIntf: IArray</text:span></text:p>
          </table:table-cell>
          <table:table-cell table:style-name="Table12.B2" office:value-type="string">
            <text:p text:style-name="P67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675">Assigning an empty array to this property provides an alternative means to setting the field to null. (<text:span text:style-name="T76">S</text:span>etting the field IsNull property to true is <text:span text:style-name="T76">the </text:span>recommended <text:span text:style-name="T76">method</text:span>).</text:p>
          </table:table-cell>
        </table:table-row>
        <table:table-row>
          <table:table-cell table:style-name="Table12.A2" office:value-type="string">
            <text:p text:style-name="P675"><text:span text:style-name="Symbol">ArrayDimensions: integer</text:span></text:p>
          </table:table-cell>
          <table:table-cell table:style-name="Table12.B2" office:value-type="string">
            <text:p text:style-name="P675">Returns the number of dimensions in the array.</text:p>
          </table:table-cell>
        </table:table-row>
        <table:table-row>
          <table:table-cell table:style-name="Table12.A2" office:value-type="string">
            <text:p text:style-name="P675"><text:span text:style-name="Symbol">ArrayBounds: TArrayBounds</text:span></text:p>
          </table:table-cell>
          <table:table-cell table:style-name="Table12.B2" office:value-type="string">
            <text:p text:style-name="P675">This is a (pascal) <text:span text:style-name="T76">dynamic </text:span>array and returns an element for each dimension in the array, providing the upper and lower bound for that dimension.</text:p>
          </table:table-cell>
        </table:table-row>
      </table:table>
      <text:p text:style-name="P155"/>
      <text:p text:style-name="P170"><text:span text:style-name="Symbol">TIBArrayField</text:span> also provides an additional method:</text:p>
      <text:p text:style-name="P389">function CreateArray: IArray;</text:p>
      <text:p text:style-name="P170">This may be used to obtain an interface to a new empty array <text:span text:style-name="T76">and which</text:span> is compatible with the field. Once populated, it can be assigned to the ArrayIntf property and its contents will be saved as the value of the array field once the dataset has been “posted”.</text:p>
      <text:p text:style-name="P39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20" text:outline-level="1"><text:bookmark-start text:name="__RefHeading___Toc26691_2092659162"/><text:line-break/><text:span text:style-name="T106">Using Firebird Services</text:span><text:bookmark-end text:name="__RefHeading___Toc26691_2092659162"/></text:h>
      <text:p text:style-name="P427">The Firebird Services API was introduced in InterBase 6.0 and is available in all versions of Firebird. It supports:</text:p>
      <text:list text:style-name="L87">
        <text:list-item>
          <text:p text:style-name="P1103">Access to server and per database properties and statistics</text:p>
        </text:list-item>
        <text:list-item>
          <text:p text:style-name="P1104">Database Backup and Restore</text:p>
        </text:list-item>
        <text:list-item>
          <text:p text:style-name="P1104">Security Database Management (user credentials)</text:p>
        </text:list-item>
        <text:list-item>
          <text:p text:style-name="P1104">Database Validation and Error Recovery</text:p>
        </text:list-item>
        <text:list-item>
          <text:p text:style-name="P1104">Database configuration parameter management.</text:p>
        </text:list-item>
      </text:list>
      <text:p text:style-name="P427">These functions correspond to the functionality provided by the Firebird command line utilities gbak, gfix and gsec.</text:p>
      <text:p text:style-name="P427">IBX provides access to the services API through a set of non-visual components located on the Firebird Admin palette. Each component is focused on a specific subset of the Services API. <text:span text:style-name="T108">An example program illustrates the use of each of the Firebird Admin components. This is located in “ibx/examples/services”.</text:span></text:p>
      <text:p text:style-name="P587">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59" text:outline-level="2"><text:bookmark-start text:name="__RefHeading___Toc15738_148275515"/>Introducing the new IBX Services Components<text:bookmark-end text:name="__RefHeading___Toc15738_148275515"/></text:h>
      <text:p text:style-name="P587">At first sight, the new set of components looks very similar to the previous set with the component names differing only by being prefixed by “TIBX”, instead of “TIB”. However, there are <text:span text:style-name="T323">also some </text:span>important differences:</text:p>
      <text:list text:style-name="L88">
        <text:list-item>
          <text:p text:style-name="P1105">There is a new TIBXServicesConnection component. This represents the connection to the Firebird Services API and provides a single focus for managing the connection. In the legacy components, each component was designed to have a separate Services API connection. The programmer then had to copy connection parameters between <text:soft-page-break/>components to avoid the user having to log in separately to each service. The new component subclasses T<text:span text:style-name="T291">C</text:span>ustomConnection and is hence similar to TIBDatabase.</text:p>
        </text:list-item>
        <text:list-item>
          <text:p text:style-name="P1105">The services components ha<text:span text:style-name="T323">ve</text:span> lost the “ServerName” and “Params” properties and any others associated with the services connection. These are replaced with a reference to the common TIBXServicesConnection component.</text:p>
        </text:list-item>
        <text:list-item>
          <text:p text:style-name="P1105">The “ServiceStart” and similar level methods are no longer publicly visible. Instead, methods are available that carry out the intended function in a single call. In many cases, a single “Execute” method is used.</text:p>
        </text:list-item>
        <text:list-item>
          <text:p text:style-name="P1106">Separate Client and Server side backup and restore components are available with properties and methods appropriate to each type</text:p>
        </text:list-item>
        <text:list-item>
          <text:p text:style-name="P1105">There are two TMemDataset subclasses available (TIBXServicesUserList and TIBXServicesLimboTransactionsList). These are available as managed <text:span text:style-name="T315">datasets for</text:span> User Management and Limbo Transaction Resolution and which can be used as Data Sources for a TDBGrid.</text:p>
        </text:list-item>
      </text:list>
      <text:h text:style-name="P86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2" draw:name="Image53" text:anchor-type="paragraph" svg:width="0.3465in" svg:height="0.3465in" draw:z-index="62"><draw:image xlink:href="Pictures/100000010000001900000019E3FDC2AA.png" xlink:type="simple" xlink:show="embed" xlink:actuate="onLoad" draw: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588">This represents the connection to the Firebird Services API and provides a single focus for managing the connection. <text:span text:style-name="T291">It is required for all applications that use the Services API. It is a </text:span>T<text:span text:style-name="T291">C</text:span>ustomConnection <text:span text:style-name="T291">descendent.</text:span></text:p>
          </table:table-cell>
        </table:table-row>
        <table:table-row>
          <table:table-cell table:style-name="Table15.A2" office:value-type="string">
            <text:p text:style-name="Table_20_Contents"><draw:frame draw:style-name="fr11" draw:name="Image27" text:anchor-type="paragraph" svg:width="0.3465in" svg:height="0.3465in" draw:z-index="63"><draw:image xlink:href="Pictures/100000010000001900000019CA73D5F4.png" xlink:type="simple" xlink:show="embed" xlink:actuate="onLoad" draw:mime-type="image/png"/></draw:frame></text:p>
          </table:table-cell>
          <table:table-cell table:style-name="Table15.A2" office:value-type="string">
            <text:p text:style-name="P433"><text:span text:style-name="Symbol"><text:span text:style-name="T291">TIBXClientSideBackupService</text:span></text:span></text:p>
          </table:table-cell>
          <table:table-cell table:style-name="Table15.C2" office:value-type="string">
            <text:p text:style-name="P428">The <text:span text:style-name="T291">client side </text:span>backup service supports database backup to gbak format archives <text:span text:style-name="T291">and with the destination on the client system.</text:span></text:p>
          </table:table-cell>
        </table:table-row>
        <table:table-row>
          <table:table-cell table:style-name="Table15.A2" office:value-type="string">
            <text:p text:style-name="Table_20_Contents"><draw:frame draw:style-name="fr12" draw:name="Image54" text:anchor-type="paragraph" svg:width="0.3465in" svg:height="0.3465in" draw:z-index="64"><draw:image xlink:href="Pictures/100000000000001900000019115CBB20.png" xlink:type="simple" xlink:show="embed" xlink:actuate="onLoad" draw:mime-type="image/png"/></draw:frame></text:p>
          </table:table-cell>
          <table:table-cell table:style-name="Table15.A2" office:value-type="string">
            <text:p text:style-name="P711">TIBXServerSideBackupService</text:p>
          </table:table-cell>
          <table:table-cell table:style-name="Table15.C2" office:value-type="string">
            <text:p text:style-name="P433">The <text:span text:style-name="T291">server side </text:span>backup service supports database backup to gbak format archives <text:span text:style-name="T291">and with the destination on the server.</text:span></text:p>
          </table:table-cell>
        </table:table-row>
        <table:table-row>
          <table:table-cell table:style-name="Table15.A2" office:value-type="string">
            <text:p text:style-name="Table_20_Contents"><draw:frame draw:style-name="fr11" draw:name="Image28" text:anchor-type="paragraph" svg:width="0.3465in" svg:height="0.3465in" draw:z-index="65"><draw:image xlink:href="Pictures/100000010000001900000019EFC0A37E.png" xlink:type="simple" xlink:show="embed" xlink:actuate="onLoad" draw:mime-type="image/png"/></draw:frame></text:p>
          </table:table-cell>
          <table:table-cell table:style-name="Table15.A2" office:value-type="string">
            <text:p text:style-name="P433"><text:span text:style-name="Symbol"><text:span text:style-name="T291">TIBXClientSideRestoreService</text:span></text:span></text:p>
          </table:table-cell>
          <table:table-cell table:style-name="Table15.C2" office:value-type="string">
            <text:p text:style-name="P429">The <text:span text:style-name="T291">client side </text:span>re<text:span text:style-name="T107">store service supports database restore from a gbak format archive located on the client system</text:span>.</text:p>
          </table:table-cell>
        </table:table-row>
        <table:table-row>
          <table:table-cell table:style-name="Table15.A2" office:value-type="string">
            <text:p text:style-name="Table_20_Contents"><draw:frame draw:style-name="fr12" draw:name="Image55" text:anchor-type="paragraph" svg:width="0.3465in" svg:height="0.3465in" draw:z-index="66"><draw:image xlink:href="Pictures/1000000100000019000000196D13A7C6.png" xlink:type="simple" xlink:show="embed" xlink:actuate="onLoad" draw:mime-type="image/png"/></draw:frame></text:p>
          </table:table-cell>
          <table:table-cell table:style-name="Table15.A2" office:value-type="string">
            <text:p text:style-name="P711">TIBXServerSideRestoreService</text:p>
          </table:table-cell>
          <table:table-cell table:style-name="Table15.C2" office:value-type="string">
            <text:p text:style-name="P433">The <text:span text:style-name="T291">server side </text:span>re<text:span text:style-name="T107">store service supports database restore from a gbak format archive located on the server</text:span>.</text:p>
          </table:table-cell>
        </table:table-row>
        <table:table-row>
          <table:table-cell table:style-name="Table15.A2" office:value-type="string">
            <text:p text:style-name="Table_20_Contents"><draw:frame draw:style-name="fr11" draw:name="Image29" text:anchor-type="paragraph" svg:width="0.3465in" svg:height="0.3465in" draw:z-index="57"><draw:image xlink:href="Pictures/10000001000000190000001930B14E3D.png" xlink:type="simple" xlink:show="embed" xlink:actuate="onLoad" draw:mime-type="image/png"/></draw:frame></text:p>
          </table:table-cell>
          <table:table-cell table:style-name="Table15.A2" office:value-type="string">
            <text:p text:style-name="P642"><text:span text:style-name="Symbol">TIB</text:span><text:span text:style-name="Symbol"><text:span text:style-name="T291">X</text:span></text:span><text:span text:style-name="Symbol">ConfigService</text:span></text:p>
          </table:table-cell>
          <table:table-cell table:style-name="Table15.C2" office:value-type="string">
            <text:p text:style-name="P642">The configuration service allows database parameter<text:span text:style-name="T251">s</text:span> to be modified, including whether the database is online, sync versus async writes, etc.</text:p>
          </table:table-cell>
        </table:table-row>
        <table:table-row>
          <table:table-cell table:style-name="Table15.A2" office:value-type="string">
            <text:p text:style-name="Table_20_Contents"><draw:frame draw:style-name="fr10" draw:name="Image30" text:anchor-type="paragraph" svg:width="0.3465in" svg:height="0.3465in" draw:z-index="58"><draw:image xlink:href="Pictures/1000000100000019000000198E2981B4.png" xlink:type="simple" xlink:show="embed" xlink:actuate="onLoad" draw:mime-type="image/png"/></draw:frame></text:p>
          </table:table-cell>
          <table:table-cell table:style-name="Table15.A2" office:value-type="string">
            <text:p text:style-name="P642"><text:span text:style-name="Symbol">TIB</text:span><text:span text:style-name="Symbol"><text:span text:style-name="T291">X</text:span></text:span><text:span text:style-name="Symbol">ServerProperties</text:span></text:p>
          </table:table-cell>
          <table:table-cell table:style-name="Table15.C2" office:value-type="string">
            <text:p text:style-name="P642">This service retrieves various server properties including the server version information, server parameters and the current status of database attachments.</text:p>
          </table:table-cell>
        </table:table-row>
        <text:soft-page-break/>
        <table:table-row>
          <table:table-cell table:style-name="Table15.A2" office:value-type="string">
            <text:p text:style-name="Table_20_Contents"><draw:frame draw:style-name="fr10" draw:name="Image31" text:anchor-type="paragraph" svg:width="0.3465in" svg:height="0.3465in" draw:z-index="59"><draw:image xlink:href="Pictures/1000000100000019000000194A355D5E.png" xlink:type="simple" xlink:show="embed" xlink:actuate="onLoad" draw:mime-type="image/png"/></draw:frame></text:p>
          </table:table-cell>
          <table:table-cell table:style-name="Table15.A2" office:value-type="string">
            <text:p text:style-name="P642"><text:span text:style-name="Symbol">TIB</text:span><text:span text:style-name="Symbol"><text:span text:style-name="T291">X</text:span></text:span><text:span text:style-name="Symbol">LogService</text:span></text:p>
          </table:table-cell>
          <table:table-cell table:style-name="Table15.C2" office:value-type="string">
            <text:p text:style-name="P642">This service supports the retrieval of the server log file contents.</text:p>
          </table:table-cell>
        </table:table-row>
        <table:table-row>
          <table:table-cell table:style-name="Table15.A2" office:value-type="string">
            <text:p text:style-name="Table_20_Contents"><draw:frame draw:style-name="fr10" draw:name="Image32" text:anchor-type="paragraph" svg:width="0.3465in" svg:height="0.3465in" draw:z-index="60"><draw:image xlink:href="Pictures/100000010000001900000019827962D3.png" xlink:type="simple" xlink:show="embed" xlink:actuate="onLoad" draw:mime-type="image/png"/></draw:frame></text:p>
          </table:table-cell>
          <table:table-cell table:style-name="Table15.A2" office:value-type="string">
            <text:p text:style-name="P642"><text:span text:style-name="Symbol">TIB</text:span><text:span text:style-name="Symbol"><text:span text:style-name="T291">X</text:span></text:span><text:span text:style-name="Symbol">StatisticalService</text:span></text:p>
          </table:table-cell>
          <table:table-cell table:style-name="Table15.C2" office:value-type="string">
            <text:p text:style-name="P642">This service supports the retrieval of per database statistics.</text:p>
          </table:table-cell>
        </table:table-row>
        <table:table-row>
          <table:table-cell table:style-name="Table15.A2" office:value-type="string">
            <text:p text:style-name="Table_20_Contents"><draw:frame draw:style-name="fr10" draw:name="Image33" text:anchor-type="paragraph" svg:width="0.3465in" svg:height="0.3465in" draw:z-index="61"><draw:image xlink:href="Pictures/100000010000001900000019062117C5.png" xlink:type="simple" xlink:show="embed" xlink:actuate="onLoad" draw:mime-type="image/png"/></draw:frame></text:p>
          </table:table-cell>
          <table:table-cell table:style-name="Table15.A2" office:value-type="string">
            <text:p text:style-name="P642"><text:span text:style-name="Symbol">TIB</text:span><text:span text:style-name="Symbol"><text:span text:style-name="T291">X</text:span></text:span><text:span text:style-name="Symbol">SecurityService</text:span></text:p>
          </table:table-cell>
          <table:table-cell table:style-name="Table15.C2" office:value-type="string">
            <text:p text:style-name="P642">This service supports management of the User Security Database.</text:p>
          </table:table-cell>
        </table:table-row>
        <table:table-row>
          <table:table-cell table:style-name="Table15.A2" office:value-type="string">
            <text:p text:style-name="Table_20_Contents"><draw:frame draw:style-name="fr10" draw:name="Image34" text:anchor-type="paragraph" svg:width="0.3465in" svg:height="0.3465in" draw:z-index="67"><draw:image xlink:href="Pictures/100000010000001900000019A2A42BAF.png" xlink:type="simple" xlink:show="embed" xlink:actuate="onLoad" draw:mime-type="image/png"/></draw:frame></text:p>
          </table:table-cell>
          <table:table-cell table:style-name="Table15.A2" office:value-type="string">
            <text:p text:style-name="P642"><text:span text:style-name="Symbol">TIB</text:span><text:span text:style-name="Symbol"><text:span text:style-name="T291">X</text:span></text:span><text:span text:style-name="Symbol">ValidationService</text:span></text:p>
          </table:table-cell>
          <table:table-cell table:style-name="Table15.C2" office:value-type="string">
            <text:p text:style-name="P642">This service supports the invocation of various database repair actions, including validation and sweep. </text:p>
          </table:table-cell>
        </table:table-row>
        <table:table-row>
          <table:table-cell table:style-name="Table15.A2" office:value-type="string">
            <text:p text:style-name="Table_20_Contents"><draw:frame draw:style-name="fr9" draw:name="Image56" text:anchor-type="paragraph" svg:width="0.278in" svg:height="0.278in" draw:z-index="68"><draw:image xlink:href="Pictures/100000010000001900000019BC0350E3.png" xlink:type="simple" xlink:show="embed" xlink:actuate="onLoad" draw:mime-type="image/png"/></draw:frame></text:p>
          </table:table-cell>
          <table:table-cell table:style-name="Table15.A2" office:value-type="string">
            <text:p text:style-name="P711">TIBXLimboTransactionResolutionService</text:p>
          </table:table-cell>
          <table:table-cell table:style-name="Table15.C2" office:value-type="string">
            <text:p text:style-name="P711">This services allows both the listing of any Limbo Transactions and their resolution.</text:p>
          </table:table-cell>
        </table:table-row>
        <table:table-row>
          <table:table-cell table:style-name="Table15.A2" office:value-type="string">
            <text:p text:style-name="Table_20_Contents"><draw:frame draw:style-name="fr9" draw:name="Image43" text:anchor-type="paragraph" svg:width="0.3465in" svg:height="0.3465in" draw:z-index="69"><draw:image xlink:href="Pictures/1000000100000019000000198CDE5D53.png" xlink:type="simple" xlink:show="embed" xlink:actuate="onLoad" draw:mime-type="image/png"/></draw:frame></text:p>
          </table:table-cell>
          <table:table-cell table:style-name="Table15.A2" office:value-type="string">
            <text:p text:style-name="P707">TIB<text:span text:style-name="T291">X</text:span>OnlineValidationService</text:p>
          </table:table-cell>
          <table:table-cell table:style-name="Table15.C2" office:value-type="string">
            <text:p text:style-name="P70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9" draw:name="Image57" text:anchor-type="paragraph" svg:width="0.2602in" svg:height="0.2602in" draw:z-index="70"><draw:image xlink:href="Pictures/100000010000001900000019240033AF.png" xlink:type="simple" xlink:show="embed" xlink:actuate="onLoad" draw:mime-type="image/png"/></draw:frame></text:p>
          </table:table-cell>
          <table:table-cell table:style-name="Table15.A2" office:value-type="string">
            <text:p text:style-name="P712">TIBXServicesUserList</text:p>
          </table:table-cell>
          <table:table-cell table:style-name="Table15.C2" office:value-type="string">
            <text:p text:style-name="P71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9" draw:name="Image58" text:anchor-type="paragraph" svg:width="0.2602in" svg:height="0.2602in" draw:z-index="71"><draw:image xlink:href="Pictures/10000001000000190000001958E2CFA0.png" xlink:type="simple" xlink:show="embed" xlink:actuate="onLoad" draw:mime-type="image/png"/></draw:frame></text:p>
          </table:table-cell>
          <table:table-cell table:style-name="Table15.A2" office:value-type="string">
            <text:p text:style-name="P712">TIBXServicesLimboTransactions<text:line-break/>List</text:p>
          </table:table-cell>
          <table:table-cell table:style-name="Table15.C2" office:value-type="string">
            <text:p text:style-name="P712">This is a TMemDataset descendent and works with a <text:span text:style-name="T291">TIBXLimboTransactionResolutionService</text:span> to provide a means to display and fix a database's Limbo transactions, if any.</text:p>
          </table:table-cell>
        </table:table-row>
      </table:table>
      <text:p text:style-name="P599"/>
      <text:h text:style-name="P861" text:outline-level="2"><text:bookmark-start text:name="__RefHeading___Toc15740_148275515"/>Common Concepts<text:bookmark-end text:name="__RefHeading___Toc15740_148275515"/></text:h>
      <text:p text:style-name="P600">A <text:span text:style-name="T292">TIBXServicesConnection </text:span>represents the connection to a given Server's Services API and at least one <text:span text:style-name="T292">TIBXServicesConnection </text:span>component must be included in a project in order to use the Services <text:s/>API.</text:p>
      <text:p text:style-name="P600">The functions available through the Services API are then packaged into individual components, each of which provides a related set of services. </text:p>
      <text:list text:style-name="L89">
        <text:list-item>
          <text:p text:style-name="P1107">All components that provide access to the Services API have a “ServicesConnection” property that identifies the <text:span text:style-name="T292">TIBXServicesConnection </text:span>component providing the connection to the Server's Services API.</text:p>
        </text:list-item>
        <text:list-item>
          <text:p text:style-name="P1107">Each component that accesses services targeted on a named database, have a “DatabaseName” property. This is either an alias name or the full pathname of a database on the server to which the <text:span text:style-name="T292">TIBXServicesConnection </text:span>is connected to.</text:p>
        </text:list-item>
      </text:list>
      <text:h text:style-name="P944" text:outline-level="3"><text:bookmark-start text:name="__RefHeading___Toc15742_148275515"/><text:soft-page-break/>Common Reporting and Event Handling<text:bookmark-end text:name="__RefHeading___Toc15742_148275515"/></text:h>
      <text:p text:style-name="P328">Many of the services <text:span text:style-name="T311">components</text:span> return a report in an OutputLog (TStrings). This is typically returned by the Execute Method i.e.</text:p>
      <text:p text:style-name="P329">procedure Execute(OutputLog: TStrings);</text:p>
      <text:p text:style-name="P328">Each line in the report is returned individually from the server. However, the OutputLog is only available when the action completes. However, it is possible to inspect each line of text as it is returned using the service's OnGetNextLine event handler:</text:p>
      <text:p text:style-name="P329">TIBXOnGetNextLine = procedure(Sender: TObject; var Line: string) of object;</text:p>
      <text:p text:style-name="P329">property OnGetNextLine: TIBXOnGetNextLine read FOnGetNextLine write FOnGetNextLine;</text:p>
      <text:p text:style-name="P327">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48">Application.ProcessMessages;</text:p>
      <text:p text:style-name="P327">If the event handler is used to display each line and there is no role for an OutputLog, then <text:span text:style-name="T315">the</text:span> parameter may be set to <text:span text:style-name="T315">nil</text:span>.</text:p>
      <text:h text:style-name="P862" text:outline-level="2"><text:bookmark-start text:name="__RefHeading___Toc14611_1530645906"/>The TIBXServicesConnection<text:bookmark-end text:name="__RefHeading___Toc14611_1530645906"/></text:h>
      <text:p text:style-name="P589">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15">descendants</text:span> such as TIBDatabase. </text:p>
      <text:h text:style-name="P945"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585"><text:span text:style-name="Symbol"><text:span text:style-name="T292">Connected</text:span></text:span></text:p>
          </table:table-cell>
          <table:table-cell table:style-name="Table16.B1" office:value-type="string">
            <text:p text:style-name="P582">Set to true to attach to the server and establish a connection with it.</text:p>
            <text:p text:style-name="P582">Set to false to terminate an active connection.</text:p>
          </table:table-cell>
        </table:table-row>
        <table:table-row>
          <table:table-cell table:style-name="Table16.A2" office:value-type="string">
            <text:p text:style-name="P343"><text:span text:style-name="Symbol">ConfigOverrides</text:span></text:p>
          </table:table-cell>
          <table:table-cell table:style-name="Table16.B2" office:value-type="string">
            <text:p text:style-name="P343">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1">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47">The same guidelines apply to the use of this property as for its use with a TIBDatabase (see </text:span><text:span text:style-name="T347"><text:bookmark-ref text:reference-format="number" text:ref-name="__RefHeading___Toc22717_858839226">5.1.12</text:bookmark-ref></text:span><text:span text:style-name="T347">).</text:span></text:p>
            <text:p text:style-name="P728">Note: the pathname is platform dependent.</text:p>
          </table:table-cell>
        </table:table-row>
        <text:soft-page-break/>
        <table:table-row>
          <table:table-cell table:style-name="Table16.A2" office:value-type="string">
            <text:p text:style-name="P727">FirebirdAPI</text:p>
          </table:table-cell>
          <table:table-cell table:style-name="Table16.B2" office:value-type="string">
            <text:p text:style-name="P727">This read only public property returns the IFirebirdAPI interface to the Firebird Library used to access the <text:span text:style-name="T345">services interface</text:span>.</text:p>
          </table:table-cell>
        </table:table-row>
        <table:table-row>
          <table:table-cell table:style-name="Table16.A2" office:value-type="string">
            <text:p text:style-name="P582"><text:span text:style-name="Symbol">LoginPrompt</text:span></text:p>
          </table:table-cell>
          <table:table-cell table:style-name="Table16.B2" office:value-type="string">
            <text:p text:style-name="P582">Set to true to enable use of the built-in login prompt dialog.</text:p>
          </table:table-cell>
        </table:table-row>
        <table:table-row>
          <table:table-cell table:style-name="Table16.A2" office:value-type="string">
            <text:p text:style-name="P582"><text:span text:style-name="Symbol">Params</text:span></text:p>
          </table:table-cell>
          <table:table-cell table:style-name="Table16.B2" office:value-type="string">
            <text:p text:style-name="P582">Holds the login user name and password, as a list of keyword equals string (e.g. user_name=SYSDBA, password=masterkey). I<text:span text:style-name="T315">t</text:span> is recommended that the password is not set at design time. <text:span text:style-name="T199">A component editor is available to set each service's parameters.</text:span></text:p>
          </table:table-cell>
        </table:table-row>
        <table:table-row>
          <table:table-cell table:style-name="Table16.A2" office:value-type="string">
            <text:p text:style-name="P582"><text:span text:style-name="Symbol">Protocol</text:span></text:p>
          </table:table-cell>
          <table:table-cell table:style-name="Table16.B2" office:value-type="string">
            <text:p text:style-name="P585">Determines the connection type (local, TCP, SPX, Named Pipe, <text:span text:style-name="T292">inet, wnet or xnet</text:span>). <text:span text:style-name="T293">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582"><text:span text:style-name="Symbol">ServerName</text:span></text:p>
          </table:table-cell>
          <table:table-cell table:style-name="Table16.B2" office:value-type="string">
            <text:p text:style-name="P585">The (domain) name of the server. <text:span text:style-name="T292">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700"><text:span text:style-name="Symbol">ServerVersionNo</text:span></text:p>
          </table:table-cell>
          <table:table-cell table:style-name="Table16.B2" office:value-type="string">
            <text:p text:style-name="P700">A <text:span text:style-name="T292">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438">The public property <text:span text:style-name="T97">ServiceIntf</text:span> exposes the IServiceManager interface used to communicate with the server. This interface is available (non-nil) when <text:span text:style-name="T292">Connected</text:span> is true.</text:p>
            <text:p text:style-name="P611">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343"><text:span text:style-name="Symbol">WireCompression</text:span></text:p>
          </table:table-cell>
          <table:table-cell table:style-name="Table16.B2" office:value-type="string">
            <text:p text:style-name="P343">This is a “convenience” property. If set to true then “WireCompression=true” is added to the ConfigOverrides property, If set to false then then “WireCompression=” line is removed from ConfigOverrides.</text:p>
            <text:p text:style-name="P344">Note: you may set “WireCompression=false” explicitly in the ConfigOverrides in order to override a default of “WireCompression=true”.</text:p>
          </table:table-cell>
        </table:table-row>
      </table:table>
      <text:p text:style-name="P581"/>
      <text:h text:style-name="P945" text:outline-level="3"><text:bookmark-start text:name="__RefHeading___Toc15744_148275515"/>Event handling<text:bookmark-end text:name="__RefHeading___Toc15744_148275515"/></text:h>
      <text:p text:style-name="P589">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589">This can be used to replace the built-in login dialog to provide the servername, username and password either <text:soft-page-break/>programatically or by your own dialog <text:span text:style-name="T315">or some other means of determining the user name and password</text:span>.</text:p>
            <text:p text:style-name="P589">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28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text:style-name="L4">
              <text:list-item>
                <text:p text:style-name="P1108">scRaiseError (default) to abort the current action and raise an exception.</text:p>
              </text:list-item>
              <text:list-item>
                <text:p text:style-name="P1108">scReconnect to drop the current services API connection and to log in using the same security database as used by the user database. <text:span text:style-name="T31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271"/>
      <text:h text:style-name="P946" text:outline-level="3"><text:bookmark-start text:name="__RefHeading___Toc15746_148275515"/>Connecting to the Services Manager<text:bookmark-end text:name="__RefHeading___Toc15746_148275515"/></text:h>
      <text:p text:style-name="P324">The simplest way to connect to the Services Manager is to set the “Connected” property to true. The <text:span text:style-name="T292">TIBXServicesConnection </text:span>will then attempt to connect to the Services Manager using the Connect String, <text:span text:style-name="T348">the</text:span> parameters given in the component properties, <text:span text:style-name="T348">and any ConfigOverrides given</text:span>.</text:p>
      <text:p text:style-name="P324">Alternatively, the “ConnectUsing” method may be used:</text:p>
      <text:p text:style-name="P325">procedure ConnectUsing(aDatabase: TIBDatabase);</text:p>
      <text:p text:style-name="P323">This creates a compatible Services API connection for the aDatabase database connection. The database connection must be in its connected state. The Services API connection is then established such that:</text:p>
      <text:list text:style-name="L90">
        <text:list-item>
          <text:p text:style-name="P1163">The Server Name, Protocol and Port No are extracted from the database connect string.</text:p>
        </text:list-item>
        <text:list-item>
          <text:p text:style-name="P1164">The ConfigOverrides are copied from the database ConfigOverrides.</text:p>
        </text:list-item>
        <text:list-item>
          <text:p text:style-name="P1163">A Local connection (using the embedded server) is used if and only if the database connection is also using the embedded server.</text:p>
        </text:list-item>
        <text:list-item>
          <text:p text:style-name="P1163">If the database connection was authenticated using an alternative security database then an “expected_db” parameter is added to the <text:span text:style-name="T324">login </text:span>parameters <text:span text:style-name="T324">s</text:span>o that the services connection is also logged in using the same security database.</text:p>
        </text:list-item>
        <text:list-item>
          <text:p text:style-name="P1163">All components using the <text:span text:style-name="T292">TIBXServicesConnection </text:span>and which have <text:span text:style-name="T311">a </text:span>DatabaseName property (e.g. TConfigService) will have their DatabaseName property set to the database name extracted from the TIBDatabase connect string.</text:p>
        </text:list-item>
      </text:list>
      <text:p text:style-name="P323"><text:soft-page-break/>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326">If it is <text:span text:style-name="T324">desired</text:span> to use the same Params <text:span text:style-name="T311">settings </text:span>as used for the database, then the Set<text:span text:style-name="T311">DB</text:span>Params method may be used to copy them prior to calling ConnectUsing.</text:p>
      <text:p text:style-name="P601">procedure SetDBParams(DBParams: TStrings);</text:p>
      <text:h text:style-name="P863" text:outline-level="2"><text:bookmark-start text:name="__RefHeading__24019_274617472"/>The Backup Service<text:bookmark-end text:name="__RefHeading__24019_274617472"/></text:h>
      <text:p text:style-name="P430">The backup service supports database backup to gbak format archives. Both server side and client side backup file locations are supported <text:span text:style-name="T294">by providing two specialised versions of the Backup Service</text:span>. <text:span text:style-name="T108">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284">ServicesConnection</text:p>
          </table:table-cell>
          <table:table-cell table:style-name="Table17.B1" office:value-type="string">
            <text:p text:style-name="P286">Required: a reference to the TIBXServicesConnection providing the connection to the server. <text:s/><text:span text:style-name="T297">This must be in its connected state</text:span><text:span text:style-name="T26"> </text:span><text:span text:style-name="T39">in order to perform a backup.</text:span></text:p>
          </table:table-cell>
        </table:table-row>
        <table:table-row>
          <table:table-cell table:style-name="Table17.A2" office:value-type="string">
            <text:p text:style-name="P648"><text:span text:style-name="Symbol">BackupFile</text:span><text:span text:style-name="Symbol"><text:span text:style-name="T295">s</text:span></text:span></text:p>
          </table:table-cell>
          <table:table-cell table:style-name="Table17.B2" office:value-type="string">
            <text:p text:style-name="P64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648"><text:span text:style-name="Symbol">BlockingFactor</text:span></text:p>
          </table:table-cell>
          <table:table-cell table:style-name="Table17.B2" office:value-type="string">
            <text:p text:style-name="P648">See gbak documentation <text:s/>for non-zero values (probably obsolescent)</text:p>
          </table:table-cell>
        </table:table-row>
        <table:table-row>
          <table:table-cell table:style-name="Table17.A2" office:value-type="string">
            <text:p text:style-name="P648"><text:span text:style-name="Symbol">DatabaseName</text:span></text:p>
          </table:table-cell>
          <table:table-cell table:style-name="Table17.B2" office:value-type="string">
            <text:p text:style-name="P648">Alias of or full pathname for database on the server.</text:p>
            <text:p text:style-name="P294">Note: this is not a connect string and does not include the servername, portno or protocol components.</text:p>
          </table:table-cell>
        </table:table-row>
        <table:table-row>
          <table:table-cell table:style-name="Table17.A2" office:value-type="string">
            <text:p text:style-name="P648"><text:span text:style-name="Symbol">Options</text:span></text:p>
          </table:table-cell>
          <table:table-cell table:style-name="Table17.B2" office:value-type="string">
            <text:p text:style-name="P648">See gbak documentation for interpretation of each option.</text:p>
          </table:table-cell>
        </table:table-row>
        <table:table-row>
          <table:table-cell table:style-name="Table17.A2" office:value-type="string">
            <text:p text:style-name="P648"><text:span text:style-name="Symbol">Verbose</text:span></text:p>
          </table:table-cell>
          <table:table-cell table:style-name="Table17.B2" office:value-type="string">
            <text:p text:style-name="P648">Server Side Backups only: if true then additional text messages are generated.</text:p>
          </table:table-cell>
        </table:table-row>
        <table:table-row>
          <table:table-cell table:style-name="Table17.A2" office:value-type="string">
            <text:p text:style-name="P702"><text:span text:style-name="Symbol">StatisticsRequested</text:span></text:p>
          </table:table-cell>
          <table:table-cell table:style-name="Table17.B2" office:value-type="string">
            <text:p text:style-name="P702">In verbose mode additional statistics <text:span text:style-name="T316">may be</text:span> provided with <text:span text:style-name="T316">in the o</text:span>utput <text:span text:style-name="T316">log</text:span>:</text:p>
            <text:list xml:id="list4240287012" text:style-name="L5">
              <text:list-item>
                <text:p text:style-name="P1114">Total Time</text:p>
              </text:list-item>
              <text:list-item>
                <text:p text:style-name="P1114">Time Delta</text:p>
              </text:list-item>
              <text:list-item>
                <text:p text:style-name="P1114">Page Reads</text:p>
              </text:list-item>
              <text:list-item>
                <text:p text:style-name="P1114">PageWrites</text:p>
              </text:list-item>
            </text:list>
          </table:table-cell>
        </table:table-row>
        <table:table-row>
          <table:table-cell table:style-name="Table17.A2" office:value-type="string">
            <text:p text:style-name="P284"><text:span text:style-name="Symbol">OnGetNextLine</text:span></text:p>
          </table:table-cell>
          <table:table-cell table:style-name="Table17.B2" office:value-type="string">
            <text:p text:style-name="P284">Server side backups only: This event is called whenever a line of text is received from the server.</text:p>
          </table:table-cell>
        </table:table-row>
      </table:table>
      <text:p text:style-name="Text_20_body"/>
      <text:h text:style-name="P947" text:outline-level="3"><text:bookmark-start text:name="__RefHeading___Toc15748_148275515"/><text:soft-page-break/>Server Side Backup<text:bookmark-end text:name="__RefHeading___Toc15748_148275515"/></text:h>
      <text:p text:style-name="P434">The following <text:span text:style-name="T294">method is called to perform</text:span> a server side backup:</text:p>
      <text:p text:style-name="P274"><text:s text:c="4"/><text:span text:style-name="T294">procedure Execute(OutputLog: TStrings);</text:span></text:p>
      <text:p text:style-name="P282">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48" text:outline-level="3"><text:bookmark-start text:name="__RefHeading___Toc15750_148275515"/>Client Side Backup<text:bookmark-end text:name="__RefHeading___Toc15750_148275515"/></text:h>
      <text:p text:style-name="P435">The following <text:span text:style-name="T294">methods are available for</text:span> a <text:span text:style-name="T110">client</text:span> side backup:</text:p>
      <text:p text:style-name="P293"><text:s text:c="3"/>procedure BackupToStream(S: TStream; var BytesWritten: integer);</text:p>
      <text:p text:style-name="P293"><text:s text:c="3"/>procedure BackupToFile(aFileName: string; var BytesWritten: integer);</text:p>
      <text:p text:style-name="P29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12">Restore Service</text:span><text:bookmark-end text:name="__RefHeading__23851_274617472"/></text:h>
      <text:p text:style-name="P431">The <text:span text:style-name="T112">Restore</text:span> service supports database <text:span text:style-name="T112">restore from</text:span> gbak format archives. Both server side and client side backup file locations are supported. <text:span text:style-name="T108">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284"><text:span text:style-name="Symbol">ServicesConnection</text:span></text:p>
          </table:table-cell>
          <table:table-cell table:style-name="Table18.B1" office:value-type="string">
            <text:p text:style-name="P286">Required: a reference to the TIBXServicesConnection providing the connection to the server. <text:span text:style-name="T297">This must be in its connected state in order to perform a database restore.</text:span></text:p>
          </table:table-cell>
        </table:table-row>
        <table:table-row>
          <table:table-cell table:style-name="Table18.A2" office:value-type="string">
            <text:p text:style-name="P649"><text:span text:style-name="Symbol">Database</text:span><text:span text:style-name="Symbol"><text:span text:style-name="T295">Files</text:span></text:span></text:p>
          </table:table-cell>
          <table:table-cell table:style-name="Table18.B2" office:value-type="string">
            <text:p text:style-name="P649"><text:span text:style-name="T112">A list of one or more </text:span>full pathname<text:span text:style-name="T112">s</text:span> for <text:span text:style-name="T324">the </text:span>database <text:span text:style-name="T324">file(s) </text:span>on the server.</text:p>
          </table:table-cell>
        </table:table-row>
        <table:table-row>
          <table:table-cell table:style-name="Table18.A2" office:value-type="string">
            <text:p text:style-name="P649"><text:span text:style-name="Symbol">Options</text:span></text:p>
          </table:table-cell>
          <table:table-cell table:style-name="Table18.B2" office:value-type="string">
            <text:p text:style-name="P649">See gbak documentation for interpretation of each option. <text:span text:style-name="T112">This must include either CreateNewDB (default) or Replace, but not both.</text:span></text:p>
          </table:table-cell>
        </table:table-row>
        <table:table-row>
          <table:table-cell table:style-name="Table18.A2" office:value-type="string">
            <text:p text:style-name="P655"><text:span text:style-name="Symbol">PageBuffers</text:span></text:p>
          </table:table-cell>
          <table:table-cell table:style-name="Table18.B2" office:value-type="string">
            <text:p text:style-name="P655">See gbak <text:s/><text:span text:style-name="T109">documentation</text:span></text:p>
          </table:table-cell>
        </table:table-row>
        <table:table-row>
          <table:table-cell table:style-name="Table18.A2" office:value-type="string">
            <text:p text:style-name="P655"><text:span text:style-name="Symbol">PageSize</text:span></text:p>
          </table:table-cell>
          <table:table-cell table:style-name="Table18.B2" office:value-type="string">
            <text:p text:style-name="P655">See gbak <text:s/><text:span text:style-name="T109">documentation</text:span></text:p>
          </table:table-cell>
        </table:table-row>
        <table:table-row>
          <table:table-cell table:style-name="Table18.A2" office:value-type="string">
            <text:p text:style-name="P649"><text:span text:style-name="Symbol">Verbose</text:span></text:p>
          </table:table-cell>
          <table:table-cell table:style-name="Table18.B2" office:value-type="string">
            <text:p text:style-name="P649"><text:span text:style-name="T112">I</text:span>f true then additional text messages are generated.</text:p>
          </table:table-cell>
        </table:table-row>
        <table:table-row>
          <table:table-cell table:style-name="Table18.A2" office:value-type="string">
            <text:p text:style-name="P702"><text:span text:style-name="Symbol">StatisticsRequested</text:span></text:p>
          </table:table-cell>
          <table:table-cell table:style-name="Table18.B2" office:value-type="string">
            <text:p text:style-name="P702">In verbose mode additional statistics are provided with <text:span text:style-name="T316">the </text:span>output <text:span text:style-name="T316">log</text:span>:</text:p>
            <text:list text:continue-numbering="true" text:style-name="L5">
              <text:list-item>
                <text:p text:style-name="P1114">Total Time</text:p>
              </text:list-item>
              <text:list-item>
                <text:p text:style-name="P1114">Time Delta</text:p>
              </text:list-item>
              <text:list-item>
                <text:p text:style-name="P1114">Page Reads</text:p>
              </text:list-item>
              <text:list-item>
                <text:p text:style-name="P1114">PageWrites</text:p>
              </text:list-item>
            </text:list>
          </table:table-cell>
        </table:table-row>
        <table:table-row>
          <table:table-cell table:style-name="Table18.A2" office:value-type="string">
            <text:p text:style-name="P284"><text:span text:style-name="Symbol">OnGetNextLine</text:span></text:p>
          </table:table-cell>
          <table:table-cell table:style-name="Table18.B2" office:value-type="string">
            <text:p text:style-name="P284">Server side <text:span text:style-name="T295">restores</text:span> only: This event is called whenever a line of text is received from the server.</text:p>
          </table:table-cell>
        </table:table-row>
      </table:table>
      <text:p text:style-name="P277"><text:soft-page-break/></text:p>
      <text:h text:style-name="P949" text:outline-level="3"><text:bookmark-start text:name="__RefHeading___Toc15752_148275515"/>Server Side Restores<text:bookmark-end text:name="__RefHeading___Toc15752_148275515"/></text:h>
      <text:p text:style-name="P436">The <text:span text:style-name="T295">method is used to perform</text:span> a server side <text:span text:style-name="T113">restore</text:span> is performed after the above properties have been set:</text:p>
      <text:p text:style-name="P275"><text:s text:c="4"/><text:span text:style-name="T294">procedure Execute(OutputLog: TStrings);</text:span></text:p>
      <text:p text:style-name="P285"><text:span text:style-name="T29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50" text:outline-level="3"><text:bookmark-start text:name="__RefHeading___Toc15754_148275515"/>Client Side Restores<text:bookmark-end text:name="__RefHeading___Toc15754_148275515"/></text:h>
      <text:p text:style-name="P436">The following <text:span text:style-name="T295">methods are available for</text:span> a <text:span text:style-name="T110">client</text:span> side <text:span text:style-name="T113">restore</text:span> i:</text:p>
      <text:p text:style-name="P296"><text:s text:c="3"/>procedure RestoreFromStream(S: TStream; <text:span text:style-name="T296">OutputLog</text:span>: TStrings);</text:p>
      <text:p text:style-name="P296"><text:s text:c="3"/>procedure RestoreFromFile(aFileName: string; <text:span text:style-name="T296">OutputLog</text:span>: TStrings);</text:p>
      <text:p text:style-name="P296"><text:s text:c="3"/>procedure RestoreFromFiles(FileList: TStrings; <text:span text:style-name="T296">OutputLog</text:span>: TStrings);</text:p>
      <text:p text:style-name="P295">These methods may be used, respectively, to restore the database from an archive sourced from a TStream, a named file, or a list of named files. <text:span text:style-name="T294">If OutputLog is non-nil then any lines of text received from the server during the backup (usually in verbose mode only) are added to the TStrings passed as the parameter. </text:span></text:p>
      <text:h text:style-name="P864" text:outline-level="2"><text:bookmark-start text:name="__RefHeading___Toc11153_1779155875"/>The Configuration Services<text:bookmark-end text:name="__RefHeading___Toc11153_1779155875"/></text:h>
      <text:p text:style-name="P439">The TIB<text:span text:style-name="T297">X</text:span>ConfigService comprises a set of methods, each of which performs a specific action. <text:span text:style-name="T297">The following properties must be set:</text:span></text:p>
      <table:table table:name="Table66" table:style-name="Table66">
        <table:table-column table:style-name="Table66.A"/>
        <table:table-column table:style-name="Table66.B"/>
        <table:table-row>
          <table:table-cell table:style-name="Table66.A1" office:value-type="string">
            <text:p text:style-name="P286">ServicesConnection</text:p>
          </table:table-cell>
          <table:table-cell table:style-name="Table66.B1" office:value-type="string">
            <text:p text:style-name="P286">Required: a reference to the TIBXServicesConnection providing the connection to the server. <text:span text:style-name="T297">This must be in its connected state to use any of the configuration services.</text:span></text:p>
          </table:table-cell>
        </table:table-row>
        <table:table-row>
          <table:table-cell table:style-name="Table66.A2" office:value-type="string">
            <text:p text:style-name="P651"><text:span text:style-name="Symbol">DatabaseName</text:span></text:p>
          </table:table-cell>
          <table:table-cell table:style-name="Table66.B2" office:value-type="string">
            <text:p text:style-name="P651">Alias of or full pathname for database on the server.</text:p>
            <text:p text:style-name="P297">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40"><text:span text:style-name="Symbol">ShutdownDatabase</text:span></text:p>
          </table:table-cell>
          <table:table-cell table:style-name="Table19.B1" office:value-type="string">
            <text:p text:style-name="P44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40"><text:span text:style-name="Symbol">BringDatabaseOnline</text:span></text:p>
          </table:table-cell>
          <table:table-cell table:style-name="Table19.B2" office:value-type="string">
            <text:p text:style-name="P440">Puts the database into its online state (reverse of shutdown).</text:p>
          </table:table-cell>
        </table:table-row>
        <table:table-row>
          <table:table-cell table:style-name="Table19.A2" office:value-type="string">
            <text:p text:style-name="P440"><text:span text:style-name="Symbol">SetSweepInterval</text:span></text:p>
          </table:table-cell>
          <table:table-cell table:style-name="Table19.B2" office:value-type="string">
            <text:p text:style-name="P440">Sets the automatic sweep interval</text:p>
          </table:table-cell>
        </table:table-row>
        <table:table-row>
          <table:table-cell table:style-name="Table19.A2" office:value-type="string">
            <text:p text:style-name="P440"><text:span text:style-name="Symbol">SetDBSqlDialect</text:span></text:p>
          </table:table-cell>
          <table:table-cell table:style-name="Table19.B2" office:value-type="string">
            <text:p text:style-name="P440">Sets the default database SQL dialect (1 or 3)</text:p>
          </table:table-cell>
        </table:table-row>
        <table:table-row>
          <table:table-cell table:style-name="Table19.A2" office:value-type="string">
            <text:p text:style-name="P440"><text:span text:style-name="Symbol">SetPageBuffers</text:span></text:p>
          </table:table-cell>
          <table:table-cell table:style-name="Table19.B2" office:value-type="string">
            <text:p text:style-name="P440">Set the default number of cache buffers to the specified number.</text:p>
          </table:table-cell>
        </table:table-row>
        <table:table-row>
          <table:table-cell table:style-name="Table19.A2" office:value-type="string">
            <text:p text:style-name="P440"><text:span text:style-name="Symbol">ActivateShadow</text:span></text:p>
          </table:table-cell>
          <table:table-cell table:style-name="Table19.B2" office:value-type="string">
            <text:p text:style-name="P440">Activates a database “shadow file” See the Firebird Documentation for more information on database shadow files.</text:p>
          </table:table-cell>
        </table:table-row>
        <table:table-row>
          <table:table-cell table:style-name="Table19.A2" office:value-type="string">
            <text:p text:style-name="P440"><text:span text:style-name="Symbol">SetReserveSpace</text:span></text:p>
          </table:table-cell>
          <table:table-cell table:style-name="Table19.B2" office:value-type="string">
            <text:p text:style-name="P440">Configure the database to fill data pages when inserting new records (true), or reserve 20% of each page for later record deltas (true)</text:p>
          </table:table-cell>
        </table:table-row>
        <table:table-row>
          <table:table-cell table:style-name="Table19.A2" office:value-type="string">
            <text:p text:style-name="P440"><text:span text:style-name="Symbol">SetAsyncMode</text:span></text:p>
          </table:table-cell>
          <table:table-cell table:style-name="Table19.B2" office:value-type="string">
            <text:p text:style-name="P440">Toggles between async writes (true) and sync writes (false).</text:p>
          </table:table-cell>
        </table:table-row>
        <table:table-row>
          <table:table-cell table:style-name="Table19.A2" office:value-type="string">
            <text:p text:style-name="P440"><text:span text:style-name="Symbol">SetReadOnly</text:span></text:p>
          </table:table-cell>
          <table:table-cell table:style-name="Table19.B2" office:value-type="string">
            <text:p text:style-name="P440">Sets read only or read/write mode.</text:p>
          </table:table-cell>
        </table:table-row>
        <table:table-row>
          <table:table-cell table:style-name="Table19.A2" office:value-type="string">
            <text:p text:style-name="P705"><text:span text:style-name="Symbol">SetNoLinger</text:span></text:p>
          </table:table-cell>
          <table:table-cell table:style-name="Table19.B2" office:value-type="string">
            <text:p text:style-name="Table_20_Contents"><text:span text:style-name="T284">Set the No Linger Flag on a database. This is a “one-shot” override. </text:span><text:span text:style-name="T283"><text:s/></text:span>Once set, the server will close the database immediately the last attachment is gone, regardless of the LINGER setting in the database. The LINGER setting is retained and works normally the next time.</text:p>
          </table:table-cell>
        </table:table-row>
      </table:table>
      <text:p text:style-name="P439"/>
      <text:h text:style-name="P865" text:outline-level="2"><text:bookmark-start text:name="__RefHeading___Toc15756_148275515"/>The Server Properties Service<text:bookmark-end text:name="__RefHeading___Toc15756_148275515"/></text:h>
      <text:p text:style-name="P645">This service retrieves various server properties including the server version information, server parameters and the current status of database attachments. <text:span text:style-name="T29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287">ServicesConnection</text:p>
          </table:table-cell>
          <table:table-cell table:style-name="Table67.B1" office:value-type="string">
            <text:p text:style-name="P287">Required: a reference to the TIBXServicesConnection providing the connection to the server. <text:span text:style-name="T297">This must be in its connected state in order to access server properties.</text:span></text:p>
          </table:table-cell>
        </table:table-row>
      </table:table>
      <text:p text:style-name="P659">The information returned is divided up into:</text:p>
      <text:list text:style-name="L91">
        <text:list-item>
          <text:p text:style-name="P1116">Server Version Information</text:p>
        </text:list-item>
        <text:list-item>
          <text:p text:style-name="P1116">Active Database Information, and</text:p>
        </text:list-item>
        <text:list-item>
          <text:p text:style-name="P1116">Configuration Parameters</text:p>
        </text:list-item>
      </text:list>
      <text:p text:style-name="P659">Th<text:span text:style-name="T298">is information is made available as public</text:span> propert<text:span text:style-name="T298">ies which</text:span> may then be read to access the requested information. <text:span text:style-name="T29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598"><text:s text:c="3"/>ServerVersion: String;</text:p>
            <text:p text:style-name="P598"><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598"><text:s text:c="3"/>NoOfAttachments: Integer;</text:p>
            <text:p text:style-name="P598"><text:s text:c="3"/>NoOfDatabases: Integer;</text:p>
            <text:p text:style-name="P598"><text:s text:c="3"/>DbName: array of string; {List of connected databases}</text:p>
          </table:table-cell>
        </table:table-row>
        <table:table-row>
          <table:table-cell table:style-name="Table68.A2" office:value-type="string">
            <text:p text:style-name="P597">ConfigParams</text:p>
          </table:table-cell>
          <table:table-cell table:style-name="Table68.B2" office:value-type="string">
            <text:p text:style-name="P598"><text:s text:c="3"/>ConfigFileData: TConfigFileData;</text:p>
            <text:p text:style-name="P598"><text:soft-page-break/><text:s text:c="3"/>ConfigFileParams: array of string;</text:p>
            <text:p text:style-name="P598"><text:s text:c="3"/>BaseLocation: string;</text:p>
            <text:p text:style-name="P598"><text:s text:c="3"/>LockFileLocation: string;</text:p>
            <text:p text:style-name="P598"><text:s text:c="3"/>MessageFileLocation: string;</text:p>
            <text:p text:style-name="P598"><text:s text:c="3"/>SecurityDatabaseLocation: string;</text:p>
          </table:table-cell>
        </table:table-row>
      </table:table>
      <text:p text:style-name="P659">For example:</text:p>
      <text:p text:style-name="P660">var <text:span text:style-name="T116">i</text:span>: integer;</text:p>
      <text:p text:style-name="P660">begin</text:p>
      <text:p text:style-name="P660"><text:s text:c="2"/>with IBServerProperties1 do</text:p>
      <text:p text:style-name="P660"><text:s text:c="2"/>begin</text:p>
      <text:p text:style-name="P660"><text:s text:c="4"/>writeln('Server Version = ' + VersionInfo.ServerVersion);</text:p>
      <text:p text:style-name="P660"><text:s text:c="4"/>writeln('Server Implementation = ' + VersionInfo.ServerImplementation);</text:p>
      <text:p text:style-name="P660"><text:s text:c="4"/>writeln('Service Version = ' + IntToStr(VersionInfo.ServiceVersion));</text:p>
      <text:p text:style-name="P660"/>
      <text:p text:style-name="P660"><text:s text:c="4"/>writeln('No. of attachments = ' + IntToStr(DatabaseInfo.NoOfAttachments));</text:p>
      <text:p text:style-name="P660"><text:s text:c="4"/>writeln('No. of databases = ' + IntToStr(DatabaseInfo.NoOfDatabases));</text:p>
      <text:p text:style-name="P660"><text:s text:c="4"/>for i := 0 to DatabaseInfo.NoOfDatabases - 1 do</text:p>
      <text:p text:style-name="P660"><text:s text:c="6"/>writeln('DB Name = ' + DatabaseInfo.DbName[i]);</text:p>
      <text:p text:style-name="P660"/>
      <text:p text:style-name="P660"><text:s text:c="4"/>writeln('Base Location = ' + ConfigParams.BaseLocation);</text:p>
      <text:p text:style-name="P660"><text:s text:c="4"/>writeln('Lock File Location = ' + ConfigParams.LockFileLocation);</text:p>
      <text:p text:style-name="P660"><text:s text:c="4"/>writeln('Security Database Location = ' + ConfigParams.SecurityDatabaseLocation);</text:p>
      <text:p text:style-name="P660"><text:s text:c="2"/>end;</text:p>
      <text:p text:style-name="P660">end;</text:p>
      <text:h text:style-name="P866" text:outline-level="2"><text:bookmark-start text:name="__RefHeading___Toc15758_148275515"/>The Log Service<text:bookmark-end text:name="__RefHeading___Toc15758_148275515"/></text:h>
      <text:p text:style-name="P91">This is a simple service that may be used to retrieve the current server log file contents. <text:span text:style-name="T29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288">ServicesConnection</text:p>
          </table:table-cell>
          <table:table-cell table:style-name="Table69.B1" office:value-type="string">
            <text:p text:style-name="P288">Required: a reference to the TIBXServicesConnection providing the connection to the server. <text:span text:style-name="T297">This must be in its connected state in order to access the server log.</text:span></text:p>
          </table:table-cell>
        </table:table-row>
      </table:table>
      <text:p text:style-name="After_20_Table">The server log is retrieved using the Execute method:</text:p>
      <text:p text:style-name="P303">procedure Execute(OutputLog: TStrings);</text:p>
      <text:p text:style-name="P301">When the method returns, the current server log will have been added to the OutputLog.</text:p>
      <text:h text:style-name="P866" text:outline-level="2"><text:bookmark-start text:name="__RefHeading___Toc15760_148275515"/>The Database Statistics Services<text:bookmark-end text:name="__RefHeading___Toc15760_148275515"/></text:h>
      <text:p text:style-name="P646">This service supports the retrieval of per database statistics <text:span text:style-name="T116">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288">ServicesConnection</text:p>
          </table:table-cell>
          <table:table-cell table:style-name="Table70.B1" office:value-type="string">
            <text:p text:style-name="P288">Required: a reference to the TIBXServicesConnection providing the connection to the server. <text:span text:style-name="T297">This must be in its connected state in order to retrieve database statistics.</text:span></text:p>
          </table:table-cell>
        </table:table-row>
        <table:table-row>
          <table:table-cell table:style-name="Table70.A2" office:value-type="string">
            <text:p text:style-name="P652"><text:span text:style-name="Symbol">DatabaseName</text:span></text:p>
          </table:table-cell>
          <table:table-cell table:style-name="Table70.B2" office:value-type="string">
            <text:p text:style-name="P652">Alias of or full pathname for database on the server.</text:p>
            <text:p text:style-name="P298">Note: this is not a connect string and does not include the servername, portno <text:soft-page-break/>or protocol components.</text:p>
          </table:table-cell>
        </table:table-row>
        <table:table-row>
          <table:table-cell table:style-name="Table70.A2" office:value-type="string">
            <text:p text:style-name="P302"><text:span text:style-name="Symbol">Options</text:span></text:p>
          </table:table-cell>
          <table:table-cell table:style-name="Table70.B2" office:value-type="string">
            <text:p text:style-name="P30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94">Request only the information in the database header page</text:p>
          </table:table-cell>
        </table:table-row>
        <table:table-row>
          <table:table-cell table:style-name="Table20.A2" office:value-type="string">
            <text:p text:style-name="P94"><text:span text:style-name="Symbol">DataPages</text:span></text:p>
          </table:table-cell>
          <table:table-cell table:style-name="Table20.B2" office:value-type="string">
            <text:p text:style-name="P94">Request statistics for user data pages</text:p>
          </table:table-cell>
        </table:table-row>
        <table:table-row>
          <table:table-cell table:style-name="Table20.A2" office:value-type="string">
            <text:p text:style-name="P94"><text:span text:style-name="Symbol">IndexPages</text:span></text:p>
          </table:table-cell>
          <table:table-cell table:style-name="Table20.B2" office:value-type="string">
            <text:p text:style-name="P94">Request statistics for user index pages</text:p>
          </table:table-cell>
        </table:table-row>
        <table:table-row>
          <table:table-cell table:style-name="Table20.A2" office:value-type="string">
            <text:p text:style-name="P94"><text:span text:style-name="Symbol">SystemRelations</text:span></text:p>
          </table:table-cell>
          <table:table-cell table:style-name="Table20.B2" office:value-type="string">
            <text:p text:style-name="P94">Request statistics for system tables and indexes — in addition to user tables and indexes</text:p>
          </table:table-cell>
        </table:table-row>
      </table:table>
      <text:p text:style-name="After_20_Table">The statistics requested are retrieved using the Execute method:</text:p>
      <text:p text:style-name="P303">procedure Execute(OutputLog: TStrings);</text:p>
      <text:p text:style-name="P301">When the method returns, the requested statistics will have been added to the OutputLog.</text:p>
      <text:h text:style-name="P867" text:outline-level="2"><text:bookmark-start text:name="__RefHeading___Toc10959_2048614072"/>The Security Service<text:bookmark-end text:name="__RefHeading___Toc10959_2048614072"/></text:h>
      <text:p text:style-name="P643">Th<text:span text:style-name="T299">e TIBXSecurityService</text:span> service supports management of the User Security Database. <text:span text:style-name="T117">It supports:</text:span></text:p>
      <text:list text:style-name="L92">
        <text:list-item>
          <text:p text:style-name="P1118">The listing of all User Names, and other user identification information</text:p>
        </text:list-item>
        <text:list-item>
          <text:p text:style-name="P1119">Adding New Users </text:p>
        </text:list-item>
        <text:list-item>
          <text:p text:style-name="P1119">Modifying Existing Users (including changing passwords)</text:p>
        </text:list-item>
        <text:list-item>
          <text:p text:style-name="P1119">Deleting Users.</text:p>
        </text:list-item>
        <text:list-item>
          <text:p text:style-name="P1122">From Firebird 2.5 onwards, display and management of the user Admin Role.</text:p>
        </text:list-item>
        <text:list-item>
          <text:p text:style-name="P1123">From Firebird 2.5 onwards, <text:span text:style-name="T299">setting the global “Auto Admin” state.</text:span></text:p>
        </text:list-item>
      </text:list>
      <text:p text:style-name="P59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289">ServicesConnection</text:p>
          </table:table-cell>
          <table:table-cell table:style-name="Table71.B1" office:value-type="string">
            <text:p text:style-name="P289">Required: a reference to the TIBXServicesConnection providing the connection to the server. <text:span text:style-name="T297">This must be in its connected state in order to access the security services.</text:span></text:p>
          </table:table-cell>
        </table:table-row>
      </table:table>
      <text:h text:style-name="P951" text:outline-level="3"><text:bookmark-start text:name="__RefHeading___Toc15762_148275515"/>Listing all User Names<text:bookmark-end text:name="__RefHeading___Toc15762_148275515"/></text:h>
      <text:p text:style-name="P44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44">var i: integer;</text:p>
      <text:p text:style-name="P444">begin</text:p>
      <text:p text:style-name="P444"><text:s text:c="2"/>with IBSecurityService1 do</text:p>
      <text:p text:style-name="P444"><text:s text:c="2"/>begin</text:p>
      <text:p text:style-name="P444"><text:s text:c="4"/>DisplayUsers;</text:p>
      <text:p text:style-name="P444"><text:s text:c="4"/>for i := 0 to UserInfoCount - 1 do</text:p>
      <text:p text:style-name="P444"><text:s text:c="4"/>with UserInfo[i] do</text:p>
      <text:p text:style-name="P444"><text:soft-page-break/><text:s text:c="4"/>begin</text:p>
      <text:p text:style-name="P444"><text:s text:c="6"/>writeln('User ID = ',UserID);</text:p>
      <text:p text:style-name="P444"><text:s text:c="6"/>writeln('Group ID = ',GroupID);</text:p>
      <text:p text:style-name="P444"><text:s text:c="6"/>writeln('User Name = ',UserName);</text:p>
      <text:p text:style-name="P444"><text:s text:c="6"/>writeln('First Name = ', FirstName);</text:p>
      <text:p text:style-name="P444"><text:s text:c="6"/>writeln('Middle Name = ', MiddleName);</text:p>
      <text:p text:style-name="P444"><text:s text:c="6"/>writeln('Last Name = ', LastName);</text:p>
      <text:p text:style-name="P444"><text:s text:c="6"/><text:span text:style-name="T280">write('Admin Role = ');</text:span></text:p>
      <text:p text:style-name="P444"><text:s text:c="6"/><text:span text:style-name="T280">if AdminRole then writeln('true') else writeln('false');</text:span></text:p>
      <text:p text:style-name="P444"><text:s text:c="4"/>end;</text:p>
      <text:p text:style-name="P444"><text:s text:c="2"/>end;</text:p>
      <text:p text:style-name="P444">end;</text:p>
      <text:h text:style-name="P952" text:outline-level="3"><text:bookmark-start text:name="__RefHeading__12587_1991610482"/>Addin<text:span text:style-name="T223">g</text:span> a User<text:bookmark-end text:name="__RefHeading__12587_1991610482"/></text:h>
      <text:p text:style-name="P44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48"><text:span text:style-name="Symbol">UserName</text:span></text:p>
          </table:table-cell>
          <table:table-cell table:style-name="Table21.B1" office:value-type="string">
            <text:p text:style-name="P448">User (or Login) Name</text:p>
          </table:table-cell>
        </table:table-row>
        <table:table-row>
          <table:table-cell table:style-name="Table21.A2" office:value-type="string">
            <text:p text:style-name="P448"><text:span text:style-name="Symbol">Password</text:span></text:p>
          </table:table-cell>
          <table:table-cell table:style-name="Table21.B2" office:value-type="string">
            <text:p text:style-name="P448">The user's password</text:p>
          </table:table-cell>
        </table:table-row>
        <table:table-row>
          <table:table-cell table:style-name="Table21.A2" office:value-type="string">
            <text:p text:style-name="P448"><text:span text:style-name="Symbol">FirstName</text:span></text:p>
          </table:table-cell>
          <table:table-cell table:style-name="Table21.B2" office:value-type="string">
            <text:p text:style-name="P448">The user's first nam<text:span text:style-name="T325">e</text:span></text:p>
          </table:table-cell>
        </table:table-row>
        <table:table-row>
          <table:table-cell table:style-name="Table21.A2" office:value-type="string">
            <text:p text:style-name="P448"><text:span text:style-name="Symbol">MiddleName </text:span></text:p>
          </table:table-cell>
          <table:table-cell table:style-name="Table21.B2" office:value-type="string">
            <text:p text:style-name="P448">The user's middle name</text:p>
          </table:table-cell>
        </table:table-row>
        <table:table-row>
          <table:table-cell table:style-name="Table21.A2" office:value-type="string">
            <text:p text:style-name="P448"><text:span text:style-name="Symbol">LastName</text:span></text:p>
          </table:table-cell>
          <table:table-cell table:style-name="Table21.B2" office:value-type="string">
            <text:p text:style-name="P448">The user's last name</text:p>
          </table:table-cell>
        </table:table-row>
        <table:table-row>
          <table:table-cell table:style-name="Table21.A2" office:value-type="string">
            <text:p text:style-name="P448"><text:span text:style-name="Symbol">UserID</text:span></text:p>
          </table:table-cell>
          <table:table-cell table:style-name="Table21.B2" office:value-type="string">
            <text:p text:style-name="P448">The Unix UID</text:p>
          </table:table-cell>
        </table:table-row>
        <table:table-row>
          <table:table-cell table:style-name="Table21.A2" office:value-type="string">
            <text:p text:style-name="P448"><text:span text:style-name="Symbol">GroupID</text:span></text:p>
          </table:table-cell>
          <table:table-cell table:style-name="Table21.B2" office:value-type="string">
            <text:p text:style-name="P448">The Unix GID</text:p>
          </table:table-cell>
        </table:table-row>
        <table:table-row>
          <table:table-cell table:style-name="Table21.A2" office:value-type="string">
            <text:p text:style-name="P700"><text:span text:style-name="Symbol">AdminRole</text:span></text:p>
          </table:table-cell>
          <table:table-cell table:style-name="Table21.B2" office:value-type="string">
            <text:p text:style-name="P700">True if the user is granted the Admin Role, otherwise false.</text:p>
          </table:table-cell>
        </table:table-row>
      </table:table>
      <text:p text:style-name="After_20_Table">The following illustrates the use of the <text:span text:style-name="Symbol">AddUsers</text:span> method:</text:p>
      <text:p text:style-name="P449"><text:s text:c="2"/>with IBSecurityService1 do</text:p>
      <text:p text:style-name="P449"><text:s text:c="2"/>begin</text:p>
      <text:p text:style-name="P449"><text:s text:c="4"/>UserName := NewUserName;</text:p>
      <text:p text:style-name="P449"><text:s text:c="4"/>Password := NewPassword;</text:p>
      <text:p text:style-name="P449"><text:s text:c="4"/>AddUser;</text:p>
      <text:p text:style-name="P449"><text:s text:c="2"/>end;</text:p>
      <text:h text:style-name="P952" text:outline-level="3"><text:bookmark-start text:name="__RefHeading___Toc15764_148275515"/>Updating User Details<text:bookmark-end text:name="__RefHeading___Toc15764_148275515"/></text:h>
      <text:p text:style-name="P44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449"><text:s text:c="2"/>with IBSecurityService1 do</text:p>
      <text:p text:style-name="P449"><text:s text:c="2"/>begin</text:p>
      <text:p text:style-name="P449"><text:s text:c="4"/>UserName := 'SYSDBA';</text:p>
      <text:p text:style-name="P449"><text:s text:c="4"/>FirstName := 'Donald';</text:p>
      <text:p text:style-name="P449"><text:soft-page-break/><text:s text:c="4"/>LastName := 'Duck';</text:p>
      <text:p text:style-name="P449"><text:s text:c="4"/>ModifyUser;</text:p>
      <text:p text:style-name="P449"><text:s text:c="2"/>end;</text:p>
      <text:h text:style-name="P952" text:outline-level="3"><text:bookmark-start text:name="__RefHeading___Toc15766_148275515"/>Deleting a User<text:bookmark-end text:name="__RefHeading___Toc15766_148275515"/></text:h>
      <text:p text:style-name="P447">The <text:span text:style-name="Symbol">DeleteUser</text:span> method is used to remove a users login details from the Security Database. The <text:span text:style-name="Symbol">UserName</text:span> property acts as the key identifying the user. For example:</text:p>
      <text:p text:style-name="P449"><text:s text:c="2"/>with IBSecurityService1 do</text:p>
      <text:p text:style-name="P449"><text:s text:c="2"/>begin</text:p>
      <text:p text:style-name="P449"><text:s text:c="4"/>UserName := 'ALICE';</text:p>
      <text:p text:style-name="P449"><text:s text:c="4"/>DeleteUser;</text:p>
      <text:p text:style-name="P449"><text:s text:c="2"/>end;</text:p>
      <text:h text:style-name="P953" text:outline-level="3"><text:bookmark-start text:name="__RefHeading___Toc15768_148275515"/>Setting the Auto Admin State<text:bookmark-end text:name="__RefHeading___Toc15768_148275515"/></text:h>
      <text:p text:style-name="P309">In Firebird 2.5, automatic SYSDBA mapping <text:span text:style-name="T300">was given more control when operating under</text:span> “Trusted Authentication” <text:span text:style-name="T300">and </text:span>with a new DDL instruction:</text:p>
      <text:p text:style-name="P795">ALTER ROLE RDB$ADMIN SET/DROP AUTO ADMIN MAPPING</text:p>
      <text:p text:style-name="P309"><text:span text:style-name="T316">that may be used to</text:span> configure this function on and off on a per server basis. <text:span text:style-name="T299">This mapping can also be set through the services API and in IBX is performed using the Security Service's SetAutoAdmin method.</text:span></text:p>
      <text:p text:style-name="P747">procedure SetAutoAdmin(Value: Boolean); {true = set auto admin mapping}</text:p>
      <text:h text:style-name="P868" text:outline-level="2"><text:bookmark-start text:name="__RefHeading___Toc15770_148275515"/>The User List DataSet<text:bookmark-end text:name="__RefHeading___Toc15770_148275515"/></text:h>
      <text:p text:style-name="P591">The TIBXServicesUserList is a subclass of a TMemDataset (from the FCP-db package). It is provided <text:span text:style-name="T301">in order to provide a simple means of User Management through a dataset. The <text:s/></text:span>TIBXServicesUserList <text:span text:style-name="T301">may be used as a data source for (e.g) a TDBGrid allowing all User Management to be performed by editing the rows in a grid.</text:span></text:p>
      <text:p text:style-name="P311">It has the following required properties:</text:p>
      <table:table table:name="Table72" table:style-name="Table72">
        <table:table-column table:style-name="Table72.A"/>
        <table:table-column table:style-name="Table72.B"/>
        <table:table-row>
          <table:table-cell table:style-name="Table72.A1" office:value-type="string">
            <text:p text:style-name="P453"><text:span text:style-name="Symbol"><text:span text:style-name="T301">Source</text:span></text:span></text:p>
          </table:table-cell>
          <table:table-cell table:style-name="Table72.B1" office:value-type="string">
            <text:p text:style-name="P312">Reference to a TIBXSecurityService component that will be used as the user list source and to update the user credentials.</text:p>
          </table:table-cell>
        </table:table-row>
        <table:table-row>
          <table:table-cell table:style-name="Table72.A2" office:value-type="string">
            <text:p text:style-name="P312"><text:span text:style-name="Symbol">FieldDefs</text:span></text:p>
          </table:table-cell>
          <table:table-cell table:style-name="Table72.B2" office:value-type="string">
            <text:p text:style-name="P312">A predefined set of Field definitions each corresponding to a user attribute in the server's security database. Do not remove or rename any <text:span text:style-name="T317">F</text:span>ield<text:span text:style-name="T31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310">UserID</text:p>
          </table:table-cell>
          <table:table-cell table:style-name="Table73.A1" office:value-type="string">
            <text:p text:style-name="P310">Integer</text:p>
          </table:table-cell>
          <table:table-cell table:style-name="Table73.C1" office:value-type="string">
            <text:p text:style-name="P314">Legacy Unix User ID</text:p>
          </table:table-cell>
        </table:table-row>
        <table:table-row>
          <table:table-cell table:style-name="Table73.A2" office:value-type="string">
            <text:p text:style-name="P310">GroupID</text:p>
          </table:table-cell>
          <table:table-cell table:style-name="Table73.A2" office:value-type="string">
            <text:p text:style-name="P310">Integer</text:p>
          </table:table-cell>
          <table:table-cell table:style-name="Table73.C2" office:value-type="string">
            <text:p text:style-name="P314">Legacy Unix Group ID</text:p>
          </table:table-cell>
        </table:table-row>
        <table:table-row>
          <table:table-cell table:style-name="Table73.A2" office:value-type="string">
            <text:p text:style-name="P310">SEC$USER_NAME</text:p>
          </table:table-cell>
          <table:table-cell table:style-name="Table73.A2" office:value-type="string">
            <text:p text:style-name="P310">String(31)</text:p>
          </table:table-cell>
          <table:table-cell table:style-name="Table73.C2" office:value-type="string">
            <text:p text:style-name="P313">User Name</text:p>
          </table:table-cell>
        </table:table-row>
        <text:soft-page-break/>
        <table:table-row>
          <table:table-cell table:style-name="Table73.A2" office:value-type="string">
            <text:p text:style-name="P310">SEC$FIRST_NAME</text:p>
          </table:table-cell>
          <table:table-cell table:style-name="Table73.A2" office:value-type="string">
            <text:p text:style-name="P310">String(32)</text:p>
          </table:table-cell>
          <table:table-cell table:style-name="Table73.C2" office:value-type="string">
            <text:p text:style-name="P313">First Name (info only)</text:p>
          </table:table-cell>
        </table:table-row>
        <table:table-row>
          <table:table-cell table:style-name="Table73.A2" office:value-type="string">
            <text:p text:style-name="P310">SEC$MIDDLE_NAME</text:p>
          </table:table-cell>
          <table:table-cell table:style-name="Table73.A2" office:value-type="string">
            <text:p text:style-name="P310">String(32)</text:p>
          </table:table-cell>
          <table:table-cell table:style-name="Table73.C2" office:value-type="string">
            <text:p text:style-name="P313">Middle Name (info only)</text:p>
          </table:table-cell>
        </table:table-row>
        <table:table-row>
          <table:table-cell table:style-name="Table73.A2" office:value-type="string">
            <text:p text:style-name="P310">SEC$LAST_NAME</text:p>
          </table:table-cell>
          <table:table-cell table:style-name="Table73.A2" office:value-type="string">
            <text:p text:style-name="P310">String(32)</text:p>
          </table:table-cell>
          <table:table-cell table:style-name="Table73.C2" office:value-type="string">
            <text:p text:style-name="P313">Last Name (info only)</text:p>
          </table:table-cell>
        </table:table-row>
        <table:table-row>
          <table:table-cell table:style-name="Table73.A2" office:value-type="string">
            <text:p text:style-name="P310">SEC$PASSWORD</text:p>
          </table:table-cell>
          <table:table-cell table:style-name="Table73.A2" office:value-type="string">
            <text:p text:style-name="P310">String(32)</text:p>
          </table:table-cell>
          <table:table-cell table:style-name="Table73.C2" office:value-type="string">
            <text:p text:style-name="P313">Password. </text:p>
            <text:p text:style-name="P313">Normally set to null. If <text:span text:style-name="T317">a </text:span>row <text:span text:style-name="T317">is </text:span>edited and <text:span text:style-name="T317">the Password field is </text:span>set to a non-null value then the user password is updated when row is posted.</text:p>
            <text:p text:style-name="P757">Note: This field is not normally displayed in a TDBGrid and is intended to be updated by <text:span text:style-name="T317">(e.g.) </text:span>some change password dialog.</text:p>
          </table:table-cell>
        </table:table-row>
        <table:table-row>
          <table:table-cell table:style-name="Table73.A2" office:value-type="string">
            <text:p text:style-name="P310">SEC$ADMIN</text:p>
          </table:table-cell>
          <table:table-cell table:style-name="Table73.A2" office:value-type="string">
            <text:p text:style-name="P310">Boolean</text:p>
          </table:table-cell>
          <table:table-cell table:style-name="Table73.C2" office:value-type="string">
            <text:p text:style-name="P314">If true then user has RDB$ADMIN role in security database.</text:p>
          </table:table-cell>
        </table:table-row>
      </table:table>
      <text:p text:style-name="P758">In use:</text:p>
      <text:list xml:id="list2779342661" text:style-name="L93">
        <text:list-item>
          <text:p text:style-name="P1165">Setting the dataset's Active property to true retrieves the user list from the server and populates the dataset (sorted by username) with the user attributes.</text:p>
        </text:list-item>
        <text:list-item>
          <text:p text:style-name="P1165">Editing a dataset row permits user attributes to be change<text:span text:style-name="T317">d</text:span>. When the dataset's “Post” method is called, the changes are sent to the server.</text:p>
        </text:list-item>
        <text:list-item>
          <text:p text:style-name="P1165">Adding a row is equivalent to adding a new user.</text:p>
        </text:list-item>
        <text:list-item>
          <text:p text:style-name="P1165">Deleting a row is equivalent to deleting a user.</text:p>
        </text:list-item>
      </text:list>
      <text:h text:style-name="P869" text:outline-level="2"><text:bookmark-start text:name="__RefHeading___Toc15772_148275515"/>The Validation Service<text:bookmark-end text:name="__RefHeading___Toc15772_148275515"/></text:h>
      <text:p text:style-name="P647"><text:span text:style-name="T281">The TIBXValidationS</text:span>ervice supports the invocation of various database repair actions, including validation and sweep. <text:span text:style-name="T118">Exclusive access is required to the database in order to perform these validation activities.</text:span></text:p>
      <text:p text:style-name="P318">Note: Limbo transaction resolution is provided by a separate service: TIBXLimboTransactionResolutionService (See <text:bookmark-ref text:reference-format="number" text:ref-name="__RefHeading___Toc20542_795358134">10.15</text:bookmark-ref>).</text:p>
      <text:p text:style-name="P93">The following properties must be set:</text:p>
      <table:table table:name="Table74" table:style-name="Table74">
        <table:table-column table:style-name="Table74.A"/>
        <table:table-column table:style-name="Table74.B"/>
        <table:table-row>
          <table:table-cell table:style-name="Table74.A1" office:value-type="string">
            <text:p text:style-name="P290">ServicesConnection</text:p>
          </table:table-cell>
          <table:table-cell table:style-name="Table74.B1" office:value-type="string">
            <text:p text:style-name="P290">Required: a reference to the TIBXServicesConnection providing the connection to the server. <text:span text:style-name="T297">This must be in its connected state in order to perform database repair activities.</text:span></text:p>
          </table:table-cell>
        </table:table-row>
        <table:table-row>
          <table:table-cell table:style-name="Table74.A2" office:value-type="string">
            <text:p text:style-name="P653"><text:span text:style-name="Symbol">DatabaseName</text:span></text:p>
          </table:table-cell>
          <table:table-cell table:style-name="Table74.B2" office:value-type="string">
            <text:p text:style-name="P653">Alias of or full pathname for database on the server.</text:p>
            <text:p text:style-name="P299"><text:soft-page-break/>Note: this is not a connect string and does not include the servername, portno or protocol components.</text:p>
          </table:table-cell>
        </table:table-row>
        <table:table-row>
          <table:table-cell table:style-name="Table74.A2" office:value-type="string">
            <text:p text:style-name="P305"><text:span text:style-name="Symbol">Options</text:span></text:p>
          </table:table-cell>
          <table:table-cell table:style-name="Table74.B2" office:value-type="string">
            <text:p text:style-name="P305">Used to request the <text:span text:style-name="T30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161">Title</text:p>
          </table:table-cell>
          <table:table-cell table:style-name="Table22.A1" office:value-type="string">
            <text:p text:style-name="P161">Option</text:p>
          </table:table-cell>
          <table:table-cell table:style-name="Table22.C1" office:value-type="string">
            <text:p text:style-name="P161">Description</text:p>
          </table:table-cell>
        </table:table-row>
        <table:table-row>
          <table:table-cell table:style-name="Table22.A2" office:value-type="string">
            <text:p text:style-name="P457">Kill Shadow Files</text:p>
          </table:table-cell>
          <table:table-cell table:style-name="Table22.A2" office:value-type="string">
            <text:p text:style-name="Table_20_Contents">KillShadows</text:p>
          </table:table-cell>
          <table:table-cell table:style-name="Table22.C2" office:value-type="string">
            <text:p text:style-name="P458">Remove references to unavailable shadow files</text:p>
          </table:table-cell>
        </table:table-row>
        <table:table-row>
          <table:table-cell table:style-name="Table22.A2" office:value-type="string">
            <text:p text:style-name="P457">Mend Database</text:p>
          </table:table-cell>
          <table:table-cell table:style-name="Table22.A2" office:value-type="string">
            <text:p text:style-name="Table_20_Contents">MendDB</text:p>
          </table:table-cell>
          <table:table-cell table:style-name="Table22.C2" office:value-type="string">
            <text:p text:style-name="P458">Mark corrupted records as unavailable, so subsequent operations skip them</text:p>
          </table:table-cell>
        </table:table-row>
        <table:table-row>
          <table:table-cell table:style-name="Table22.A2" office:value-type="string">
            <text:p text:style-name="P457">Sweep Database</text:p>
          </table:table-cell>
          <table:table-cell table:style-name="Table22.A2" office:value-type="string">
            <text:p text:style-name="Table_20_Contents">SweepDB</text:p>
          </table:table-cell>
          <table:table-cell table:style-name="Table22.C2" office:value-type="string">
            <text:p text:style-name="P458">Request database sweep to mark outdated records as free space;</text:p>
          </table:table-cell>
        </table:table-row>
        <table:table-row>
          <table:table-cell table:style-name="Table22.A2" office:value-type="string">
            <text:p text:style-name="P457">Validate Database</text:p>
          </table:table-cell>
          <table:table-cell table:style-name="Table22.A2" office:value-type="string">
            <text:p text:style-name="Table_20_Contents">ValidateDB</text:p>
          </table:table-cell>
          <table:table-cell table:style-name="Table22.C2" office:value-type="string">
            <text:p text:style-name="P458">Locate and release pages that are allocated but unassigned to any data structures</text:p>
          </table:table-cell>
        </table:table-row>
        <table:table-row>
          <table:table-cell table:style-name="Table22.A2" office:value-type="string">
            <text:p text:style-name="P457">Full Database Validation</text:p>
          </table:table-cell>
          <table:table-cell table:style-name="Table22.A2" office:value-type="string">
            <text:p text:style-name="Table_20_Contents">ValidateFull</text:p>
          </table:table-cell>
          <table:table-cell table:style-name="Table22.C2" office:value-type="string">
            <text:p text:style-name="P458">Check record and page structures, releasing unassigned record fragments. Use with Validate Database</text:p>
          </table:table-cell>
        </table:table-row>
        <table:table-row>
          <table:table-cell table:style-name="Table22.A2" office:value-type="string">
            <text:p text:style-name="P457">Check Database</text:p>
          </table:table-cell>
          <table:table-cell table:style-name="Table22.A2" office:value-type="string">
            <text:p text:style-name="Table_20_Contents">CheckDB</text:p>
          </table:table-cell>
          <table:table-cell table:style-name="Table22.C2" office:value-type="string">
            <text:p text:style-name="P458">Request read-only validation of the database, without correcting any problem</text:p>
          </table:table-cell>
        </table:table-row>
        <table:table-row>
          <table:table-cell table:style-name="Table22.A2" office:value-type="string">
            <text:p text:style-name="P457">Ignore all checksum errors</text:p>
          </table:table-cell>
          <table:table-cell table:style-name="Table22.A2" office:value-type="string">
            <text:p text:style-name="Table_20_Contents">IgnoreChecksum</text:p>
          </table:table-cell>
          <table:table-cell table:style-name="Table22.C2" office:value-type="string">
            <text:p text:style-name="P458">Refines database check</text:p>
          </table:table-cell>
        </table:table-row>
      </table:table>
      <text:p text:style-name="P319">In practice, the first four options are mutually exclusive, while the last three are options for “ValidateDB” while ValidateFull and IgnoreChecksum are options for “MendDB”.</text:p>
      <text:p text:style-name="P317">Once the repair action and options have been selected, the repair action is performed by the Execute method:</text:p>
      <text:p text:style-name="P306">procedure Execute(OutputLog: TStrings);</text:p>
      <text:p text:style-name="P304">When the method returns, the <text:span text:style-name="T302">results, if any, reported for the repair action</text:span> will have been added to the OutputLog.</text:p>
      <text:h text:style-name="P870" text:outline-level="2"><text:bookmark-start text:name="__RefHeading___Toc11667_1476524025"/>The Online Validation Service<text:bookmark-end text:name="__RefHeading___Toc11667_1476524025"/></text:h>
      <text:p text:style-name="P576">Online Validation was introduced in Firebird 2.5 that allows some consistency checks to be performed without exclusive access to the database. It may:</text:p>
      <text:list text:style-name="L94">
        <text:list-item>
          <text:p text:style-name="P1168">validate some (or all) user tables in a database.</text:p>
        </text:list-item>
        <text:list-item>
          <text:p text:style-name="P1167"><text:soft-page-break/>validate some (or all) indices</text:p>
        </text:list-item>
      </text:list>
      <text:p text:style-name="Text_20_body">Other ODS checks, such as Header/PIP/TIP/Generators pages, are not performed <text:span text:style-name="T281">by Online Validation. The TIBXOnlineValidationService component is the IBX interface to online validation.</text:span></text:p>
      <text:h text:style-name="P954"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table-cell table:style-name="Table54.A1" office:value-type="string">
            <text:p text:style-name="P290"><text:span text:style-name="Symbol">ServicesConnection</text:span></text:p>
          </table:table-cell>
          <table:table-cell table:style-name="Table54.B1" office:value-type="string">
            <text:p text:style-name="P290">Required: a reference to the TIBXServicesConnection providing the connection to the server. <text:span text:style-name="T297">This must be in its connected state in order to perform database repair activities.</text:span></text:p>
          </table:table-cell>
        </table:table-row>
        <table:table-row>
          <table:table-cell table:style-name="Table54.A2" office:value-type="string">
            <text:p text:style-name="P653"><text:span text:style-name="Symbol">DatabaseName</text:span></text:p>
          </table:table-cell>
          <table:table-cell table:style-name="Table54.B2" office:value-type="string">
            <text:p text:style-name="P653">Alias of or full pathname for database on the server.</text:p>
            <text:p text:style-name="P299">Note: this is not a connect string and does not include the servername, portno or protocol components.</text:p>
          </table:table-cell>
        </table:table-row>
        <table:table-row>
          <table:table-cell table:style-name="Table54.A2" office:value-type="string">
            <text:p text:style-name="P577"><text:span text:style-name="Symbol">IncludeIndexes</text:span></text:p>
          </table:table-cell>
          <table:table-cell table:style-name="Table54.B2" office:value-type="string">
            <text:p text:style-name="P577">This is a regular expression selecting the indexes to include in online validation. Leave empty to include all indexes.</text:p>
          </table:table-cell>
        </table:table-row>
        <table:table-row>
          <table:table-cell table:style-name="Table54.A2" office:value-type="string">
            <text:p text:style-name="P577"><text:span text:style-name="Symbol">ExcludeIndexes</text:span></text:p>
          </table:table-cell>
          <table:table-cell table:style-name="Table54.B2" office:value-type="string">
            <text:p text:style-name="P577">This is a regular expression selecting the indexes to exclude from online validation. Leave empty to exclude none.</text:p>
          </table:table-cell>
        </table:table-row>
        <table:table-row>
          <table:table-cell table:style-name="Table54.A2" office:value-type="string">
            <text:p text:style-name="P713"><text:span text:style-name="Symbol">IncludeTables</text:span></text:p>
          </table:table-cell>
          <table:table-cell table:style-name="Table54.B2" office:value-type="string">
            <text:p text:style-name="P580">his is a regular expression selecting the <text:span text:style-name="T303">tables</text:span> to include in online validation. Leave empty to include all <text:span text:style-name="T303">tables</text:span>.</text:p>
          </table:table-cell>
        </table:table-row>
        <table:table-row>
          <table:table-cell table:style-name="Table54.A2" office:value-type="string">
            <text:p text:style-name="P713"><text:span text:style-name="Symbol">ExcludeTables</text:span></text:p>
          </table:table-cell>
          <table:table-cell table:style-name="Table54.B2" office:value-type="string">
            <text:p text:style-name="P580">This is a regular expression selecting the <text:span text:style-name="T303">tables</text:span> to exclude from online validation. Leave empty to exclude none.</text:p>
          </table:table-cell>
        </table:table-row>
        <table:table-row>
          <table:table-cell table:style-name="Table54.A2" office:value-type="string">
            <text:p text:style-name="P577"><text:span text:style-name="Symbol">LockTimeout</text:span></text:p>
          </table:table-cell>
          <table:table-cell table:style-name="Table54.B2" office:value-type="string">
            <text:p text:style-name="P704"><text:span text:style-name="T281">This is the lock timeout in seconds. </text:span>default is 10 secs. 0 is no-wait, -1 is infinite wait.</text:p>
          </table:table-cell>
        </table:table-row>
      </table:table>
      <text:p text:style-name="After_20_Table"><text:span text:style-name="T304">The validation action </text:span>is performed by the Execute method:</text:p>
      <text:p text:style-name="P308">procedure Execute(OutputLog: TStrings);</text:p>
      <text:p text:style-name="P307">When the method returns, the <text:span text:style-name="T302">results, if any, reported for the online validation action</text:span> will have been added to the OutputLog.</text:p>
      <text:h text:style-name="P871" text:outline-level="2"><text:bookmark-start text:name="__RefHeading___Toc20542_795358134"/>The Limbo Transaction Resolution Service<text:bookmark-end text:name="__RefHeading___Toc20542_795358134"/></text:h>
      <text:p text:style-name="P593">The TIBXLimboTransactionResolutionService may be used to list and fix any transactions remaining in limbo as a result of a failed two phase commit action across two or more databases. <text:span text:style-name="T116">The following properties must be set:</text:span></text:p>
      <table:table table:name="Table75" table:style-name="Table75">
        <table:table-column table:style-name="Table75.A"/>
        <table:table-column table:style-name="Table75.B"/>
        <table:table-row>
          <table:table-cell table:style-name="Table75.A1" office:value-type="string">
            <text:p text:style-name="P291">ServicesConnection</text:p>
          </table:table-cell>
          <table:table-cell table:style-name="Table75.B1" office:value-type="string">
            <text:p text:style-name="P291">Required: a reference to the TIBXServicesConnection providing the connection to the server. <text:span text:style-name="T297">This must be in its connected state in order to retrieve database statistics.</text:span></text:p>
          </table:table-cell>
        </table:table-row>
        <table:table-row>
          <table:table-cell table:style-name="Table75.A2" office:value-type="string">
            <text:p text:style-name="P654"><text:span text:style-name="Symbol">DatabaseName</text:span></text:p>
          </table:table-cell>
          <table:table-cell table:style-name="Table75.B2" office:value-type="string">
            <text:p text:style-name="P654">Alias of or full pathname for database on the server.</text:p>
            <text:p text:style-name="P300"><text:soft-page-break/>Note: this is not a connect string and does not include the servername, portno or protocol components.</text:p>
          </table:table-cell>
        </table:table-row>
      </table:table>
      <text:p text:style-name="P92"/>
      <text:h text:style-name="P955" text:outline-level="3"><text:bookmark-start text:name="__RefHeading___Toc15776_148275515"/><text:span text:style-name="T307">Listing the In</text:span> Limbo Transactions<text:bookmark-end text:name="__RefHeading___Toc15776_148275515"/></text:h>
      <text:p text:style-name="P98">There are two step<text:span text:style-name="T253">s</text:span> to the resolution of limbo transactions. The first step retrieves a list of all limbo transactions. The second step commits or rolls back each transaction as required.</text:p>
      <text:p text:style-name="P594">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595"><text:span text:style-name="Symbol">LimboTransactionInfoCount</text:span></text:p>
          </table:table-cell>
          <table:table-cell table:style-name="Table76.B1" office:value-type="string">
            <text:p text:style-name="P714">This returns the number of In Limbo Transactions for the identified database.</text:p>
          </table:table-cell>
        </table:table-row>
        <table:table-row>
          <table:table-cell table:style-name="Table76.A2" office:value-type="string">
            <text:p text:style-name="P714"><text:span text:style-name="Symbol">LimboTransactionInfo</text:span></text:p>
          </table:table-cell>
          <table:table-cell table:style-name="Table76.B2" office:value-type="string">
            <text:p text:style-name="P717"><text:span text:style-name="T307">This is an array property and for each index returns the TLimboTransactionInfo for an In Limbo Transaction. </text:span>The array is zero based and has <text:span text:style-name="Symbol">LimboTransactionInfoCount members.</text:span><text:span text:style-name="T306"> </text:span></text:p>
          </table:table-cell>
        </table:table-row>
      </table:table>
      <text:p text:style-name="P716">Accessing either of the above properties will cause the current list of In Limbo Transactions to be returned from the server and then cached locally.</text:p>
      <text:p text:style-name="P100">For example:</text:p>
      <text:p text:style-name="P99">var i: integer;</text:p>
      <text:p text:style-name="P99">begin</text:p>
      <text:p text:style-name="P101"><text:s text:c="2"/>with <text:span text:style-name="T305">IBXLimboTransactionResolutionService1</text:span> do</text:p>
      <text:p text:style-name="P99"><text:s text:c="2"/>begin</text:p>
      <text:p text:style-name="P99"><text:s text:c="4"/>for i := 0 to LimboTransactionInfoCount - 1 do</text:p>
      <text:p text:style-name="P99"><text:s text:c="4"/>with LimboTransactionInfo[i] do</text:p>
      <text:p text:style-name="P99"><text:s text:c="4"/>begin</text:p>
      <text:p text:style-name="P99"><text:s text:c="6"/>write('ID = ',ID);</text:p>
      <text:p text:style-name="P99"><text:s text:c="6"/>if MultiDatabase then</text:p>
      <text:p text:style-name="P99"><text:s text:c="8"/>write(', Multi DB')</text:p>
      <text:p text:style-name="P99"><text:s text:c="6"/>else</text:p>
      <text:p text:style-name="P99"><text:s text:c="8"/>write(' ,Single DB');</text:p>
      <text:p text:style-name="P99"><text:s text:c="6"/>write(', Host Site = ', HostSite);</text:p>
      <text:p text:style-name="P99"><text:s text:c="6"/>write(', Remote Site = ', RemoteSite);</text:p>
      <text:p text:style-name="P99"><text:s text:c="6"/>write(', Database Path = ', RemoteDatabasePath);</text:p>
      <text:p text:style-name="P99"><text:s text:c="6"/>write(', State = ', StateToStr(State));</text:p>
      <text:p text:style-name="P99"><text:s text:c="6"/>writeln(', Advise = ', AdviseToStr(Advise));</text:p>
      <text:p text:style-name="P99"><text:s text:c="4"/>end;</text:p>
      <text:p text:style-name="P99"><text:s text:c="2"/>end;</text:p>
      <text:p text:style-name="P99">end;</text:p>
      <text:p text:style-name="P105">where</text:p>
      <text:p text:style-name="P107">function StateToStr(State: TTransactionState): string;</text:p>
      <text:p text:style-name="P107">begin</text:p>
      <text:p text:style-name="P107"><text:s text:c="2"/>case State of</text:p>
      <text:p text:style-name="P107"><text:s text:c="2"/>LimboState:</text:p>
      <text:p text:style-name="P107"><text:s text:c="4"/>Result := 'Limbo';</text:p>
      <text:p text:style-name="P107"><text:s text:c="2"/>CommitState:</text:p>
      <text:p text:style-name="P107"><text:s text:c="4"/>Result := 'Commit';</text:p>
      <text:p text:style-name="P107"><text:s text:c="2"/>RollbackState:</text:p>
      <text:p text:style-name="P107"><text:s text:c="4"/>Result := 'Rollback';</text:p>
      <text:p text:style-name="P107"><text:s text:c="2"/>else</text:p>
      <text:p text:style-name="P107"><text:s text:c="4"/>Result := 'Unknown';</text:p>
      <text:p text:style-name="P107"><text:soft-page-break/><text:s text:c="2"/>end;</text:p>
      <text:p text:style-name="P107">end;</text:p>
      <text:p text:style-name="P107"/>
      <text:p text:style-name="P107">function AdviseToStr(Advise: TTransactionAdvise): string;</text:p>
      <text:p text:style-name="P107">begin</text:p>
      <text:p text:style-name="P107"><text:s text:c="2"/>case Advise of</text:p>
      <text:p text:style-name="P107"><text:s text:c="2"/>CommitAdvise:</text:p>
      <text:p text:style-name="P107"><text:s text:c="4"/>Result := 'Commit';</text:p>
      <text:p text:style-name="P107"><text:s text:c="2"/>RollbackAdvise:</text:p>
      <text:p text:style-name="P107"><text:s text:c="4"/>Result := 'Rollback';</text:p>
      <text:p text:style-name="P107"><text:s text:c="2"/>else</text:p>
      <text:p text:style-name="P107"><text:s text:c="4"/>Result := 'Unknown';</text:p>
      <text:p text:style-name="P107"><text:s text:c="2"/>end;</text:p>
      <text:p text:style-name="P107">end;</text:p>
      <text:p text:style-name="P105">This list identifies each limbo transaction and its current state, it also suggests an action (advises). The user can review the list and set the <text:span text:style-name="Symbol">T</text:span><text:span text:style-name="Symbol"><text:span text:style-name="T199">L</text:span></text:span><text:span text:style-name="Symbol">imboTransactionInfo.Action</text:span> property to a desired outcome.</text:p>
      <text:h text:style-name="P957" text:outline-level="3"><text:bookmark-start text:name="__RefHeading___Toc15778_148275515"/>Fixing the In Limbo Transactions<text:bookmark-end text:name="__RefHeading___Toc15778_148275515"/></text:h>
      <text:p text:style-name="P105">The limbo transactions may then be resolved by setting the <text:span text:style-name="Symbol">GlobalAction</text:span> property and then calling the <text:span text:style-name="T310">E</text:span><text:span text:style-name="Symbol"><text:span text:style-name="T310">xecute</text:span></text:span> method.</text:p>
      <text:p text:style-name="P715">procedure <text:span text:style-name="T310">Execute</text:span>(OutputLog: TStrings);</text:p>
      <text:p text:style-name="P105">The <text:span text:style-name="Symbol">GlobalAction</text:span> determines how <text:span text:style-name="Symbol">FixLimboTransactionErrors</text:span> processes the limbo transactions and may be <text:span text:style-name="T199">set to</text:span>:</text:p>
      <table:table table:name="Table23" table:style-name="Table23">
        <table:table-column table:style-name="Table23.A"/>
        <table:table-column table:style-name="Table23.B"/>
        <table:table-row>
          <table:table-cell table:style-name="Table23.A1" office:value-type="string">
            <text:p text:style-name="P106"><text:span text:style-name="Symbol">CommitGlobal</text:span></text:p>
          </table:table-cell>
          <table:table-cell table:style-name="Table23.B1" office:value-type="string">
            <text:p text:style-name="P106">All limbo transactions are resolved by committing the transaction.</text:p>
          </table:table-cell>
        </table:table-row>
        <table:table-row>
          <table:table-cell table:style-name="Table23.A2" office:value-type="string">
            <text:p text:style-name="P106"><text:span text:style-name="Symbol">RollbackGlobal</text:span></text:p>
          </table:table-cell>
          <table:table-cell table:style-name="Table23.B2" office:value-type="string">
            <text:p text:style-name="P106">All limbo transactions are resolved by rolling back the transaction.</text:p>
          </table:table-cell>
        </table:table-row>
        <table:table-row>
          <table:table-cell table:style-name="Table23.A2" office:value-type="string">
            <text:p text:style-name="P106"><text:span text:style-name="Symbol">RecoverTwoPhaseGlobal</text:span></text:p>
          </table:table-cell>
          <table:table-cell table:style-name="Table23.B2" office:value-type="string">
            <text:p text:style-name="P106">All limbo transactions are resolved by performing a two phase commit of the transaction.</text:p>
          </table:table-cell>
        </table:table-row>
        <table:table-row>
          <table:table-cell table:style-name="Table23.A2" office:value-type="string">
            <text:p text:style-name="P106"><text:span text:style-name="Symbol">NoGlobalAction</text:span></text:p>
          </table:table-cell>
          <table:table-cell table:style-name="Table23.B2" office:value-type="string">
            <text:p text:style-name="P106">Limbo transactions are resolved by either committing or rolling back the transaction, as specified by each limbo transaction's Action property.</text:p>
          </table:table-cell>
        </table:table-row>
      </table:table>
      <text:p text:style-name="P716">Each In Limbo transaction is processed in turn and the cached list of In Limbo Transaction is then emptied. Any text lines returned by the server is added to the OutputLog on return.</text:p>
      <text:h text:style-name="P872" text:outline-level="2"><text:bookmark-start text:name="__RefHeading___Toc15780_148275515"/>The Limbo Transaction List Dataset<text:bookmark-end text:name="__RefHeading___Toc15780_148275515"/></text:h>
      <text:p text:style-name="P592">The <text:span text:style-name="T308">TIBXServicesLimboTransactionsList</text:span> is a subclass of a TMemDataset (from the FCP-db package). It is provided <text:span text:style-name="T301">in order to provide a simple means of In Limbo Transaction Resolution through a dataset. The TIBXServicesLimboTransactionsList</text:span> <text:span text:style-name="T301">may be used as a data source for (e.g) a TDBGrid allowing all In Limbo Transaction Resolution to be performed by editing the rows in a grid.</text:span></text:p>
      <text:p text:style-name="P315">It has the following required properties:</text:p>
      <table:table table:name="Table77" table:style-name="Table77">
        <table:table-column table:style-name="Table77.A"/>
        <table:table-column table:style-name="Table77.B"/>
        <text:soft-page-break/>
        <table:table-row>
          <table:table-cell table:style-name="Table77.A1" office:value-type="string">
            <text:p text:style-name="P454"><text:span text:style-name="Symbol"><text:span text:style-name="T301">Source</text:span></text:span></text:p>
          </table:table-cell>
          <table:table-cell table:style-name="Table77.B1" office:value-type="string">
            <text:p text:style-name="P316">Reference to a TIBXServicesLimboTransactionsList component that will be used as the user list source and to update the user credentials.</text:p>
          </table:table-cell>
        </table:table-row>
        <table:table-row>
          <table:table-cell table:style-name="Table77.A2" office:value-type="string">
            <text:p text:style-name="P316"><text:span text:style-name="Symbol">FieldDefs</text:span></text:p>
          </table:table-cell>
          <table:table-cell table:style-name="Table77.B2" office:value-type="string">
            <text:p text:style-name="P316">A predefined set of Field definitions each corresponding to a <text:span text:style-name="T308">In Limbo Transaction attribute</text:span>. Do not remove or rename any <text:span text:style-name="T308">F</text:span>ield<text:span text:style-name="T31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718">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718">'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718">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718">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718">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718">'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718">'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718">'Commit' or 'Rollback'</text:p>
          </table:table-cell>
        </table:table-row>
      </table:table>
      <text:p text:style-name="P759">In use:</text:p>
      <text:list text:continue-list="list2779342661" text:style-name="L93">
        <text:list-item>
          <text:p text:style-name="P1166">Setting the dataset's Active property to true retrieves the <text:span text:style-name="T308">In Limbo Transaction</text:span> list from the server and populates the dataset with the <text:span text:style-name="T308">Limbo Transaction</text:span> attributes.</text:p>
        </text:list-item>
        <text:list-item>
          <text:p text:style-name="P1170">Only the RequestedAction should be editable and constrained to one of the above values.</text:p>
        </text:list-item>
        <text:list-item>
          <text:p text:style-name="P1170">Row Deletion is not permitted (ignored).</text:p>
        </text:list-item>
        <text:list-item>
          <text:p text:style-name="P1171">Row Append is not permitted (exception raised).</text:p>
        </text:list-item>
      </text:list>
      <text:p text:style-name="P320">Once the In Limbo Transaction Resolution options have been selected, the current list can be resolved by calling the <text:s/><text:span text:style-name="T301">TIBXServicesLimboTransactionsList </text:span>method:</text:p>
      <text:p text:style-name="P322">procedure FixErrors(GlobalAction: TTransactionGlobalAction; <text:span text:style-name="T309">OutputLog</text:span>: TStrings);</text:p>
      <text:p text:style-name="P321">This method calls the <text:span text:style-name="T305">TIBXLimboTransactionResolutionService.Execute</text:span> method after setting the requested GlobalAction. <text:span text:style-name="T317">On</text:span> successful completion, any <text:span text:style-name="T309">information returned by the server is added to the OutputLog and the dataset is refreshed.</text:span></text:p>
      <text:h text:style-name="Heading_20_1" text:outline-level="1"><text:bookmark-start text:name="__RefHeading___Toc15001_252590906"/><text:line-break/><text:span text:style-name="T45">Personal Databases</text:span><text:bookmark-end text:name="__RefHeading___Toc15001_252590906"/></text:h>
      <text:p text:style-name="P147">A Personal Database is one held on the same system on the client and, where possible, file system access rights ensure that only the owner has access to the data. Instead of database access <text:span text:style-name="T200">using a remote server running as a separate process</text:span>, the server is embedded in the client and is both inherits and is constrained by the user's access rights.</text:p>
      <text:p text:style-name="P147">In Firebird 2.5 and earlier, the embedded server is deployed as a separate package, while in Firebird 3 the same code libraries can be as part of a standalone server or as an embedded server.</text:p>
      <text:p text:style-name="P147">The embedded server will be used if available and the database pathname is to a local file without a preceding server name. Access to the database will fail if the user has insufficient access rights.</text:p>
      <text:p text:style-name="P147">The <text:span text:style-name="T12">fbintf</text:span> package provides direct and largely transparent support for use of the embedded server. See section 4.10 of the Firebird Pascal API Guide for more information. Deployment Guidelines are <text:s/>available in chapter 13 of the same guide.</text:p>
      <text:p text:style-name="P147">IBX additionally recognises the case where a local database path has been specified but a database open error prohibits use of the embedded server. It will automatically <text:span text:style-name="T200">prefix</text:span> the database path with “localhost:” and try again hoping to use the local server, if available.</text:p>
      <text:p text:style-name="P147">IBX also provides additional support for Personal Databases that are accessible via the embedded server.</text:p>
      <text:h text:style-name="P873" text:outline-level="2"><text:bookmark-start text:name="__RefHeading___Toc15782_148275515"/>TIBLocalDBSupport<text:bookmark-end text:name="__RefHeading___Toc15782_148275515"/></text:h>
      <text:p text:style-name="P22"><text:span text:style-name="Symbol"><text:span text:style-name="T65">TIBLocalDBSupport</text:span></text:span><text:span text:style-name="T254"> is non-visual component supporting a </text:span><text:span text:style-name="Symbol"><text:span text:style-name="T254">TIBDatabase</text:span></text:span><text:span text:style-name="T254"> and intended to simplify the use of the embedded firebird server for Personal Database Applications, on both Linux and Windows platforms. The </text:span><text:span text:style-name="Symbol"><text:span text:style-name="T65">TIBLocalDBSupport</text:span></text:span><text:span text:style-name="T65"> component supports GUI programs, while the </text:span><text:span text:style-name="Symbol"><text:span text:style-name="T65">TIBCMLocalDBSupport</text:span></text:span><text:span text:style-name="T65"> provides the same support for console mode programs. </text:span><text:a xlink:type="simple" xlink:href="#2.Local EmployeeDB Example|outline" text:style-name="Internet_20_link" text:visited-style-name="Visited_20_Internet_20_Link">Example applications</text:a><text:span text:style-name="T65"> are provided for both GUI and console mode in the ibx/examples/local-employeedb directory.</text:span></text:p>
      <text:p text:style-name="P70"><text:soft-page-break/>When enabled, <text:span text:style-name="Symbol"><text:span text:style-name="T65">TIBLocalDBSupport</text:span></text:span> provides:</text:p>
      <text:list text:style-name="L95">
        <text:list-item>
          <text:p text:style-name="P1172">Verification that the embedded Firebird Server is in use.</text:p>
        </text:list-item>
        <text:list-item>
          <text:p text:style-name="P1172">Setup of the FIREBIRD environment variable for the embedded server.</text:p>
        </text:list-item>
        <text:list-item>
          <text:p text:style-name="P1172">DatabaseName, and login parameters management.</text:p>
        </text:list-item>
        <text:list-item>
          <text:p text:style-name="P1172">Use of the Firebird Services API to initialise an empty local database from a gbak format Firebird archive.</text:p>
        </text:list-item>
        <text:list-item>
          <text:p text:style-name="P1172">Use of the Firebird Services API to save the current local database to a gbak format Firebird archive.</text:p>
        </text:list-item>
        <text:list-item>
          <text:p text:style-name="P1172">Use of the Firebird Services API to replace the contents of the current local database from a gbak format Firebird archive.</text:p>
        </text:list-item>
        <text:list-item>
          <text:p text:style-name="P1172">Use of the <text:span text:style-name="Symbol">TIBXScript</text:span> Engine for automated field upgrade of the local database.</text:p>
        </text:list-item>
      </text:list>
      <text:p text:style-name="P70">To use the component, <text:span text:style-name="T67">simply drop it onto a form or data module and link it to the TIBDatabase.</text:span></text:p>
      <text:h text:style-name="P958" text:outline-level="3"><text:bookmark-start text:name="__RefNumPara__15474_3018657082"/><text:bookmark-start text:name="__RefHeading___Toc14340_1373794815"/>Properties<text:bookmark-end text:name="__RefNumPara__15474_3018657082"/><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203"><text:span text:style-name="Symbol">Database</text:span></text:p>
          </table:table-cell>
          <table:table-cell table:style-name="Table45.B1" office:value-type="string">
            <text:p text:style-name="P182">reference to the <text:span text:style-name="Symbol">TIBDatabase</text:span> component for the local database</text:p>
          </table:table-cell>
        </table:table-row>
        <table:table-row>
          <table:table-cell table:style-name="Table45.A2" office:value-type="string">
            <text:p text:style-name="P204"><text:span text:style-name="Symbol">DatabaseName</text:span></text:p>
          </table:table-cell>
          <table:table-cell table:style-name="Table45.B2" office:value-type="string">
            <text:p text:style-name="P71">filename (no path) to use for the Firebird Database file.</text:p>
          </table:table-cell>
        </table:table-row>
        <table:table-row>
          <table:table-cell table:style-name="Table45.A2" office:value-type="string">
            <text:p text:style-name="P203"><text:span text:style-name="Symbol">EmptyDBArchive</text:span></text:p>
          </table:table-cell>
          <table:table-cell table:style-name="Table45.B2" office:value-type="string">
            <text:p text:style-name="P182">filename (<text:span text:style-name="T68">optional</text:span> path) holding the database initialisation archive. <text:span text:style-name="T69">May either be absolute path or relative to </text:span><text:a xlink:type="simple" xlink:href="#1.0.8.Shared Data Directory|outline" text:style-name="Internet_20_link" text:visited-style-name="Visited_20_Internet_20_Link"><text:span text:style-name="T69">shared data directory</text:span></text:a><text:span text:style-name="T69">.</text:span></text:p>
          </table:table-cell>
        </table:table-row>
        <table:table-row>
          <table:table-cell table:style-name="Table45.A2" office:value-type="string">
            <text:p text:style-name="P203"><text:span text:style-name="Symbol">Enabled</text:span></text:p>
          </table:table-cell>
          <table:table-cell table:style-name="Table45.B2" office:value-type="string">
            <text:p text:style-name="P182">when false component does nothing</text:p>
          </table:table-cell>
        </table:table-row>
        <table:table-row>
          <table:table-cell table:style-name="Table45.A2" office:value-type="string">
            <text:p text:style-name="P203"><text:span text:style-name="Symbol">FirebirdDirectory</text:span></text:p>
          </table:table-cell>
          <table:table-cell table:style-name="Table45.B2" office:value-type="string">
            <text:p text:style-name="P182">Full path to directory holding firebird.conf. <text:span text:style-name="T69">May either be absolute path or relative to the </text:span><text:a xlink:type="simple" xlink:href="#1.0.8.Shared Data Directory|outline" text:style-name="Internet_20_link" text:visited-style-name="Visited_20_Internet_20_Link"><text:span text:style-name="T69">shared data directory</text:span></text:a><text:span text:style-name="T69">. </text:span>If empty, defaults to <text:s/><text:span text:style-name="T69">shared data directory.</text:span></text:p>
          </table:table-cell>
        </table:table-row>
        <table:table-row>
          <table:table-cell table:style-name="Table45.A2" office:value-type="string">
            <text:p text:style-name="P210"><text:span text:style-name="Symbol">InOnCreateDB</text:span></text:p>
          </table:table-cell>
          <table:table-cell table:style-name="Table45.B2" office:value-type="string">
            <text:p text:style-name="P345">This is set to true while a new local database is being created and its schema populated.</text:p>
            <text:p text:style-name="P345"><text:s/>Useful in (e.g.) TIBDatabase.OnAfterConnect handler to suppress actions when the database is disconnected/connected during the create DB procedure.</text:p>
          </table:table-cell>
        </table:table-row>
        <table:table-row>
          <table:table-cell table:style-name="Table45.A2" office:value-type="string">
            <text:p text:style-name="P203"><text:span text:style-name="Symbol">Name</text:span></text:p>
          </table:table-cell>
          <table:table-cell table:style-name="Table45.B2" office:value-type="string">
            <text:p text:style-name="P182">Component Name</text:p>
          </table:table-cell>
        </table:table-row>
        <table:table-row>
          <table:table-cell table:style-name="Table45.A2" office:value-type="string">
            <text:p text:style-name="P203"><text:span text:style-name="Symbol"><text:span text:style-name="T64">Options</text:span></text:span></text:p>
          </table:table-cell>
          <table:table-cell table:style-name="Table45.B2" office:value-type="string">
            <text:list text:style-name="L6">
              <text:list-item>
                <text:p text:style-name="P1173"><text:s/><text:span text:style-name="T64">iblAutoUpgrade: Automatically apply upgrade when database schema version is lower than required.</text:span></text:p>
              </text:list-item>
              <text:list-item>
                <text:p text:style-name="P1175">IblAllowDowngrade: Automatically apply downgrade when available to schema version compatible with the required version.</text:p>
              </text:list-item>
              <text:list-item>
                <text:p text:style-name="P1173"><text:soft-page-break/><text:span text:style-name="T64">iblQuiet: </text:span><text:s/>true then no database overwrite warnings</text:p>
              </text:list-item>
            </text:list>
          </table:table-cell>
        </table:table-row>
        <table:table-row>
          <table:table-cell table:style-name="Table45.A2" office:value-type="string">
            <text:p text:style-name="P205"><text:span text:style-name="Symbol">RequiredVersionNo</text:span></text:p>
          </table:table-cell>
          <table:table-cell table:style-name="Table45.B2" office:value-type="string">
            <text:p text:style-name="P183">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203"><text:bookmark-start text:name="UpgradeConfFile"/><text:span text:style-name="Symbol">UpgradeConfFile</text:span><text:bookmark-end text:name="UpgradeConfFile"/></text:p>
          </table:table-cell>
          <table:table-cell table:style-name="Table45.B2" office:value-type="string">
            <text:p text:style-name="P182">Path to upgrade configuration file. May either be absolute path or relative to <text:span text:style-name="T70">the </text:span><text:a xlink:type="simple" xlink:href="#1.0.8.Shared Data Directory|outline" text:style-name="Internet_20_link" text:visited-style-name="Visited_20_Internet_20_Link"><text:span text:style-name="T70">shared data directory</text:span></text:a>.</text:p>
          </table:table-cell>
        </table:table-row>
        <table:table-row>
          <table:table-cell table:style-name="Table45.A2" office:value-type="string">
            <text:p text:style-name="P211"><text:span text:style-name="Symbol">SectionHeaderTemplate</text:span></text:p>
          </table:table-cell>
          <table:table-cell table:style-name="Table45.B2" office:value-type="string">
            <text:p text:style-name="P182">This defaults to 'Version.%.3d' and is used to generate the section header names (for a given version no.) in the upgrade.conf file.</text:p>
          </table:table-cell>
        </table:table-row>
        <table:table-row>
          <table:table-cell table:style-name="Table45.A2" office:value-type="string">
            <text:p text:style-name="P203"><text:span text:style-name="Symbol">VendorName</text:span></text:p>
          </table:table-cell>
          <table:table-cell table:style-name="Table45.B2" office:value-type="string">
            <text:p text:style-name="P18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58"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table-cell table:style-name="Table46.A1" office:value-type="string">
            <text:p text:style-name="P204"><text:span text:style-name="Symbol">OnGetDatabaseName</text:span></text:p>
          </table:table-cell>
          <table:table-cell table:style-name="Table46.B1" office:value-type="string">
            <text:p text:style-name="P71"><text:span text:style-name="T71">The </text:span>database <text:span text:style-name="T65">path </text:span>name <text:span text:style-name="T72">is normally computed automatically</text:span>. <text:s/><text:span text:style-name="T72">However, this event allows an application to inspect and override the result.</text:span></text:p>
          </table:table-cell>
        </table:table-row>
        <table:table-row>
          <table:table-cell table:style-name="Table46.A2" office:value-type="string">
            <text:p text:style-name="P203"><text:span text:style-name="Symbol">OnNewDatabaseOpen</text:span></text:p>
          </table:table-cell>
          <table:table-cell table:style-name="Table46.B2" office:value-type="string">
            <text:p text:style-name="P182">called after the successful initialisation of an empty local database.</text:p>
          </table:table-cell>
        </table:table-row>
        <table:table-row>
          <table:table-cell table:style-name="Table46.A2" office:value-type="string">
            <text:p text:style-name="P206"><text:bookmark text:name="OnGetDBVersionNo"/><text:span text:style-name="Symbol">OnGetDBVersionNo</text:span></text:p>
          </table:table-cell>
          <table:table-cell table:style-name="Table46.B2" office:value-type="string">
            <text:p text:style-name="P184">called to get the current database schema version number. If this event is not handled then schema upgrade/downgrade is never performed.</text:p>
          </table:table-cell>
        </table:table-row>
        <table:table-row>
          <table:table-cell table:style-name="Table46.A2" office:value-type="string">
            <text:p text:style-name="P206"><text:span text:style-name="Symbol">OnGetSharedDataDir</text:span></text:p>
          </table:table-cell>
          <table:table-cell table:style-name="Table46.B2" office:value-type="string">
            <text:p text:style-name="P184"><text:span text:style-name="T200">T</text:span>he shared data directory is normally computed automatically. However, this event allows an application to inspect and override the result.</text:p>
          </table:table-cell>
        </table:table-row>
      </table:table>
      <text:p text:style-name="Text_20_body"/>
      <text:h text:style-name="P959" text:outline-level="3"><text:bookmark-start text:name="__RefHeading___Toc15786_148275515"/>Shared Data Directory<text:bookmark-end text:name="__RefHeading___Toc15786_148275515"/></text:h>
      <text:p text:style-name="P72">The shared data directory is the base directory for all static data files used by <text:span text:style-name="Symbol">TIBLocalDBSupport</text:span>. This is determined as follows:</text:p>
      <text:list text:style-name="L96">
        <text:list-item>
          <text:p text:style-name="P1176">Windows: the application executable's location.</text:p>
        </text:list-item>
        <text:list-item>
          <text:p text:style-name="P1176"><text:span text:style-name="T67">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392"><text:soft-page-break/>Note: that the &lt;application name&gt; is taken from sysutils.ApplicationName and defaults to the filename of the application executable less any extension.</text:p>
      <text:h text:style-name="P960" text:outline-level="3"><text:bookmark-start text:name="__RefHeading___Toc15788_148275515"/>DatabaseName, and login parameters management<text:bookmark-end text:name="__RefHeading___Toc15788_148275515"/></text:h>
      <text:p text:style-name="P71">When <text:span text:style-name="Symbol"><text:span text:style-name="T71">TIBLocalDBSupport</text:span></text:span> is in use, the <text:span text:style-name="Symbol">TIBDatabase.DatabaseName</text:span> property is ignored and instead, it is generated algorithmically as:</text:p>
      <text:list text:style-name="L97">
        <text:list-item>
          <text:p text:style-name="P1174">Windows: "User Application Directory"\VendorName\DatabaseName</text:p>
        </text:list-item>
        <text:list-item>
          <text:p text:style-name="P1174">Unix: "User Home Directory"/."VendorName"/DatabaseName</text:p>
        </text:list-item>
      </text:list>
      <text:p text:style-name="P71">The “<text:span text:style-name="T67">DatabaseName” </text:span>comes from the <text:span text:style-name="Symbol"><text:span text:style-name="T71">TIBLocalDBSupport</text:span></text:span><text:span text:style-name="Symbol">.</text:span><text:span text:style-name="Symbol"><text:span text:style-name="T67">DatabaseName</text:span></text:span><text:span text:style-name="T67"> </text:span>property.</text:p>
      <text:p text:style-name="P71">The “VendorName” comes from the <text:span text:style-name="Symbol"><text:span text:style-name="T71">TIBLocalDBSupport</text:span></text:span><text:span text:style-name="Symbol">.VendorName</text:span> property. <text:span text:style-name="T67">If the </text:span><text:span text:style-name="Symbol"><text:span text:style-name="T67">TIBLocalDBSupport.VendorName</text:span></text:span><text:span text:style-name="T67"> property is left empty then </text:span><text:span text:style-name="Symbol"><text:span text:style-name="T67">Sysutils.VendorName</text:span></text:span><text:span text:style-name="T67"> is used. If this is empty then no VendorName component is present in the path.</text:span></text:p>
      <text:p text:style-name="Highlighted">Note the use of a hidden directory under Unix.</text:p>
      <text:p text:style-name="P73">If the generated DatabaseName is not appropriate then the <text:span text:style-name="Symbol">TIBLocalDB.OnGetDatabaseName</text:span> event handler gives a chance to inspect it and change it to something different.</text:p>
      <text:p text:style-name="P71">The Database Params are copied from the <text:span text:style-name="Symbol">TIBDatabase</text:span> component except that the “user_name” and “password” parameters are removed if present. When running under Windows, the “user_name” is <text:span text:style-name="T71">then</text:span> set to “SYSDBA” and the “password” to “masterkey”. Under Unix, these parameters are omitted.</text:p>
      <text:h text:style-name="P958" text:outline-level="3"><text:bookmark-start text:name="__RefHeading___Toc15790_148275515"/>Database Initialisation<text:bookmark-end text:name="__RefHeading___Toc15790_148275515"/></text:h>
      <text:p text:style-name="P73">When the linked <text:span text:style-name="Symbol">TIBDatabase</text:span> connected property is set to “true”, <text:span text:style-name="Symbol">TIBLocalDB</text:span><text:span text:style-name="Symbol"><text:span text:style-name="T151">Support</text:span></text:span> generates the DatabaseName (as described above) and then if it does not correspond to an existing file, <text:span text:style-name="Symbol"><text:span text:style-name="T71">TIBLocalDBSupport</text:span></text:span> uses the Firebird Services API to create the database file from an “empty database” archive in gbak format, <text:span text:style-name="T222">or an SQL Script.</text:span> In practice, the archive can contain both the database metadata and initial table data. <text:span text:style-name="T222">An SQL Script may also contain data inline compatible with TIBXScript (see </text:span><text:span text:style-name="T222"><text:bookmark-ref text:reference-format="number-no-superior" text:ref-name="__RefHeading__24780_1844166745">7.1</text:bookmark-ref></text:span><text:span text:style-name="T222">)</text:span></text:p>
      <text:p text:style-name="P73">The “empty database” archive is given by the <text:span text:style-name="Symbol"><text:span text:style-name="T71">TIBLocalDBSupport.</text:span></text:span><text:span text:style-name="Symbol"><text:span text:style-name="T30">EmptyDBArchive</text:span></text:span><text:span text:style-name="T30"> </text:span><text:span text:style-name="T29">property. This should be a filename (with the .gbk extension </text:span><text:span text:style-name="T38">or .sql extension</text:span><text:span text:style-name="T29">) </text:span><text:span text:style-name="T31">and </text:span><text:span text:style-name="T32">may include </text:span><text:span text:style-name="T31">an optional path</text:span><text:span text:style-name="T29">. <text:s/></text:span><text:span text:style-name="T31">Relative paths are</text:span><text:span text:style-name="T33"> </text:span><text:span text:style-name="T32">interpreted as </text:span><text:span text:style-name="T33">relative to the </text:span><text:a xlink:type="simple" xlink:href="#1.0.8.Shared Data Directory|outline" text:style-name="Internet_20_link" text:visited-style-name="Visited_20_Internet_20_Link"><text:span text:style-name="T31">shared data directory</text:span></text:a><text:span text:style-name="T33">.</text:span></text:p>
      <text:p text:style-name="P243"><text:span text:style-name="T222">For a gbak archive, t</text:span>he Services API <text:span text:style-name="T151">(see </text:span><text:span text:style-name="T151"><text:bookmark-ref text:reference-format="number" text:ref-name="__RefHeading__23851_274617472">10.6</text:bookmark-ref></text:span><text:span text:style-name="T151">)</text:span> is then used to create the initial database from this archive. <text:span text:style-name="T222">The IBXScript component is used to create a database from an SQL Script. </text:span>An error is raised if the archive is not present.</text:p>
      <text:p text:style-name="P244">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74">The local database can be re-initialised at any time by calling the <text:span text:style-name="Symbol"><text:span text:style-name="T71">TIBLocalDBSupport</text:span></text:span><text:span text:style-name="Symbol">. NewDatabase</text:span> method.</text:p>
      <text:h text:style-name="P961" text:outline-level="3"><text:bookmark-start text:name="__RefHeading___Toc15792_148275515"/><text:soft-page-break/>Saving the Current Database<text:bookmark-end text:name="__RefHeading___Toc15792_148275515"/></text:h>
      <text:p text:style-name="P74">The current database contents can be saved at any time by a call to <text:span text:style-name="Symbol"><text:span text:style-name="T71">TIBLocalDBSupport</text:span></text:span><text:span text:style-name="Symbol">.SaveDatabase</text:span>. The filename for the archive can be provided in the method call. If empty, then the user is prompted to enter a filename (default extension .gbk).</text:p>
      <text:p text:style-name="P74">The Services API <text:span text:style-name="T152">(see </text:span><text:span text:style-name="T152"><text:bookmark-ref text:reference-format="number" text:ref-name="__RefHeading__24019_274617472">10.5</text:bookmark-ref></text:span><text:span text:style-name="T152">) </text:span>is then called to archive the database to the specified file in gbak format.</text:p>
      <text:h text:style-name="P961" text:outline-level="3"><text:bookmark-start text:name="__RefHeading___Toc15794_148275515"/>Restoring the Database from an Archive<text:bookmark-end text:name="__RefHeading___Toc15794_148275515"/></text:h>
      <text:p text:style-name="P74">The local database can be overwritten (restored) from any archive in gbak format (including those saved using the <text:span text:style-name="Symbol">SaveDatabase</text:span> method) by calling the <text:span text:style-name="Symbol"><text:span text:style-name="T71">TIBLocalDBSupport</text:span></text:span><text:span text:style-name="Symbol">.RestoreDatabase</text:span> method. The filename for the source archive can be provide in the method call. If empty, then the user is prompted to locate the file.</text:p>
      <text:p text:style-name="P74">The Services API <text:span text:style-name="T152">(see </text:span><text:span text:style-name="T152"><text:bookmark-ref text:reference-format="number" text:ref-name="__RefHeading__23851_274617472">10.6</text:bookmark-ref></text:span><text:span text:style-name="T152">) </text:span>is then called to restore the local database from the archive.</text:p>
      <text:h text:style-name="P962" text:outline-level="3"><text:bookmark-start text:name="__RefHeading___Toc15796_148275515"/>Database Schema Upgrade<text:bookmark-end text:name="__RefHeading___Toc15796_148275515"/></text:h>
      <text:p text:style-name="P75">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70">Support</text:span></text:span> supports a suitable mechanism using the <text:span text:style-name="Symbol">TIBXScript</text:span> engine <text:span text:style-name="T152">(see </text:span><text:span text:style-name="T152"><text:bookmark-ref text:reference-format="number" text:ref-name="__RefHeading__24780_1844166745">7.1</text:bookmark-ref></text:span><text:span text:style-name="T152">)</text:span>.</text:p>
      <text:p text:style-name="P76">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73">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4">OnGetDBVersionNo</text:span></text:a><text:span text:style-name="T34"> </text:span><text:span text:style-name="T29">event.</text:span></text:p>
      <text:p text:style-name="P77"><text:span text:style-name="T29">Each version of an application will have a maximum and minimum version of the database schema that it can support, and it is expected to check that the schema version is acceptable in its </text:span><text:span text:style-name="Symbol"><text:span text:style-name="T29">TIBDatabase OnConnect</text:span></text:span><text:span text:style-name="T29"> handler. However, before this handler is called, </text:span><text:span text:style-name="Symbol"><text:span text:style-name="T35">TIBLocalDB</text:span></text:span><text:span text:style-name="Symbol"><text:span text:style-name="T36">Support</text:span></text:span><text:span text:style-name="T36"> </text:span><text:span text:style-name="T29">will itself check the current schema version against its </text:span><text:span text:style-name="Symbol"><text:span text:style-name="T29">RequiredVersionNo</text:span></text:span><text:span text:style-name="T29"> property (which should be set to the maximum supported schema version no). </text:span></text:p>
      <text:list text:style-name="L98">
        <text:list-item>
          <text:p text:style-name="P1177"><text:span text:style-name="T37">If iblAutoUpgrade is given in the Options property and the current schema is less than the Required Version no., then <text:s/></text:span><text:span text:style-name="Symbol"><text:span text:style-name="T35">TIBLocalDB</text:span></text:span><text:span text:style-name="Symbol"><text:span text:style-name="T36">Support</text:span></text:span><text:span text:style-name="T36"> </text:span><text:span text:style-name="T37">will attempt to apply the upgrade rules to raise the version number to that required.</text:span></text:p>
        </text:list-item>
        <text:list-item>
          <text:p text:style-name="P1178"><text:span text:style-name="T29">If iblAllowDowngrade is given in the Options property and the current schema is greater than the Required Version no., then </text:span><text:span text:style-name="Symbol"><text:span text:style-name="T35">TIBLocalDB</text:span></text:span><text:span text:style-name="Symbol"><text:span text:style-name="T36">Support</text:span></text:span><text:span text:style-name="T36"> </text:span><text:span text:style-name="T29">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76">The schema upgrade rules are read from the <text:a xlink:type="simple" xlink:href="#UpgradeConfFile" text:style-name="Internet_20_link" text:visited-style-name="Visited_20_Internet_20_Link"><text:span text:style-name="T67">upgrade configuration file</text:span></text:a><text:span text:style-name="T67">. </text:span>This is a text file in “ini” file format with the following sections:</text:p>
      <text:p text:style-name="P35"><text:soft-page-break/>[status<text:span text:style-name="T74">]</text:span></text:p>
      <text:p text:style-name="P76">This should have a single named value “current” giving the current database schema number as in integer e.g.</text:p>
      <text:p text:style-name="P34">current = 2</text:p>
      <text:p text:style-name="P76">This should normally be set to the same value as the RequiredVersionNo property and acts as a check to ensure that both are in sync.</text:p>
      <text:p text:style-name="P34">[Version.nnn]</text:p>
      <text:p text:style-name="P76">Where nnn is an integer with lea<text:span text:style-name="T255">d</text:span>ing zeroes. For example, “Version.002” is the section read to upgrade the database schema from version 1 to version 2. <text:span text:style-name="T75">This section can contain the following named values:</text:span></text:p>
      <text:p text:style-name="P76"/>
      <table:table table:name="Table2" table:style-name="Table2">
        <table:table-column table:style-name="Table2.A"/>
        <table:table-column table:style-name="Table2.B"/>
        <table:table-column table:style-name="Table2.C"/>
        <table:table-row>
          <table:table-cell table:style-name="Table2.A1" office:value-type="string">
            <text:p text:style-name="P158">Name</text:p>
          </table:table-cell>
          <table:table-cell table:style-name="Table2.A1" office:value-type="string">
            <text:p text:style-name="P158">Type</text:p>
          </table:table-cell>
          <table:table-cell table:style-name="Table2.C1" office:value-type="string">
            <text:p text:style-name="P158">Use</text:p>
          </table:table-cell>
        </table:table-row>
        <table:table-row>
          <table:table-cell table:style-name="Table2.A2" office:value-type="string">
            <text:p text:style-name="P78">Upgrade</text:p>
          </table:table-cell>
          <table:table-cell table:style-name="Table2.A2" office:value-type="string">
            <text:p text:style-name="P78"><text:span text:style-name="T65">s</text:span>tring</text:p>
          </table:table-cell>
          <table:table-cell table:style-name="Table2.C2" office:value-type="string">
            <text:p text:style-name="P78">Name and optional path to <text:span text:style-name="T65">the </text:span>SQL script used to perform the upgrade. <text:span text:style-name="T67">May either be absolute path or relative to the </text:span>upgrade configuration file. Either forwards or back slashes may be used as the path delimiter.</text:p>
          </table:table-cell>
        </table:table-row>
        <table:table-row>
          <table:table-cell table:style-name="Table2.A2" office:value-type="string">
            <text:p text:style-name="P78">Msg</text:p>
          </table:table-cell>
          <table:table-cell table:style-name="Table2.A2" office:value-type="string">
            <text:p text:style-name="P78">string</text:p>
          </table:table-cell>
          <table:table-cell table:style-name="Table2.C2" office:value-type="string">
            <text:p text:style-name="P78">Text message displayed in progress dialog while script is active. <text:s/>Defaults to “Upgrading Database Schema to Version nnn”.</text:p>
          </table:table-cell>
        </table:table-row>
        <table:table-row>
          <table:table-cell table:style-name="Table2.A2" office:value-type="string">
            <text:p text:style-name="P78">BackupDatabase</text:p>
          </table:table-cell>
          <table:table-cell table:style-name="Table2.A2" office:value-type="string">
            <text:p text:style-name="P78">yes/no</text:p>
          </table:table-cell>
          <table:table-cell table:style-name="Table2.C2" office:value-type="string">
            <text:p text:style-name="P7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78">&lt;Parameter Name&gt;</text:p>
          </table:table-cell>
          <table:table-cell table:style-name="Table2.A2" office:value-type="string">
            <text:p text:style-name="P78">string</text:p>
          </table:table-cell>
          <table:table-cell table:style-name="Table2.C2" office:value-type="string">
            <text:p text:style-name="P78">Name and optional path to binary data file. <text:span text:style-name="T67">May either be absolute path or relative to the </text:span>upgrade configuration file. Either forwards or back slashes may be used as the path delimiter.</text:p>
          </table:table-cell>
        </table:table-row>
      </table:table>
      <text:p text:style-name="P76"/>
      <text:p text:style-name="P79">For example:</text:p>
      <text:p text:style-name="P32">[Version.002]</text:p>
      <text:p text:style-name="P32">Msg = Upgrading to Version 2</text:p>
      <text:p text:style-name="P32">BackupDatabase = yes</text:p>
      <text:p text:style-name="P32">Upgrade = patches/02-patch.sql</text:p>
      <text:p text:style-name="P33">mugshot = images/man.png.gz <text:s text:c="2"/></text:p>
      <text:p text:style-name="P79"><text:soft-page-break/>Note that in the above, “mugshot” is intended to be used to resolve an Update, Insert or Delete query parameter in the 02-patch.sql file. E.g.</text:p>
      <text:p text:style-name="SQL">Update EMPLOYEE Set Photo =:MUGSHOT Where Emp_no = 2; </text:p>
      <text:p text:style-name="P7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8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81">The purpose of this example is to demonstrate the use of the <text:span text:style-name="Symbol">TIBLocalDB</text:span><text:span text:style-name="Symbol"><text:span text:style-name="T66">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6">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68">The example can be found under: ibx/examples/local-employeedb/project1.lpi</text:p>
      <text:p text:style-name="P68">See also <text:a xlink:type="simple" xlink:href="#2.3.1.Console Mode|outline" text:style-name="Internet_20_link" text:visited-style-name="Visited_20_Internet_20_Link">console mode</text:a>.</text:p>
      <text:p text:style-name="P81">Before compiling and running the example, the Firebird embedded server must be installed. <text:span text:style-name="T152">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8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81">The local database will be created in:</text:p>
      <text:list text:style-name="L99">
        <text:list-item>
          <text:p text:style-name="P1179">Linux: $HOME/.MWA Software/employee.fdb</text:p>
        </text:list-item>
        <text:list-item>
          <text:p text:style-name="P1179">Windows: &lt;User Application Data Folder&gt;\MWA Software\employee.fdb</text:p>
        </text:list-item>
      </text:list>
      <text:p text:style-name="P8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9">A console mode version of the example application is also provided under ibx/examples/local-employeedb/ConsoleModeExample.lpi.</text:p>
      <text:p text:style-name="P69"><text:soft-page-break/><text:span text:style-name="T350">T</text:span>his uses the <text:span text:style-name="T350">iblocalnongui</text:span> package. The IBCMLocalDBSupport unit is used to provide the TIBCMLocalDBSupport compo<text:span text:style-name="T350">n</text:span>ent.</text:p>
      <text:p text:style-name="P69">The application is similar to the above and uses the same archive database and upgrade scripts. Instead of displaying the employee table, when run it will print out the first two rows.</text:p>
      <text:list text:style-name="WW8Num2">
        <text:list-item>
          <text:h text:style-name="Appendix" text:outline-level="1"><text:bookmark-start text:name="__RefHeading___Toc28823_2092659162"/><text:s/><text:span text:style-name="T288">The Legacy IBX Services Components</text:span><text:bookmark-end text:name="__RefHeading___Toc28823_2092659162"/></text:h>
        </text:list-item>
      </text:list>
      <text:p text:style-name="P586">This appendix describes the legacy IBX Components. These may be found on the “Firebird Legacy Admin” palette. They have been superseded by the re-architectured <text:span text:style-name="T289">Services components described in chapter </text:span><text:span text:style-name="T289"><text:bookmark-ref text:reference-format="number" text:ref-name="__RefHeading___Toc26691_2092659162">10</text:bookmark-ref></text:span><text:span text:style-name="T289">. The legacy components are deprecated and should not be used in new applications.</text:span></text:p>
      <text:list text:continue-numbering="true" text:style-name="WW8Num2">
        <text:list-item>
          <text:list>
            <text:list-item>
              <text:h text:style-name="A2" text:outline-level="2"><text:bookmark-start text:name="__RefHeading__13111_19916104821"/>Firebird <text:span text:style-name="T29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280"><draw:frame draw:style-name="fr10" draw:name="Image44" text:anchor-type="paragraph" svg:width="0.3465in" svg:height="0.3465in" draw:z-index="48"><draw:image xlink:href="Pictures/10000000000000190000001905185DA1.png" xlink:type="simple" xlink:show="embed" xlink:actuate="onLoad" draw:mime-type="image/png"/></draw:frame></text:p>
          </table:table-cell>
          <table:table-cell table:style-name="Table55.A1" office:value-type="string">
            <text:p text:style-name="P432"><text:span text:style-name="Symbol">TIBBackupService</text:span></text:p>
          </table:table-cell>
          <table:table-cell table:style-name="Table55.C1" office:value-type="string">
            <text:p text:style-name="P432">The backup service supports database backup to gbak format archives. Both server side and client side backup file locations are supported.</text:p>
          </table:table-cell>
        </table:table-row>
        <table:table-row>
          <table:table-cell table:style-name="Table55.A2" office:value-type="string">
            <text:p text:style-name="P280"><draw:frame draw:style-name="fr10" draw:name="Image45" text:anchor-type="paragraph" svg:width="0.3465in" svg:height="0.3465in" draw:z-index="49"><draw:image xlink:href="Pictures/100000000000001900000019358B1944.png" xlink:type="simple" xlink:show="embed" xlink:actuate="onLoad" draw:mime-type="image/png"/></draw:frame></text:p>
          </table:table-cell>
          <table:table-cell table:style-name="Table55.A2" office:value-type="string">
            <text:p text:style-name="P432"><text:span text:style-name="Symbol">TIBRestoreService</text:span></text:p>
          </table:table-cell>
          <table:table-cell table:style-name="Table55.C2" office:value-type="string">
            <text:p text:style-name="P432">The re<text:span text:style-name="T107">store service supports database restore from gbak format archives. </text:span>Both server side and client side backup file locations are supported.</text:p>
          </table:table-cell>
        </table:table-row>
        <table:table-row>
          <table:table-cell table:style-name="Table55.A2" office:value-type="string">
            <text:p text:style-name="P280"><draw:frame draw:style-name="fr10" draw:name="Image46" text:anchor-type="paragraph" svg:width="0.3465in" svg:height="0.3465in" draw:z-index="50"><draw:image xlink:href="Pictures/10000000000000190000001980BE8BCC.png" xlink:type="simple" xlink:show="embed" xlink:actuate="onLoad" draw:mime-type="image/png"/></draw:frame></text:p>
          </table:table-cell>
          <table:table-cell table:style-name="Table55.A2" office:value-type="string">
            <text:p text:style-name="P644"><text:span text:style-name="Symbol">TIBConfigService</text:span></text:p>
          </table:table-cell>
          <table:table-cell table:style-name="Table55.C2" office:value-type="string">
            <text:p text:style-name="P644">The configuration service allows database parameter<text:span text:style-name="T251">s</text:span> to be modified, including whether the database is online, sync versus async writes, etc.</text:p>
          </table:table-cell>
        </table:table-row>
        <table:table-row>
          <table:table-cell table:style-name="Table55.A2" office:value-type="string">
            <text:p text:style-name="P280"><draw:frame draw:style-name="fr10" draw:name="Image47" text:anchor-type="paragraph" svg:width="0.3465in" svg:height="0.3465in" draw:z-index="51"><draw:image xlink:href="Pictures/1000000000000019000000199B4F2BFA.png" xlink:type="simple" xlink:show="embed" xlink:actuate="onLoad" draw:mime-type="image/png"/></draw:frame></text:p>
          </table:table-cell>
          <table:table-cell table:style-name="Table55.A2" office:value-type="string">
            <text:p text:style-name="P644"><text:span text:style-name="Symbol">TIBServerProperties</text:span></text:p>
          </table:table-cell>
          <table:table-cell table:style-name="Table55.C2" office:value-type="string">
            <text:p text:style-name="P644">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280"><draw:frame draw:style-name="fr10" draw:name="Image48" text:anchor-type="paragraph" svg:width="0.3465in" svg:height="0.3465in" draw:z-index="52"><draw:image xlink:href="Pictures/1000000000000019000000195ABB68A0.png" xlink:type="simple" xlink:show="embed" xlink:actuate="onLoad" draw:mime-type="image/png"/></draw:frame></text:p>
          </table:table-cell>
          <table:table-cell table:style-name="Table55.A2" office:value-type="string">
            <text:p text:style-name="P644"><text:span text:style-name="Symbol">TIBLogService</text:span></text:p>
          </table:table-cell>
          <table:table-cell table:style-name="Table55.C2" office:value-type="string">
            <text:p text:style-name="P644">This service supports the retrieval of the server log file contents.</text:p>
          </table:table-cell>
        </table:table-row>
        <table:table-row>
          <table:table-cell table:style-name="Table55.A2" office:value-type="string">
            <text:p text:style-name="P280"><draw:frame draw:style-name="fr10" draw:name="Image49" text:anchor-type="paragraph" svg:width="0.3465in" svg:height="0.3465in" draw:z-index="53"><draw:image xlink:href="Pictures/1000000000000019000000191BC0D30D.png" xlink:type="simple" xlink:show="embed" xlink:actuate="onLoad" draw:mime-type="image/png"/></draw:frame></text:p>
          </table:table-cell>
          <table:table-cell table:style-name="Table55.A2" office:value-type="string">
            <text:p text:style-name="P644"><text:span text:style-name="Symbol">TIBStatisticalService</text:span></text:p>
          </table:table-cell>
          <table:table-cell table:style-name="Table55.C2" office:value-type="string">
            <text:p text:style-name="P644">This service supports the retrieval of per database statistics.</text:p>
          </table:table-cell>
        </table:table-row>
        <table:table-row>
          <table:table-cell table:style-name="Table55.A2" office:value-type="string">
            <text:p text:style-name="P280"><draw:frame draw:style-name="fr10" draw:name="Image50" text:anchor-type="paragraph" svg:width="0.3465in" svg:height="0.3465in" draw:z-index="54"><draw:image xlink:href="Pictures/1000000000000019000000190522DB56.png" xlink:type="simple" xlink:show="embed" xlink:actuate="onLoad" draw:mime-type="image/png"/></draw:frame></text:p>
          </table:table-cell>
          <table:table-cell table:style-name="Table55.A2" office:value-type="string">
            <text:p text:style-name="P644"><text:span text:style-name="Symbol">TIBSecurityService</text:span></text:p>
          </table:table-cell>
          <table:table-cell table:style-name="Table55.C2" office:value-type="string">
            <text:p text:style-name="P644">This service supports management of the User Security Database.</text:p>
          </table:table-cell>
        </table:table-row>
        <table:table-row>
          <table:table-cell table:style-name="Table55.A2" office:value-type="string">
            <text:p text:style-name="P280"><draw:frame draw:style-name="fr10" draw:name="Image51" text:anchor-type="paragraph" svg:width="0.3465in" svg:height="0.3465in" draw:z-index="55"><draw:image xlink:href="Pictures/100000000000001900000019A9530BCF.png" xlink:type="simple" xlink:show="embed" xlink:actuate="onLoad" draw:mime-type="image/png"/></draw:frame></text:p>
          </table:table-cell>
          <table:table-cell table:style-name="Table55.A2" office:value-type="string">
            <text:p text:style-name="P644"><text:span text:style-name="Symbol">TIBValidationService</text:span></text:p>
          </table:table-cell>
          <table:table-cell table:style-name="Table55.C2" office:value-type="string">
            <text:p text:style-name="P644">This service supports the invocation of various database repair actions, including validation and sweep. Limbo Transactions can also be resolved.</text:p>
          </table:table-cell>
        </table:table-row>
        <table:table-row>
          <table:table-cell table:style-name="Table55.A2" office:value-type="string">
            <text:p text:style-name="P280"><draw:frame draw:style-name="fr9" draw:name="Image52" text:anchor-type="paragraph" svg:width="0.3465in" svg:height="0.3465in" draw:z-index="56"><draw:image xlink:href="Pictures/100000000000001900000019A6B7E297.png" xlink:type="simple" xlink:show="embed" xlink:actuate="onLoad" draw:mime-type="image/png"/></draw:frame></text:p>
          </table:table-cell>
          <table:table-cell table:style-name="Table55.A2" office:value-type="string">
            <text:p text:style-name="P708">TIBOnlineValidationService</text:p>
          </table:table-cell>
          <table:table-cell table:style-name="Table55.C2" office:value-type="string">
            <text:p text:style-name="P708">This service was introduced for Firebird 3 and provides for a table level validation of a database. It implements consistency checks that do not require exclusive access to a database.</text:p>
          </table:table-cell>
        </table:table-row>
      </table:table>
      <text:p text:style-name="P279"/>
      <text:list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58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584"><text:span text:style-name="Symbol">Active</text:span></text:p>
          </table:table-cell>
          <table:table-cell table:style-name="Table56.B1" office:value-type="string">
            <text:p text:style-name="P584">Set to true to attach to the server and establish a connection with it.</text:p>
            <text:p text:style-name="P584">Set to false to terminate an active connection.</text:p>
          </table:table-cell>
        </table:table-row>
        <table:table-row>
          <table:table-cell table:style-name="Table56.A2" office:value-type="string">
            <text:p text:style-name="P584"><text:span text:style-name="Symbol">LoginPrompt</text:span></text:p>
          </table:table-cell>
          <table:table-cell table:style-name="Table56.B2" office:value-type="string">
            <text:p text:style-name="P584">Set to true to enable use of the built-in login prompt dialog.</text:p>
          </table:table-cell>
        </table:table-row>
        <table:table-row>
          <table:table-cell table:style-name="Table56.A2" office:value-type="string">
            <text:p text:style-name="P584"><text:span text:style-name="Symbol">Params</text:span></text:p>
          </table:table-cell>
          <table:table-cell table:style-name="Table56.B2" office:value-type="string">
            <text:p text:style-name="P584">Holds the login user name and password, as a list of keyword equals string (e.g. user_name=SYSDBA, password=masterkey). Is is recommended that the password is not set at design time. <text:span text:style-name="T199">A component editor is available to set each service's parameters.</text:span></text:p>
          </table:table-cell>
        </table:table-row>
        <table:table-row>
          <table:table-cell table:style-name="Table56.A2" office:value-type="string">
            <text:p text:style-name="P584"><text:span text:style-name="Symbol">Protocol</text:span></text:p>
          </table:table-cell>
          <table:table-cell table:style-name="Table56.B2" office:value-type="string">
            <text:p text:style-name="P584">Determines the connection type (local, TCP,SPX or Named Pipe). On<text:span text:style-name="T251">ly</text:span> the first two should be considered for use in current systems.</text:p>
          </table:table-cell>
        </table:table-row>
        <table:table-row>
          <table:table-cell table:style-name="Table56.A2" office:value-type="string">
            <text:p text:style-name="P584"><text:span text:style-name="Symbol">ServerName</text:span></text:p>
          </table:table-cell>
          <table:table-cell table:style-name="Table56.B2" office:value-type="string">
            <text:p text:style-name="P584">The (domain) name of the server.</text:p>
          </table:table-cell>
        </table:table-row>
        <table:table-row>
          <table:table-cell table:style-name="Table56.A2" office:value-type="string">
            <text:p text:style-name="P701"><text:span text:style-name="Symbol">ServerVersionNo</text:span></text:p>
          </table:table-cell>
          <table:table-cell table:style-name="Table56.B2" office:value-type="string">
            <text:p text:style-name="P701">An integer array [1..4] giving the Firebird Release number (elements 1..3) and the build no. (element 4).</text:p>
          </table:table-cell>
        </table:table-row>
      </table:table>
      <text:p text:style-name="P583"/>
      <text:p text:style-name="P437">The public property <text:span text:style-name="T97">ServiceIntf</text:span> exposes the IServiceManager interface used to communicate with the server. This interface is available (non-nil) when Active is true. It can be assigned between <text:s/><text:span text:style-name="T108">Firebird Admin components </text:span>allowing them to share the same connection without having to separately log in for each separate service.</text:p>
      <text:p text:style-name="P281">Note: setting active to false disconnects the connection and invalidates the shared interface.</text:p>
      <text:p text:style-name="P270">From IBX 2.2 and Firebird 3 onwards, a Params line in the format</text:p>
      <text:p text:style-name="P270"><text:s/>“expected_db=&lt;databasename&gt;” </text:p>
      <text:p text:style-name="P270">is supported.</text:p>
      <text:p text:style-name="P270">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270">The purpose of this is (e.g.) to perform a backup/restore for a database using an alternative security database. It is also needed for accessing database statistics or Limbo Transaction recovery.</text:p>
      <text:list xml:id="list100751708821132"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32">The backup service supports database backup to gbak format archives. Both server side and client side backup file locations are supported. <text:span text:style-name="T108">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650"><text:span text:style-name="Symbol">BackupFile</text:span></text:p>
          </table:table-cell>
          <table:table-cell table:style-name="Table57.B1" office:value-type="string">
            <text:p text:style-name="P65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650"><text:span text:style-name="Symbol">BackupFileLocation</text:span></text:p>
          </table:table-cell>
          <table:table-cell table:style-name="Table57.B2" office:value-type="string">
            <text:p text:style-name="P650">ServerSide or ClientSide. This determines whether the backup is to a file located on the server side or on the client side of the connection.</text:p>
          </table:table-cell>
        </table:table-row>
        <table:table-row>
          <table:table-cell table:style-name="Table57.A2" office:value-type="string">
            <text:p text:style-name="P650"><text:span text:style-name="Symbol">BlockingFactor</text:span></text:p>
          </table:table-cell>
          <table:table-cell table:style-name="Table57.B2" office:value-type="string">
            <text:p text:style-name="P650">See gbak documentation <text:s/>for non-zero values (probably obsolescent)</text:p>
          </table:table-cell>
        </table:table-row>
        <table:table-row>
          <table:table-cell table:style-name="Table57.A2" office:value-type="string">
            <text:p text:style-name="P650"><text:span text:style-name="Symbol">DatabaseName</text:span></text:p>
          </table:table-cell>
          <table:table-cell table:style-name="Table57.B2" office:value-type="string">
            <text:p text:style-name="P650">Alias of or full pathname for database on the server.</text:p>
          </table:table-cell>
        </table:table-row>
        <table:table-row>
          <table:table-cell table:style-name="Table57.A2" office:value-type="string">
            <text:p text:style-name="P650"><text:span text:style-name="Symbol">Options</text:span></text:p>
          </table:table-cell>
          <table:table-cell table:style-name="Table57.B2" office:value-type="string">
            <text:p text:style-name="P650">See gbak documentation for interpretation of each option.</text:p>
          </table:table-cell>
        </table:table-row>
        <table:table-row>
          <table:table-cell table:style-name="Table57.A2" office:value-type="string">
            <text:p text:style-name="P650"><text:span text:style-name="Symbol">Verbose</text:span></text:p>
          </table:table-cell>
          <table:table-cell table:style-name="Table57.B2" office:value-type="string">
            <text:p text:style-name="P650">Server Side Backups only: if true then additional text messages are generated.</text:p>
          </table:table-cell>
        </table:table-row>
        <table:table-row>
          <table:table-cell table:style-name="Table57.A2" office:value-type="string">
            <text:p text:style-name="P703"><text:span text:style-name="Symbol">StatisticsRequested</text:span></text:p>
          </table:table-cell>
          <table:table-cell table:style-name="Table57.B2" office:value-type="string">
            <text:p text:style-name="P703">In verbose mode additional statistics are provided with output:</text:p>
            <text:list xml:id="list4263082446" text:style-name="L7">
              <text:list-item>
                <text:p text:style-name="P1115">Total Time</text:p>
              </text:list-item>
              <text:list-item>
                <text:p text:style-name="P1115">Time Delta</text:p>
              </text:list-item>
              <text:list-item>
                <text:p text:style-name="P1115">Page Reads</text:p>
              </text:list-item>
              <text:list-item>
                <text:p text:style-name="P1115">PageWrites</text:p>
              </text:list-item>
            </text:list>
          </table:table-cell>
        </table:table-row>
      </table:table>
      <text:p text:style-name="P278"/>
      <text:list text:continue-list="list100751708821132"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437">The following code illustrates how a server side backup is performed after the above properties have been set:</text:p>
      <text:p text:style-name="P273"><text:s text:c="4"/>IBBackupService1.Active := true;</text:p>
      <text:p text:style-name="P273"><text:s text:c="4"/>IBBackupService1.ServiceStart;</text:p>
      <text:p text:style-name="P273"><text:s text:c="6"/>while not IBBackupService1.Eof do</text:p>
      <text:p text:style-name="P273"><text:s text:c="8"/>writeln(IBBackupService1.GetNextLine);</text:p>
      <text:p text:style-name="P273"><text:s text:c="6"/>Application.ProcessMessages</text:p>
      <text:p text:style-name="P273"><text:s text:c="4"/>IBBackupService1.Active := false; {only if you no longer need the connection}</text:p>
      <text:p text:style-name="P272">Once the service has been started, running the service until completion is a simple loop checking for “EOF”, <text:span text:style-name="T252">while</text:span> calling the GetNextLine method. This returns lines of text from the server (most relevant in verbose mode). In this example, they are written to stdout.</text:p>
      <text:list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437">The following code illustrates how a <text:span text:style-name="T110">client</text:span> side backup is performed after the above properties have been set:</text:p>
      <text:p text:style-name="P273">var bakfile: TFileStream;</text:p>
      <text:p text:style-name="P273">begin</text:p>
      <text:p text:style-name="P273"><text:s text:c="2"/>bakfile := T<text:span text:style-name="T111">F</text:span>ileStream.Create('&lt;path to backup file&gt;',fmCreate);</text:p>
      <text:p text:style-name="P273"><text:s text:c="2"/>try</text:p>
      <text:p text:style-name="P273"><text:s text:c="4"/>IBBackupService1.Active := true;</text:p>
      <text:p text:style-name="P273"><text:s text:c="4"/>IBBackupService1.ServiceStart;</text:p>
      <text:p text:style-name="P273"><text:s text:c="4"/>while not IBBackupService1.Eof do</text:p>
      <text:p text:style-name="P273"><text:s text:c="4"/>begin</text:p>
      <text:p text:style-name="P273"><text:s text:c="6"/>IBBackupService1.WriteNextChunk(bakfile);</text:p>
      <text:p text:style-name="P273"><text:s text:c="6"/>Application.ProcessMessages</text:p>
      <text:p text:style-name="P273"><text:s text:c="4"/>end;</text:p>
      <text:p text:style-name="P273"><text:s text:c="2"/>finally</text:p>
      <text:p text:style-name="P273"><text:s text:c="4"/>bakfile.Free;</text:p>
      <text:p text:style-name="P273"><text:s text:c="2"/>end;</text:p>
      <text:p text:style-name="P273">end;</text:p>
      <text:p text:style-name="P276">The above is very similar <text:span text:style-name="T113">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00750057745783" text:continue-numbering="true" text:style-name="WW8Num2">
        <text:list-item>
          <text:list>
            <text:list-item>
              <text:h text:style-name="A2" text:outline-level="2"><text:bookmark-start text:name="__RefHeading__23851_2746174721"/>The <text:span text:style-name="T112">Restore Service</text:span><text:bookmark-end text:name="__RefHeading__23851_2746174721"/></text:h>
            </text:list-item>
          </text:list>
        </text:list-item>
      </text:list>
      <text:p text:style-name="P432">The <text:span text:style-name="T112">Restore</text:span> service supports database <text:span text:style-name="T112">restore from</text:span> gbak format archives. Both server side and client side backup file locations are supported. <text:span text:style-name="T108">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650"><text:span text:style-name="Symbol">BackupFile</text:span></text:p>
          </table:table-cell>
          <table:table-cell table:style-name="Table58.B1" office:value-type="string">
            <text:p text:style-name="P650">Server Side <text:span text:style-name="T112">Restores</text:span> only: This is a list full pathnames to one or more backup files on the server. <text:span text:style-name="T112">When more than one is provided, these are read in the same order that the are defined</text:span></text:p>
          </table:table-cell>
        </table:table-row>
        <table:table-row>
          <table:table-cell table:style-name="Table58.A2" office:value-type="string">
            <text:p text:style-name="P650"><text:span text:style-name="Symbol">BackupFileLocation</text:span></text:p>
          </table:table-cell>
          <table:table-cell table:style-name="Table58.B2" office:value-type="string">
            <text:p text:style-name="P650">ServerSide or ClientSide. This determines whether the <text:span text:style-name="T112">restore</text:span> is <text:span text:style-name="T112">from</text:span> a file located on the server side or on the client side of the connection.</text:p>
          </table:table-cell>
        </table:table-row>
        <table:table-row>
          <table:table-cell table:style-name="Table58.A2" office:value-type="string">
            <text:p text:style-name="P650"><text:span text:style-name="Symbol">DatabaseName</text:span></text:p>
          </table:table-cell>
          <table:table-cell table:style-name="Table58.B2" office:value-type="string">
            <text:p text:style-name="P650"><text:span text:style-name="T112">A list of </text:span>Alias<text:span text:style-name="T112">es</text:span> of or full pathname<text:span text:style-name="T112">s</text:span> for database on the server.</text:p>
          </table:table-cell>
        </table:table-row>
        <table:table-row>
          <table:table-cell table:style-name="Table58.A2" office:value-type="string">
            <text:p text:style-name="P650"><text:span text:style-name="Symbol">Options</text:span></text:p>
          </table:table-cell>
          <table:table-cell table:style-name="Table58.B2" office:value-type="string">
            <text:p text:style-name="P650">See gbak documentation for interpretation of each option. <text:span text:style-name="T112">This must include either CreateNewDB (default) or Replace, but not both.</text:span></text:p>
          </table:table-cell>
        </table:table-row>
        <table:table-row>
          <table:table-cell table:style-name="Table58.A2" office:value-type="string">
            <text:p text:style-name="P656"><text:span text:style-name="Symbol">PageBuffers</text:span></text:p>
          </table:table-cell>
          <table:table-cell table:style-name="Table58.B2" office:value-type="string">
            <text:p text:style-name="P656">See gbak <text:s/><text:span text:style-name="T109">documentation</text:span></text:p>
          </table:table-cell>
        </table:table-row>
        <table:table-row>
          <table:table-cell table:style-name="Table58.A2" office:value-type="string">
            <text:p text:style-name="P656"><text:span text:style-name="Symbol">PageSize</text:span></text:p>
          </table:table-cell>
          <table:table-cell table:style-name="Table58.B2" office:value-type="string">
            <text:p text:style-name="P656">See gbak <text:s/><text:span text:style-name="T109">documentation</text:span></text:p>
          </table:table-cell>
        </table:table-row>
        <table:table-row>
          <table:table-cell table:style-name="Table58.A2" office:value-type="string">
            <text:p text:style-name="P650"><text:span text:style-name="Symbol">Verbose</text:span></text:p>
          </table:table-cell>
          <table:table-cell table:style-name="Table58.B2" office:value-type="string">
            <text:p text:style-name="P650"><text:span text:style-name="T112">I</text:span>f true then additional text messages are generated.</text:p>
          </table:table-cell>
        </table:table-row>
        <table:table-row>
          <table:table-cell table:style-name="Table58.A2" office:value-type="string">
            <text:p text:style-name="P703"><text:span text:style-name="Symbol">StatisticsRequested</text:span></text:p>
          </table:table-cell>
          <table:table-cell table:style-name="Table58.B2" office:value-type="string">
            <text:p text:style-name="P703">In verbose mode additional statistics are provided with output:</text:p>
            <text:list text:continue-list="list4263082446" text:style-name="L7">
              <text:list-item>
                <text:p text:style-name="P1115">Total Time</text:p>
              </text:list-item>
              <text:list-item>
                <text:p text:style-name="P1115">Time Delta</text:p>
              </text:list-item>
              <text:list-item>
                <text:p text:style-name="P1115"><text:soft-page-break/>Page Reads</text:p>
              </text:list-item>
              <text:list-item>
                <text:p text:style-name="P1115">PageWrites</text:p>
              </text:list-item>
            </text:list>
          </table:table-cell>
        </table:table-row>
      </table:table>
      <text:p text:style-name="P278"/>
      <text:list text:continue-list="list100750057745783"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437">The following code illustrates how a server side <text:span text:style-name="T113">restore</text:span> is performed after the above properties have been set:</text:p>
      <text:p text:style-name="P745"><text:s text:c="4"/>IBRestoreService1.Active := true;</text:p>
      <text:p text:style-name="P745"><text:s text:c="4"/>IBRestoreService1.ServiceStart;</text:p>
      <text:p text:style-name="P745"><text:s text:c="4"/>while not IBRestoreService1.Eof do</text:p>
      <text:p text:style-name="P745"><text:s text:c="4"/>begin</text:p>
      <text:p text:style-name="P745"><text:s text:c="6"/>writeln(IBRestoreService1.GetNextLine);</text:p>
      <text:p text:style-name="P745"><text:s text:c="6"/>Application.ProcessMessages</text:p>
      <text:p text:style-name="P745"><text:s text:c="4"/>end;</text:p>
      <text:p text:style-name="P272">Once the service has been started, running the service until completion is a simple loop checking for “EOF”, <text:span text:style-name="T253">while</text:span> calling the GetNextLine method. This returns lines of text from the server (most relevant in verbose mode). In this example, they are written to stdout.</text:p>
      <text:list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437">The following code illustrates how a <text:span text:style-name="T110">client</text:span> side <text:span text:style-name="T113">restore</text:span> is performed after the above properties have been set:</text:p>
      <text:p text:style-name="P745">var bakfile: TFileStream;</text:p>
      <text:p text:style-name="P745"><text:s text:c="4"/>line: string;</text:p>
      <text:p text:style-name="P745">begin</text:p>
      <text:p text:style-name="P745"><text:s text:c="2"/>bakfile := T<text:span text:style-name="T114">F</text:span>ileStream.Create('&lt;path to backup file&gt;',fmOpenRead);</text:p>
      <text:p text:style-name="P745"><text:s text:c="2"/>try</text:p>
      <text:p text:style-name="P745"><text:s text:c="4"/>IBRestoreService1.Active := true;</text:p>
      <text:p text:style-name="P745"><text:s text:c="4"/>IBRestoreService1.ServiceStart;</text:p>
      <text:p text:style-name="P745"><text:s text:c="4"/>while not IBRestoreService1.Eof do</text:p>
      <text:p text:style-name="P745"><text:s text:c="4"/>begin</text:p>
      <text:p text:style-name="P745"><text:s text:c="6"/>IBRestoreService1.SendNextChunk(bakfile,line);</text:p>
      <text:p text:style-name="P745"><text:s text:c="6"/>if line &lt;&gt; '' then</text:p>
      <text:p text:style-name="P745"><text:s text:c="8"/>writeln(line);</text:p>
      <text:p text:style-name="P745"><text:s text:c="6"/>Application.ProcessMessages</text:p>
      <text:p text:style-name="P745"><text:s text:c="4"/>end;</text:p>
      <text:p text:style-name="P745"><text:s text:c="2"/>finally</text:p>
      <text:p text:style-name="P745"><text:s text:c="4"/>bakfile.Free;</text:p>
      <text:p text:style-name="P745"><text:s text:c="2"/>end;</text:p>
      <text:p text:style-name="P745">end;</text:p>
      <text:p text:style-name="P276">The above is very similar <text:span text:style-name="T113">to server side case</text:span>, except that the service user has to provide a <text:span text:style-name="Symbol">TStream</text:span> (in the above <text:span text:style-name="Symbol">TFileStream</text:span>) as the <text:span text:style-name="T113">source</text:span> of the backup archive. Instead of looking on <text:span text:style-name="Symbol">GetNextLine</text:span>, a client side backup loops on <text:span text:style-name="Symbol"><text:span text:style-name="T113">SendNextChunk</text:span></text:span>. <text:span text:style-name="T113">This both reads from the stream and may return a line of text when one is received from the server.</text:span></text:p>
      <text:list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441">The TIBConfigService must also have its common properties set <text:span text:style-name="T253">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42"><text:span text:style-name="Symbol">ShutdownDatabase</text:span></text:p>
          </table:table-cell>
          <table:table-cell table:style-name="Table59.B1" office:value-type="string">
            <text:p text:style-name="P442">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42"><text:span text:style-name="Symbol">BringDatabaseOnline</text:span></text:p>
          </table:table-cell>
          <table:table-cell table:style-name="Table59.B2" office:value-type="string">
            <text:p text:style-name="P442">Puts the database into its online state (reverse of shutdown).</text:p>
          </table:table-cell>
        </table:table-row>
        <table:table-row>
          <table:table-cell table:style-name="Table59.A2" office:value-type="string">
            <text:p text:style-name="P442"><text:span text:style-name="Symbol">SetSweepInterval</text:span></text:p>
          </table:table-cell>
          <table:table-cell table:style-name="Table59.B2" office:value-type="string">
            <text:p text:style-name="P442">Sets the automatic sweep interval</text:p>
          </table:table-cell>
        </table:table-row>
        <table:table-row>
          <table:table-cell table:style-name="Table59.A2" office:value-type="string">
            <text:p text:style-name="P442"><text:span text:style-name="Symbol">SetDBSqlDialect</text:span></text:p>
          </table:table-cell>
          <table:table-cell table:style-name="Table59.B2" office:value-type="string">
            <text:p text:style-name="P442">Sets the default database SQL dialect (1 or 3)</text:p>
          </table:table-cell>
        </table:table-row>
        <table:table-row>
          <table:table-cell table:style-name="Table59.A2" office:value-type="string">
            <text:p text:style-name="P442"><text:span text:style-name="Symbol">SetPageBuffers</text:span></text:p>
          </table:table-cell>
          <table:table-cell table:style-name="Table59.B2" office:value-type="string">
            <text:p text:style-name="P442">Set the default number of cache buffers to the specified number.</text:p>
          </table:table-cell>
        </table:table-row>
        <table:table-row>
          <table:table-cell table:style-name="Table59.A2" office:value-type="string">
            <text:p text:style-name="P442"><text:span text:style-name="Symbol">ActivateShadow</text:span></text:p>
          </table:table-cell>
          <table:table-cell table:style-name="Table59.B2" office:value-type="string">
            <text:p text:style-name="P442">Activates a database “shadow file” See the Firebird Documentation for more information on database shadow files.</text:p>
          </table:table-cell>
        </table:table-row>
        <table:table-row>
          <table:table-cell table:style-name="Table59.A2" office:value-type="string">
            <text:p text:style-name="P442"><text:span text:style-name="Symbol">SetReserveSpace</text:span></text:p>
          </table:table-cell>
          <table:table-cell table:style-name="Table59.B2" office:value-type="string">
            <text:p text:style-name="P442">Configure the database to fill data pages when inserting new records (true), or reserve 20% of each page for later record deltas (true)</text:p>
          </table:table-cell>
        </table:table-row>
        <table:table-row>
          <table:table-cell table:style-name="Table59.A2" office:value-type="string">
            <text:p text:style-name="P442"><text:span text:style-name="Symbol">SetAsyncMode</text:span></text:p>
          </table:table-cell>
          <table:table-cell table:style-name="Table59.B2" office:value-type="string">
            <text:p text:style-name="P442">Toggles between async writes (true) and sync writes (false).</text:p>
          </table:table-cell>
        </table:table-row>
        <table:table-row>
          <table:table-cell table:style-name="Table59.A2" office:value-type="string">
            <text:p text:style-name="P442"><text:span text:style-name="Symbol">SetReadOnly</text:span></text:p>
          </table:table-cell>
          <table:table-cell table:style-name="Table59.B2" office:value-type="string">
            <text:p text:style-name="P442">Sets read only or read/write mode.</text:p>
          </table:table-cell>
        </table:table-row>
        <table:table-row>
          <table:table-cell table:style-name="Table59.A2" office:value-type="string">
            <text:p text:style-name="P706"><text:span text:style-name="Symbol">SetNoLinger</text:span></text:p>
          </table:table-cell>
          <table:table-cell table:style-name="Table59.B2" office:value-type="string">
            <text:p text:style-name="P280"><text:span text:style-name="T284">Set the No Linger Flag on a database. This is a “one-shot” override. </text:span><text:span text:style-name="T283"><text:s/></text:span>Once set, the server will close the database immediately the last attachment is gone, regardless of the LINGER setting in the database. The LINGER setting is retained and works normally the next time.</text:p>
          </table:table-cell>
        </table:table-row>
      </table:table>
      <text:p text:style-name="P441"/>
      <text:list xml:id="list100750029647816"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644">This service retrieves various server properties including the server version information, server parameters and the current status of database attachments. <text:span text:style-name="T115">The information returned is divided up into:</text:span></text:p>
      <text:list text:style-name="L100">
        <text:list-item>
          <text:p text:style-name="P1117">Server Version Information</text:p>
        </text:list-item>
        <text:list-item>
          <text:p text:style-name="P1117">Active Database Information, and</text:p>
        </text:list-item>
        <text:list-item>
          <text:p text:style-name="P1117">Configuration Parameters</text:p>
        </text:list-item>
      </text:list>
      <text:p text:style-name="P657">Each information set has a corresponding method to request the current information, which then sets the values of the linked property. The property may then be read to access the requested information. For example:</text:p>
      <text:p text:style-name="P658">var <text:span text:style-name="T116">i</text:span>: integer;</text:p>
      <text:p text:style-name="P658">begin</text:p>
      <text:p text:style-name="P658"><text:s text:c="2"/>with IBServerProperties1 do</text:p>
      <text:p text:style-name="P658"><text:s text:c="2"/>begin</text:p>
      <text:p text:style-name="P658"><text:s text:c="4"/>Active := true;</text:p>
      <text:p text:style-name="P658"><text:s text:c="4"/>FetchVersionInfo;</text:p>
      <text:p text:style-name="P658"><text:s text:c="4"/>writeln('Server Version = ' + VersionInfo.ServerVersion);</text:p>
      <text:p text:style-name="P658"><text:s text:c="4"/>writeln('Server Implementation = ' + VersionInfo.ServerImplementation);</text:p>
      <text:p text:style-name="P658"><text:s text:c="4"/>writeln('Service Version = ' + IntToStr(VersionInfo.ServiceVersion));</text:p>
      <text:p text:style-name="P658"/>
      <text:p text:style-name="P658"><text:soft-page-break/><text:s text:c="4"/>FetchDatabaseInfo;</text:p>
      <text:p text:style-name="P658"><text:s text:c="4"/>writeln('No. of attachments = ' + IntToStr(DatabaseInfo.NoOfAttachments));</text:p>
      <text:p text:style-name="P658"><text:s text:c="4"/>writeln('No. of databases = ' + IntToStr(DatabaseInfo.NoOfDatabases));</text:p>
      <text:p text:style-name="P658"><text:s text:c="4"/>for i := 0 to DatabaseInfo.NoOfDatabases - 1 do</text:p>
      <text:p text:style-name="P658"><text:s text:c="6"/>writeln('DB Name = ' + DatabaseInfo.DbName[i]);</text:p>
      <text:p text:style-name="P658"/>
      <text:p text:style-name="P658"><text:s text:c="4"/>FetchConfigParams;</text:p>
      <text:p text:style-name="P658"><text:s text:c="4"/>writeln('Base Location = ' + ConfigParams.BaseLocation);</text:p>
      <text:p text:style-name="P658"><text:s text:c="4"/>writeln('Lock File Location = ' + ConfigParams.LockFileLocation);</text:p>
      <text:p text:style-name="P658"><text:s text:c="4"/>writeln('Security Database Location = ' + ConfigParams.SecurityDatabaseLocation);</text:p>
      <text:p text:style-name="P658"><text:s text:c="2"/>end;</text:p>
      <text:p text:style-name="P658">end;</text:p>
      <text:list text:continue-list="list100750029647816"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88">This is a simple service that may be used to retrieve the current server log file contents. For example:</text:p>
      <text:p text:style-name="P90"><text:s text:c="2"/>with IBLogService1 do</text:p>
      <text:p text:style-name="P90"><text:s text:c="2"/>begin</text:p>
      <text:p text:style-name="P90"><text:s text:c="4"/>Active := true;</text:p>
      <text:p text:style-name="P90"><text:s text:c="4"/>ServiceStart;</text:p>
      <text:p text:style-name="P90"><text:s text:c="4"/>while not Eof do</text:p>
      <text:p text:style-name="P90"><text:s text:c="4"/>begin</text:p>
      <text:p text:style-name="P90"><text:s text:c="6"/>writeln(GetNextLine);</text:p>
      <text:p text:style-name="P90"><text:s text:c="6"/>Application.ProcessMessages;</text:p>
      <text:p text:style-name="P90"><text:s text:c="4"/>end;</text:p>
      <text:p text:style-name="P90"><text:s text:c="2"/>end;</text:p>
      <text:list xml:id="list100750056454315"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644">This service supports the retrieval of per database statistics <text:span text:style-name="T116">as text data. The use of this service is very similar to the Log Service except that:</text:span></text:p>
      <text:list text:style-name="L101">
        <text:list-item>
          <text:p text:style-name="P1125">The <text:span text:style-name="Symbol">DatabaseName</text:span> property must be set to alias or full path name on the server of the database for which the statistics are requested.</text:p>
        </text:list-item>
        <text:list-item>
          <text:p text:style-name="P1125">The <text:span text:style-name="Symbol">Options</text:span> property must be set to identify which statistics are requested.</text:p>
        </text:list-item>
      </text:list>
      <text:p text:style-name="P89">Otherwise, statistics retrieval is the same as for the log file. For example:</text:p>
      <text:p text:style-name="P90"><text:s text:c="2"/>with IBStatisticalService1 do</text:p>
      <text:p text:style-name="P90"><text:s text:c="2"/>begin</text:p>
      <text:p text:style-name="P90"><text:s text:c="4"/>DatabaseName := 'myDatabase';</text:p>
      <text:p text:style-name="P90"><text:s text:c="4"/>Options := [HeaderPages];</text:p>
      <text:p text:style-name="P90"><text:s text:c="4"/>Active := true;</text:p>
      <text:p text:style-name="P90"><text:s text:c="4"/>ServiceStart;</text:p>
      <text:p text:style-name="P90"><text:s text:c="4"/>while not Eof do</text:p>
      <text:p text:style-name="P90"><text:s text:c="4"/>begin</text:p>
      <text:p text:style-name="P90"><text:s text:c="6"/>writeln(GetNextLine);</text:p>
      <text:p text:style-name="P90"><text:s text:c="6"/>Application.ProcessMessages;</text:p>
      <text:p text:style-name="P90"><text:s text:c="4"/>end;</text:p>
      <text:p text:style-name="P90"><text:s text:c="2"/>end;</text:p>
      <text:p text:style-name="P87">The above returns the Header Page statistics. The options available are:<text:line-break/></text:p>
      <table:table table:name="Table60" table:style-name="Table60">
        <table:table-column table:style-name="Table60.A"/>
        <table:table-column table:style-name="Table60.B"/>
        <table:table-row>
          <table:table-cell table:style-name="Table60.A1" office:value-type="string">
            <text:p text:style-name="P280"><text:span text:style-name="Symbol">HeaderPages</text:span></text:p>
          </table:table-cell>
          <table:table-cell table:style-name="Table60.B1" office:value-type="string">
            <text:p text:style-name="P89">Request only the information in the database header page</text:p>
          </table:table-cell>
        </table:table-row>
        <text:soft-page-break/>
        <table:table-row>
          <table:table-cell table:style-name="Table60.A2" office:value-type="string">
            <text:p text:style-name="P89"><text:span text:style-name="Symbol">DataPages</text:span></text:p>
          </table:table-cell>
          <table:table-cell table:style-name="Table60.B2" office:value-type="string">
            <text:p text:style-name="P89">Request statistics for user data pages</text:p>
          </table:table-cell>
        </table:table-row>
        <table:table-row>
          <table:table-cell table:style-name="Table60.A2" office:value-type="string">
            <text:p text:style-name="P89"><text:span text:style-name="Symbol">IndexPages</text:span></text:p>
          </table:table-cell>
          <table:table-cell table:style-name="Table60.B2" office:value-type="string">
            <text:p text:style-name="P89">Request statistics for user index pages</text:p>
          </table:table-cell>
        </table:table-row>
        <table:table-row>
          <table:table-cell table:style-name="Table60.A2" office:value-type="string">
            <text:p text:style-name="P89"><text:span text:style-name="Symbol">SystemRelations</text:span></text:p>
          </table:table-cell>
          <table:table-cell table:style-name="Table60.B2" office:value-type="string">
            <text:p text:style-name="P89">Request statistics for system tables and indexes — in addition to user tables and indexes</text:p>
          </table:table-cell>
        </table:table-row>
      </table:table>
      <text:p text:style-name="P87"/>
      <text:list xml:id="list100749993018884" text:continue-list="list10075005645431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644">This service supports management of the User Security Database. <text:span text:style-name="T117">It supports:</text:span></text:p>
      <text:list text:style-name="L102">
        <text:list-item>
          <text:p text:style-name="P1120">The listing of all User Names, and other user identification information</text:p>
        </text:list-item>
        <text:list-item>
          <text:p text:style-name="P1121">Adding New Users </text:p>
        </text:list-item>
        <text:list-item>
          <text:p text:style-name="P1121">Modifying Existing Users (including changing passwords)</text:p>
        </text:list-item>
        <text:list-item>
          <text:p text:style-name="P1121">Deleting Users.</text:p>
        </text:list-item>
        <text:list-item>
          <text:p text:style-name="P1124">From Firebird 2.5 onwards, display and management of the user Admin Role.</text:p>
        </text:list-item>
      </text:list>
      <text:list text:continue-list="list100749993018884"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44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46">var i: integer;</text:p>
      <text:p text:style-name="P446">begin</text:p>
      <text:p text:style-name="P446"><text:s text:c="2"/>with IBSecurityService1 do</text:p>
      <text:p text:style-name="P446"><text:s text:c="2"/>begin</text:p>
      <text:p text:style-name="P446"><text:s text:c="4"/>Active := true;</text:p>
      <text:p text:style-name="P446"><text:s text:c="4"/>DisplayUsers;</text:p>
      <text:p text:style-name="P446"><text:s text:c="4"/>for i := 0 to UserInfoCount - 1 do</text:p>
      <text:p text:style-name="P446"><text:s text:c="4"/>with UserInfo[i] do</text:p>
      <text:p text:style-name="P446"><text:s text:c="4"/>begin</text:p>
      <text:p text:style-name="P446"><text:s text:c="6"/>writeln('User ID = ',UserID);</text:p>
      <text:p text:style-name="P446"><text:s text:c="6"/>writeln('Group ID = ',GroupID);</text:p>
      <text:p text:style-name="P446"><text:s text:c="6"/>writeln('User Name = ',UserName);</text:p>
      <text:p text:style-name="P446"><text:s text:c="6"/>writeln('First Name = ', FirstName);</text:p>
      <text:p text:style-name="P446"><text:s text:c="6"/>writeln('Middle Name = ', MiddleName);</text:p>
      <text:p text:style-name="P446"><text:s text:c="6"/>writeln('Last Name = ', LastName);</text:p>
      <text:p text:style-name="P446"><text:s text:c="6"/><text:span text:style-name="T280">write('Admin Role = ');</text:span></text:p>
      <text:p text:style-name="P446"><text:s text:c="6"/><text:span text:style-name="T280">if AdminRole then writeln('true') else writeln('false');</text:span></text:p>
      <text:p text:style-name="P446"><text:s text:c="4"/>end;</text:p>
      <text:p text:style-name="P446"><text:s text:c="2"/>end;</text:p>
      <text:p text:style-name="P446">end;</text:p>
      <text:list text:continue-numbering="true" text:style-name="WW8Num2">
        <text:list-item>
          <text:list>
            <text:list-item>
              <text:list>
                <text:list-item>
                  <text:h text:style-name="A3" text:outline-level="3"><text:bookmark-start text:name="__RefHeading__12587_19916104821"/>Addin<text:span text:style-name="T223">g</text:span> a User<text:bookmark-end text:name="__RefHeading__12587_19916104821"/></text:h>
                </text:list-item>
              </text:list>
            </text:list-item>
          </text:list>
        </text:list-item>
      </text:list>
      <text:p text:style-name="P45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51"><text:span text:style-name="Symbol">UserName</text:span></text:p>
          </table:table-cell>
          <table:table-cell table:style-name="Table61.B1" office:value-type="string">
            <text:p text:style-name="P451">User (or Login) Name</text:p>
          </table:table-cell>
        </table:table-row>
        <table:table-row>
          <table:table-cell table:style-name="Table61.A2" office:value-type="string">
            <text:p text:style-name="P451"><text:span text:style-name="Symbol">Password</text:span></text:p>
          </table:table-cell>
          <table:table-cell table:style-name="Table61.B2" office:value-type="string">
            <text:p text:style-name="P451">The user's password</text:p>
          </table:table-cell>
        </table:table-row>
        <text:soft-page-break/>
        <table:table-row>
          <table:table-cell table:style-name="Table61.A2" office:value-type="string">
            <text:p text:style-name="P451"><text:span text:style-name="Symbol">FirstName</text:span></text:p>
          </table:table-cell>
          <table:table-cell table:style-name="Table61.B2" office:value-type="string">
            <text:p text:style-name="P451">The user's first name</text:p>
          </table:table-cell>
        </table:table-row>
        <table:table-row>
          <table:table-cell table:style-name="Table61.A2" office:value-type="string">
            <text:p text:style-name="P451"><text:span text:style-name="Symbol">MiddleName </text:span></text:p>
          </table:table-cell>
          <table:table-cell table:style-name="Table61.B2" office:value-type="string">
            <text:p text:style-name="P451">The user's middle name</text:p>
          </table:table-cell>
        </table:table-row>
        <table:table-row>
          <table:table-cell table:style-name="Table61.A2" office:value-type="string">
            <text:p text:style-name="P451"><text:span text:style-name="Symbol">LastName</text:span></text:p>
          </table:table-cell>
          <table:table-cell table:style-name="Table61.B2" office:value-type="string">
            <text:p text:style-name="P451">The user's last name</text:p>
          </table:table-cell>
        </table:table-row>
        <table:table-row>
          <table:table-cell table:style-name="Table61.A2" office:value-type="string">
            <text:p text:style-name="P451"><text:span text:style-name="Symbol">UserID</text:span></text:p>
          </table:table-cell>
          <table:table-cell table:style-name="Table61.B2" office:value-type="string">
            <text:p text:style-name="P451">The Unix UID</text:p>
          </table:table-cell>
        </table:table-row>
        <table:table-row>
          <table:table-cell table:style-name="Table61.A2" office:value-type="string">
            <text:p text:style-name="P451"><text:span text:style-name="Symbol">GroupID</text:span></text:p>
          </table:table-cell>
          <table:table-cell table:style-name="Table61.B2" office:value-type="string">
            <text:p text:style-name="P451">The Unix GID</text:p>
          </table:table-cell>
        </table:table-row>
        <table:table-row>
          <table:table-cell table:style-name="Table61.A2" office:value-type="string">
            <text:p text:style-name="P701"><text:span text:style-name="Symbol">AdminRole</text:span></text:p>
          </table:table-cell>
          <table:table-cell table:style-name="Table61.B2" office:value-type="string">
            <text:p text:style-name="P701">True if the user is granted the Admin Role, otherwise false.</text:p>
          </table:table-cell>
        </table:table-row>
      </table:table>
      <text:p text:style-name="P450"/>
      <text:p text:style-name="P450">The following illustrates the use of the <text:span text:style-name="Symbol">AddUsers</text:span> method:</text:p>
      <text:p text:style-name="P452"><text:s text:c="2"/>with IBSecurityService1 do</text:p>
      <text:p text:style-name="P452"><text:s text:c="2"/>begin</text:p>
      <text:p text:style-name="P452"><text:s text:c="4"/>Active := true;</text:p>
      <text:p text:style-name="P452"><text:s text:c="4"/>UserName := NewUserName;</text:p>
      <text:p text:style-name="P452"><text:s text:c="4"/>Password := NewPassword;</text:p>
      <text:p text:style-name="P452"><text:s text:c="4"/>AddUser;</text:p>
      <text:p text:style-name="P452"><text:s text:c="2"/>end;</text:p>
      <text:list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45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452"><text:s text:c="2"/>with IBSecurityService1 do</text:p>
      <text:p text:style-name="P452"><text:s text:c="2"/>begin</text:p>
      <text:p text:style-name="P452"><text:s text:c="4"/>Active := true;</text:p>
      <text:p text:style-name="P452"><text:s text:c="4"/>UserName := 'SYSDBA';</text:p>
      <text:p text:style-name="P452"><text:s text:c="4"/>FirstName := 'Donald';</text:p>
      <text:p text:style-name="P452"><text:s text:c="4"/>LastName := 'Duck';</text:p>
      <text:p text:style-name="P452"><text:s text:c="4"/>ModifyUser;</text:p>
      <text:p text:style-name="P452"><text:s text:c="2"/>end;</text:p>
      <text:list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450">The <text:span text:style-name="Symbol">DeleteUser</text:span> method is used to remove a users login details from the Security Database. The <text:span text:style-name="Symbol">UserName</text:span> property acts as the key identifying the user. For example:</text:p>
      <text:p text:style-name="P452"><text:s text:c="2"/>with IBSecurityService1 do</text:p>
      <text:p text:style-name="P452"><text:s text:c="2"/>begin</text:p>
      <text:p text:style-name="P452"><text:s text:c="4"/>Active := true;</text:p>
      <text:p text:style-name="P452"><text:s text:c="4"/>UserName := 'ALICE';</text:p>
      <text:p text:style-name="P452"><text:s text:c="4"/>DeleteUser;</text:p>
      <text:p text:style-name="P452"><text:s text:c="2"/>end;</text:p>
      <text:list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644"><text:span text:style-name="T281">The TIBValidationS</text:span>ervice supports the invocation of various database repair actions, including validation and sweep. Limbo Transactions can also be resolved. <text:span text:style-name="T118">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00751870738258"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45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162">Title</text:p>
          </table:table-cell>
          <table:table-cell table:style-name="Table62.A1" office:value-type="string">
            <text:p text:style-name="P162">Option</text:p>
          </table:table-cell>
          <table:table-cell table:style-name="Table62.C1" office:value-type="string">
            <text:p text:style-name="P162">Description</text:p>
          </table:table-cell>
        </table:table-row>
        <table:table-row>
          <table:table-cell table:style-name="Table62.A2" office:value-type="string">
            <text:p text:style-name="P456">List Limbo Transactions</text:p>
          </table:table-cell>
          <table:table-cell table:style-name="Table62.A2" office:value-type="string">
            <text:p text:style-name="P280">LimboTransactions</text:p>
          </table:table-cell>
          <table:table-cell table:style-name="Table62.C2" office:value-type="string">
            <text:p text:style-name="P459">Returns a text list of limbo transactions</text:p>
          </table:table-cell>
        </table:table-row>
        <table:table-row>
          <table:table-cell table:style-name="Table62.A2" office:value-type="string">
            <text:p text:style-name="P456">Check Database</text:p>
          </table:table-cell>
          <table:table-cell table:style-name="Table62.A2" office:value-type="string">
            <text:p text:style-name="P280">CheckDB</text:p>
          </table:table-cell>
          <table:table-cell table:style-name="Table62.C2" office:value-type="string">
            <text:p text:style-name="P459">Request read-only validation of the database, without correcting any problem</text:p>
          </table:table-cell>
        </table:table-row>
        <table:table-row>
          <table:table-cell table:style-name="Table62.A2" office:value-type="string">
            <text:p text:style-name="P456">Ignore all checksum errors</text:p>
          </table:table-cell>
          <table:table-cell table:style-name="Table62.A2" office:value-type="string">
            <text:p text:style-name="P280">IgnoreChecksum</text:p>
          </table:table-cell>
          <table:table-cell table:style-name="Table62.C2" office:value-type="string">
            <text:p text:style-name="P459">Refines database check</text:p>
          </table:table-cell>
        </table:table-row>
        <table:table-row>
          <table:table-cell table:style-name="Table62.A2" office:value-type="string">
            <text:p text:style-name="P456">Kill Shadow Files</text:p>
          </table:table-cell>
          <table:table-cell table:style-name="Table62.A2" office:value-type="string">
            <text:p text:style-name="P280">KillShadows</text:p>
          </table:table-cell>
          <table:table-cell table:style-name="Table62.C2" office:value-type="string">
            <text:p text:style-name="P459">Remove references to unavailable shadow files</text:p>
          </table:table-cell>
        </table:table-row>
        <table:table-row>
          <table:table-cell table:style-name="Table62.A2" office:value-type="string">
            <text:p text:style-name="P456">Mend Database</text:p>
          </table:table-cell>
          <table:table-cell table:style-name="Table62.A2" office:value-type="string">
            <text:p text:style-name="P280">MendDB</text:p>
          </table:table-cell>
          <table:table-cell table:style-name="Table62.C2" office:value-type="string">
            <text:p text:style-name="P459">Mark corrupted records as unavailable, so subsequent operations skip them</text:p>
          </table:table-cell>
        </table:table-row>
        <table:table-row>
          <table:table-cell table:style-name="Table62.A2" office:value-type="string">
            <text:p text:style-name="P456">Sweep Database</text:p>
          </table:table-cell>
          <table:table-cell table:style-name="Table62.A2" office:value-type="string">
            <text:p text:style-name="P280">SweepDB</text:p>
          </table:table-cell>
          <table:table-cell table:style-name="Table62.C2" office:value-type="string">
            <text:p text:style-name="P459">Request database sweep to mark outdated records as free space;</text:p>
          </table:table-cell>
        </table:table-row>
        <table:table-row>
          <table:table-cell table:style-name="Table62.A2" office:value-type="string">
            <text:p text:style-name="P456">Validate Database</text:p>
          </table:table-cell>
          <table:table-cell table:style-name="Table62.A2" office:value-type="string">
            <text:p text:style-name="P280">ValidateDB</text:p>
          </table:table-cell>
          <table:table-cell table:style-name="Table62.C2" office:value-type="string">
            <text:p text:style-name="P459">Locate and release pages that are allocated but unassigned to any data structures</text:p>
          </table:table-cell>
        </table:table-row>
        <table:table-row>
          <table:table-cell table:style-name="Table62.A2" office:value-type="string">
            <text:p text:style-name="P456">Full Database Validation</text:p>
          </table:table-cell>
          <table:table-cell table:style-name="Table62.A2" office:value-type="string">
            <text:p text:style-name="P280">ValidateFull</text:p>
          </table:table-cell>
          <table:table-cell table:style-name="Table62.C2" office:value-type="string">
            <text:p text:style-name="P459">Check record and page structures, releasing unassigned record fragments. Use with Validate Database</text:p>
          </table:table-cell>
        </table:table-row>
      </table:table>
      <text:p text:style-name="P278"/>
      <text:p text:style-name="P95">For example:</text:p>
      <text:p text:style-name="P97"><text:s text:c="4"/>with IBValidationService1 do</text:p>
      <text:p text:style-name="P97"><text:s text:c="4"/>begin</text:p>
      <text:p text:style-name="P97"><text:s text:c="6"/>DatabaseName := 'MyDatabase';</text:p>
      <text:p text:style-name="P97"><text:s text:c="6"/>Options := [ValidateDB,ValidateFull];</text:p>
      <text:p text:style-name="P97"><text:s text:c="6"/>Active := true;</text:p>
      <text:p text:style-name="P97"><text:s text:c="6"/>ServiceStart;</text:p>
      <text:p text:style-name="P97"><text:s text:c="6"/>while not Eof do</text:p>
      <text:p text:style-name="P97"><text:s text:c="6"/>begin</text:p>
      <text:p text:style-name="P97"><text:s text:c="8"/>writeln(GetNextLine);</text:p>
      <text:p text:style-name="P97"><text:soft-page-break/><text:s text:c="8"/>Application.ProcessMessages;</text:p>
      <text:p text:style-name="P97"><text:s text:c="6"/>end;</text:p>
      <text:p text:style-name="P97"><text:s text:c="4"/>end;</text:p>
      <text:h text:style-name="P956" text:outline-level="3"><text:bookmark-start text:name="__RefHeading___Toc15868_148275515"/>Resolving Limbo Transactions<text:bookmark-end text:name="__RefHeading___Toc15868_148275515"/></text:h>
      <text:p text:style-name="P96">There are two step<text:span text:style-name="T253">s</text:span> to the resolution of limbo transactions. The first step retrieves a list of all limbo transactions. The second step commits or rolls back each transaction as required.</text:p>
      <text:p text:style-name="P96">The <text:span text:style-name="Symbol">FetchLimboTransactionInfo</text:span> method is used to retrieve list of limbo transactions. After completion, the list may be found in the <text:span text:style-name="Symbol">LimboTransactionInfo</text:span> property. For example:</text:p>
      <text:p text:style-name="P97">var i: integer;</text:p>
      <text:p text:style-name="P97">begin</text:p>
      <text:p text:style-name="P97"><text:s text:c="2"/>with IBValidationService1 do</text:p>
      <text:p text:style-name="P97"><text:s text:c="2"/>begin</text:p>
      <text:p text:style-name="P97"><text:s text:c="4"/>Active := true;</text:p>
      <text:p text:style-name="P97"><text:s text:c="4"/>ServiceStart;</text:p>
      <text:p text:style-name="P97"><text:s text:c="4"/>FetchLimboTransactionInfo;</text:p>
      <text:p text:style-name="P97"><text:s text:c="4"/>for i := 0 to LimboTransactionInfoCount - 1 do</text:p>
      <text:p text:style-name="P97"><text:s text:c="4"/>with LimboTransactionInfo[i] do</text:p>
      <text:p text:style-name="P97"><text:s text:c="4"/>begin</text:p>
      <text:p text:style-name="P97"><text:s text:c="6"/>write('ID = ',ID);</text:p>
      <text:p text:style-name="P97"><text:s text:c="6"/>if MultiDatabase then</text:p>
      <text:p text:style-name="P97"><text:s text:c="8"/>write(', Multi DB')</text:p>
      <text:p text:style-name="P97"><text:s text:c="6"/>else</text:p>
      <text:p text:style-name="P97"><text:s text:c="8"/>write(' ,Single DB');</text:p>
      <text:p text:style-name="P97"><text:s text:c="6"/>write(', Host Site = ', HostSite);</text:p>
      <text:p text:style-name="P97"><text:s text:c="6"/>write(', Remote Site = ', RemoteSite);</text:p>
      <text:p text:style-name="P97"><text:s text:c="6"/>write(', Database Path = ', RemoteDatabasePath);</text:p>
      <text:p text:style-name="P97"><text:s text:c="6"/>write(', State = ', StateToStr(State));</text:p>
      <text:p text:style-name="P97"><text:s text:c="6"/>writeln(', Advise = ', AdviseToStr(Advise));</text:p>
      <text:p text:style-name="P97"><text:s text:c="4"/>end;</text:p>
      <text:p text:style-name="P97"><text:s text:c="2"/>end;</text:p>
      <text:p text:style-name="P97">end;</text:p>
      <text:p text:style-name="P102">where</text:p>
      <text:p text:style-name="P104">function StateToStr(State: TTransactionState): string;</text:p>
      <text:p text:style-name="P104">begin</text:p>
      <text:p text:style-name="P104"><text:s text:c="2"/>case State of</text:p>
      <text:p text:style-name="P104"><text:s text:c="2"/>LimboState:</text:p>
      <text:p text:style-name="P104"><text:s text:c="4"/>Result := 'Limbo';</text:p>
      <text:p text:style-name="P104"><text:s text:c="2"/>CommitState:</text:p>
      <text:p text:style-name="P104"><text:s text:c="4"/>Result := 'Commit';</text:p>
      <text:p text:style-name="P104"><text:s text:c="2"/>RollbackState:</text:p>
      <text:p text:style-name="P104"><text:s text:c="4"/>Result := 'Rollback';</text:p>
      <text:p text:style-name="P104"><text:s text:c="2"/>else</text:p>
      <text:p text:style-name="P104"><text:s text:c="4"/>Result := 'Unknown';</text:p>
      <text:p text:style-name="P104"><text:s text:c="2"/>end;</text:p>
      <text:p text:style-name="P104">end;</text:p>
      <text:p text:style-name="P104"/>
      <text:p text:style-name="P104">function AdviseToStr(Advise: TTransactionAdvise): string;</text:p>
      <text:p text:style-name="P104">begin</text:p>
      <text:p text:style-name="P104"><text:s text:c="2"/>case Advise of</text:p>
      <text:p text:style-name="P104"><text:s text:c="2"/>CommitAdvise:</text:p>
      <text:p text:style-name="P104"><text:s text:c="4"/>Result := 'Commit';</text:p>
      <text:p text:style-name="P104"><text:s text:c="2"/>RollbackAdvise:</text:p>
      <text:p text:style-name="P104"><text:s text:c="4"/>Result := 'Rollback';</text:p>
      <text:p text:style-name="P104"><text:s text:c="2"/>else</text:p>
      <text:p text:style-name="P104"><text:s text:c="4"/>Result := 'Unknown';</text:p>
      <text:p text:style-name="P104"><text:s text:c="2"/>end;</text:p>
      <text:p text:style-name="P104">end;</text:p>
      <text:p text:style-name="P102"><text:soft-page-break/>This list identifies each limbo transaction and its current state, it also suggests an action (advises). The user can review the list and set the <text:span text:style-name="Symbol">T</text:span><text:span text:style-name="Symbol"><text:span text:style-name="T199">L</text:span></text:span><text:span text:style-name="Symbol">imboTransactionInfo.Action</text:span> property to a desired outcome.</text:p>
      <text:p text:style-name="P102">The limbo transactions may then be resolved by setting the <text:span text:style-name="Symbol">GlobalAction</text:span> property and then calling the <text:span text:style-name="Symbol">FixLimboTransactionErrors</text:span> method.</text:p>
      <text:p text:style-name="P102">The <text:span text:style-name="Symbol">GlobalAction</text:span> determines how <text:span text:style-name="Symbol">FixLimboTransactionErrors</text:span> processes the limbo transactions and may be <text:span text:style-name="T199">set to</text:span>:</text:p>
      <table:table table:name="Table63" table:style-name="Table63">
        <table:table-column table:style-name="Table63.A"/>
        <table:table-column table:style-name="Table63.B"/>
        <table:table-row>
          <table:table-cell table:style-name="Table63.A1" office:value-type="string">
            <text:p text:style-name="P103"><text:span text:style-name="Symbol">CommitGlobal</text:span></text:p>
          </table:table-cell>
          <table:table-cell table:style-name="Table63.B1" office:value-type="string">
            <text:p text:style-name="P103">All limbo transactions are resolved by committing the transaction.</text:p>
          </table:table-cell>
        </table:table-row>
        <table:table-row>
          <table:table-cell table:style-name="Table63.A2" office:value-type="string">
            <text:p text:style-name="P103"><text:span text:style-name="Symbol">RollbackGlobal</text:span></text:p>
          </table:table-cell>
          <table:table-cell table:style-name="Table63.B2" office:value-type="string">
            <text:p text:style-name="P103">All limbo transactions are resolved by rolling back the transaction.</text:p>
          </table:table-cell>
        </table:table-row>
        <table:table-row>
          <table:table-cell table:style-name="Table63.A2" office:value-type="string">
            <text:p text:style-name="P103"><text:span text:style-name="Symbol">RecoverTwoPhaseGlobal</text:span></text:p>
          </table:table-cell>
          <table:table-cell table:style-name="Table63.B2" office:value-type="string">
            <text:p text:style-name="P103">All limbo transactions are resolved by performing a two phase commit of the transaction.</text:p>
          </table:table-cell>
        </table:table-row>
        <table:table-row>
          <table:table-cell table:style-name="Table63.A2" office:value-type="string">
            <text:p text:style-name="P103"><text:span text:style-name="Symbol">NoGlobalAction</text:span></text:p>
          </table:table-cell>
          <table:table-cell table:style-name="Table63.B2" office:value-type="string">
            <text:p text:style-name="P103">Limbo transactions are resolved by either committing or rolling back the transaction, as specified by each limbo transaction's Action property.</text:p>
          </table:table-cell>
        </table:table-row>
      </table:table>
      <text:p text:style-name="P102"/>
      <text:p text:style-name="P102">For example:</text:p>
      <text:p text:style-name="P104"><text:s text:c="2"/>with IBValidationService1 do</text:p>
      <text:p text:style-name="P104"><text:s text:c="2"/>begin</text:p>
      <text:p text:style-name="P104"><text:s text:c="4"/>GlobalAction := NoGlobalAction</text:p>
      <text:p text:style-name="P104"><text:s text:c="4"/>FixLimboTransactionErrors;</text:p>
      <text:p text:style-name="P104"><text:s text:c="4"/>while not Eof do</text:p>
      <text:p text:style-name="P104"><text:s text:c="4"/>begin</text:p>
      <text:p text:style-name="P104"><text:s text:c="6"/>writeln(GetNextLine);</text:p>
      <text:p text:style-name="P104"><text:s text:c="6"/>Application.ProcessMessages;</text:p>
      <text:p text:style-name="P104"><text:s text:c="4"/>end;</text:p>
      <text:p text:style-name="P104"><text:s text:c="2"/>end;</text:p>
      <text:list xml:id="list100750146654502"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578">Online Validation was introduced in Firebird 2.5 that allows some consistency checks to be performed without exclusive access to the database. It may:</text:p>
      <text:list text:style-name="L103">
        <text:list-item>
          <text:p text:style-name="P1169">validate some (or all) user tables in a database.</text:p>
        </text:list-item>
        <text:list-item>
          <text:p text:style-name="P1180">validate some (or all) indices</text:p>
        </text:list-item>
      </text:list>
      <text:p text:style-name="P278">Other ODS checks, such as Header/PIP/TIP/Generators pages, are not performed <text:span text:style-name="T281">by Online Validation. The TIBOnlineValidationService component is the IBX interface to online validation.</text:span></text:p>
      <text:list text:continue-list="list100750146654502"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584"><text:span text:style-name="Symbol"><text:span text:style-name="T281">IncludeTables</text:span></text:span></text:p>
          </table:table-cell>
          <table:table-cell table:style-name="Table64.B1" office:value-type="string">
            <text:p text:style-name="P579">This is a <text:span text:style-name="T282">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280"><text:span text:style-name="T281">This is the lock timeout in seconds. </text:span>default is 10 secs. 0 is no-wait, -1 is infinite wait.</text:p>
          </table:table-cell>
        </table:table-row>
      </table:table>
      <text:p text:style-name="P578"/>
      <text:list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102">For example:</text:p>
      <text:p text:style-name="P104"><text:s text:c="2"/>with IB<text:span text:style-name="T282">Online</text:span>ValidationService1 do</text:p>
      <text:p text:style-name="P104"><text:s text:c="2"/>begin</text:p>
      <text:p text:style-name="P104"><text:s text:c="4"/><text:span text:style-name="T282">Active := true;</text:span></text:p>
      <text:p text:style-name="P746"><text:s text:c="4"/>StartService;</text:p>
      <text:p text:style-name="P104"><text:s text:c="4"/>while not Eof do</text:p>
      <text:p text:style-name="P104"><text:s text:c="4"/>begin</text:p>
      <text:p text:style-name="P104"><text:s text:c="6"/>writeln(GetNextLine);</text:p>
      <text:p text:style-name="P104"><text:s text:c="6"/>Application.ProcessMessages;</text:p>
      <text:p text:style-name="P104"><text:s text:c="4"/>end;</text:p>
      <text:p text:style-name="P104"><text:s text:c="2"/>end;</text:p>
      <text:list text:continue-numbering="true" text:style-name="WW8Num2">
        <text:list-item>
          <text:h text:style-name="P807" text:outline-level="1"><text:bookmark-start text:name="__RefNumPara__19964_1614309218"/><text:bookmark-start text:name="__RefHeading___Toc19823_1614309218"/>IBX Buffer Management<text:bookmark-end text:name="__RefNumPara__19964_1614309218"/><text:bookmark-end text:name="__RefHeading___Toc19823_1614309218"/></text:h>
        </text:list-item>
      </text:list>
      <text:p text:style-name="P362"><text:span text:style-name="T392">In both Lazarus and Delphi, </text:span><text:span text:style-name="T393">a</text:span><text:span text:style-name="T392"> TDataset </text:span><text:span text:style-name="T393">derived object</text:span><text:span text:style-name="T392"> is used provide the data source for Data Aware Controls such as TDBGrid. TDataset itself is an abstract class that represents a database Table or, more generally, the results of a database query. </text:span><text:span text:style-name="T394">Database drivers, such as IBX, override TDataset to create a concrete class (e.g. TIBQuery) for processing query results as a dataset.</text:span></text:p>
      <text:list text:continue-numbering="true" text:style-name="WW8Num2">
        <text:list-item>
          <text:list>
            <text:list-item>
              <text:h text:style-name="P806" text:outline-level="2"><text:bookmark-start text:name="__RefHeading___Toc19825_1614309218"/>TDataset<text:bookmark-end text:name="__RefHeading___Toc19825_1614309218"/></text:h>
            </text:list-item>
          </text:list>
        </text:list-item>
      </text:list>
      <text:p text:style-name="P359">TDataset presents the query results as a matrix of rows and columns. Data is accessed by selecting a given row as the current row and then addressing the columns in that row by name or position.</text:p>
      <text:p text:style-name="P359">Datasets can be read only or read/write. In the latter case, the current row can be selected for edit, modified and the edited row “posted” back to the underlying database replacing the previous version of the row. It is also possible to delete the current row and to insert/<text:span text:style-name="T395">append</text:span> new rows. </text:p>
      <text:p text:style-name="P360">Semantically, “Append” always inserts a new row at the end of the rows returned by the query, while “Insert” inserts the row immediately before the current row. </text:p>
      <text:p text:style-name="Note"><text:span text:style-name="T396">Note: when a dataset is opened, the row order is that of the underlying table or query sort order. </text:span><text:span text:style-name="T397">This may be the order determined by the primary key or the ORDER BY clause of an SQL statement.</text:span><text:span text:style-name="T396"> When using Insert/Append the </text:span><text:span text:style-name="T397">new </text:span><text:span text:style-name="T396">row’</text:span><text:span text:style-name="T397">s primary key (or the current sort key)</text:span><text:span text:style-name="T396"> should </text:span><text:span text:style-name="T397">be appropriate for the row’s insertion point</text:span><text:span text:style-name="T396"> otherwise the row will appear in a different relative position when the dataset is closed and re-opened. It is up to the user of </text:span><text:span text:style-name="T394">a </text:span><text:span text:style-name="T396">TDataset </text:span><text:span text:style-name="T394">subclass to</text:span><text:span text:style-name="T396"> ensure that this is the case - </text:span><text:span text:style-name="T393">if this is important</text:span><text:span text:style-name="T396">.</text:span></text:p>
      <text:p text:style-name="P361">In order to use TDataset it must be sub-classed by a database driver. Each subclass implements a TDataset for a given type of database. For example, TIBQuery is a TDataset subclass implemented by IBX for use with a Firebird Database. <text:span text:style-name="T394">It is the responsibility of the subclass to perform buffer management.</text:span></text:p>
      <text:list xml:id="list100750662221305" text:continue-numbering="true" text:style-name="WW8Num2">
        <text:list-item>
          <text:list>
            <text:list-item>
              <text:list>
                <text:list-item>
                  <text:h text:style-name="A2" text:outline-level="2"><text:bookmark-start text:name="__RefHeading___Toc19827_1614309218"/>TDataset Buffers<text:bookmark-end text:name="__RefHeading___Toc19827_1614309218"/></text:h>
                </text:list-item>
              </text:list>
            </text:list-item>
          </text:list>
        </text:list-item>
      </text:list>
      <text:p text:style-name="P362"><text:span text:style-name="T398">TDataset provides a “sliding window” on the underlying dataset, using a variable length array of “</text:span><text:span text:style-name="T397">display </text:span><text:span text:style-name="T398">buffers” in sequential order. The </text:span><text:span text:style-name="T426">(TDataset) </text:span><text:span text:style-name="T398">window size should be sufficient to show all rows in (e.g.) the visible portion of a TDBGrid. The window is initially positioned at the start of the dataset and contains the first </text:span><text:span text:style-name="T22">n</text:span><text:span text:style-name="T88"> rows of the dataset. It can then be advanced forward until it reaches the end of the dataset. If the dataset is additionally opened in bi-directional mode (as opposed to uni-directional mode) then the window can also be moved backwards. </text:span><text:span text:style-name="T89">Irrespective of the mode, the user can </text:span><text:span text:style-name="T90">select any row</text:span><text:span text:style-name="T89"> within the window, </text:span><text:span text:style-name="T90">by moving backwards or forwards</text:span><text:span text:style-name="T89">.</text:span></text:p>
      <text:p text:style-name="P362"><text:span text:style-name="T88">T</text:span><text:span text:style-name="T96">he buffer pointers are </text:span><text:span text:style-name="T90">themselves </text:span><text:span text:style-name="T96">opaque pointers to “buffers”. TDataset does not know how each buffer is structured or how row data </text:span><text:span text:style-name="T90">(the columns, etc.) are</text:span><text:span text:style-name="T96"> organised within a buffer. The database driver contains this information </text:span><text:span text:style-name="T95">in </text:span><text:span text:style-name="T384">its</text:span><text:span text:style-name="T95"> TDataSet subclass</text:span><text:span text:style-name="T96"> and implements methods that provide access to buffer data.</text:span></text:p>
      <text:p text:style-name="P362"><text:span text:style-name="T91">TDataset </text:span><text:span text:style-name="T92">provides</text:span><text:span text:style-name="T91"> </text:span><text:span text:style-name="T92">a number of</text:span><text:span text:style-name="T91"> </text:span><text:span text:style-name="T92">properties</text:span><text:span text:style-name="T91"> </text:span><text:span text:style-name="T92">relevant to</text:span><text:span text:style-name="T91"> the Buffer Pool:</text:span></text:p>
      <text:list text:style-name="L104">
        <text:list-item>
          <text:p text:style-name="P1181"><text:span text:style-name="Emphasis"><text:span text:style-name="T424">RecordCount</text:span></text:span><text:span text:style-name="T91">: </text:span><text:span text:style-name="T90">This is overridden in a subclass to return the current record count. Note that only when all rows have been read from the underlying dataset can this be assumed to </text:span><text:soft-page-break/><text:span text:style-name="T90">return the query row count. The property always returns -1 if not overridden by the subclass.</text:span></text:p>
        </text:list-item>
        <text:list-item>
          <text:p text:style-name="P1182"><text:span text:style-name="Emphasis">ActiveRecord</text:span><text:span text:style-name="T82"> is the index of the </text:span><text:span text:style-name="T90">display </text:span><text:span text:style-name="T82">buffer that is the ActiveBuffer e.g. if TDataset.Delete is called then the dataset row deleted is the one currently in the </text:span><text:span text:style-name="T93">A</text:span><text:span text:style-name="T82">ctiveBuffer.</text:span></text:p>
        </text:list-item>
        <text:list-item>
          <text:p text:style-name="P1181"><text:span text:style-name="Emphasis"><text:span text:style-name="T425">C</text:span></text:span><text:span text:style-name="Emphasis"><text:span text:style-name="T424">urrentRecord</text:span></text:span><text:span text:style-name="T91">: </text:span><text:span text:style-name="T82">The current record is the </text:span><text:span text:style-name="T90">index of the </text:span><text:span text:style-name="T385">display buffer</text:span><text:span text:style-name="T82"> currently in use by the dataset. This can differ from the active record when the dataset performs operations involving other records. For example, when painting a data-aware grid, CurrentRecord cycles through all the visible records, while </text:span>ActiveRecord<text:span text:style-name="T82"> remains constant. </text:span></text:p>
        </text:list-item>
        <text:list-item>
          <text:p text:style-name="P1181"><text:span text:style-name="Emphasis"><text:span text:style-name="T425">RecNo</text:span></text:span><text:span text:style-name="T92">: </text:span><text:span text:style-name="T90">This is the index of the CurrentRecord in the underlying dataset. </text:span><text:span text:style-name="T94">It is allocated by the subclass and cannot be assumed to correspond with the relative order of the rows in a dataset – especially after insert/append/delete operations. When a given row is known to be associated with a specific RecNo, setting the value of RecNo will make this row the active record. i.e. it can be used to bookmark rows. The RecNo associated with a given record may change if a dataset is closed and reopened. </text:span><text:span text:style-name="T90">The property always returns -1 if not overridden by the subclass.</text:span></text:p>
        </text:list-item>
      </text:list>
      <text:list text:continue-list="list100750662221305" text:style-name="WW8Num2">
        <text:list-item>
          <text:list>
            <text:list-item>
              <text:list>
                <text:list-item>
                  <text:h text:style-name="A2" text:outline-level="2"><text:bookmark-start text:name="__RefHeading___Toc19829_1614309218"/>Buffer Pool Initialisation<text:bookmark-end text:name="__RefHeading___Toc19829_1614309218"/></text:h>
                </text:list-item>
              </text:list>
            </text:list-item>
          </text:list>
        </text:list-item>
      </text:list>
      <text:p text:style-name="P366">The TDataset protected methods <text:s/><text:span text:style-name="T399">SetBufListSize </text:span>and <text:s/><text:span text:style-name="T399">AllocRecordBuffer </text:span>are used for initialisation of the display buffer pool. Neither method is intended to be call<text:span text:style-name="T427">ed</text:span> by the user.</text:p>
      <text:p text:style-name="P367">TDataset.SetBufListSize is called <text:span text:style-name="T427">internally by TDataset </text:span>to allocate the memory for an array of pointers to the row buffers. <text:span text:style-name="T394">The abstract method </text:span>TDataset. AllocRecordBuffer is then called <text:span text:style-name="T400">from </text:span>SetBufListSize to allocate the memory for each of the row buffers in turn. The number of row buffers needed is calculated by querying each of the dataset's data sources for the maximum number required. </text:p>
      <text:p text:style-name="P362"><text:span text:style-name="T399">SetBufListSize is called when the dataset is opened and whenever a data source changes. It is a virtual method allowing a subclass to get an early indication of the number of buffers required. <text:s/>AllocRecordBuffer is </text:span><text:span text:style-name="T401">an empty sub</text:span><text:span text:style-name="T399"> and must be implemented by a subclass.</text:span></text:p>
      <text:p text:style-name="P362"><text:span text:style-name="T402">The number of buffers required is saved in </text:span><text:span text:style-name="T400">the private var</text:span><text:span text:style-name="T402"> FBufferCount. </text:span><text:span text:style-name="T400">This is readable by a subclass as the protecte</text:span><text:span text:style-name="T427">d</text:span><text:span text:style-name="T400"> property BufferCount. <text:s/>The buffer pointers are saved in the</text:span><text:span text:style-name="T402"> </text:span><text:span text:style-name="T400">private </text:span><text:span text:style-name="T402">array (FBuffers) </text:span><text:span text:style-name="T400">and</text:span><text:span text:style-name="T402"> indexed as 0..FBufferCount. </text:span></text:p>
      <text:p text:style-name="P362"><text:span text:style-name="T402">There is </text:span><text:span text:style-name="T382">hence</text:span><text:span text:style-name="T402"> an extra buffer in the pool. This “extra” buffer is used to read in a row from the database driver and then is swapped with the buffer in the display slot. This avoids the risk of a row being displayed while it is being updated. Inserted rows are similarly handled.</text:span></text:p>
      <text:list text:continue-numbering="true" text:style-name="WW8Num2">
        <text:list-item>
          <text:list>
            <text:list-item>
              <text:list>
                <text:list-item>
                  <text:h text:style-name="A2" text:outline-level="2"><text:bookmark-start text:name="__RefHeading___Toc19831_1614309218"/>Buffer Pool Destruction<text:bookmark-end text:name="__RefHeading___Toc19831_1614309218"/></text:h>
                </text:list-item>
              </text:list>
            </text:list-item>
          </text:list>
        </text:list-item>
      </text:list>
      <text:p text:style-name="P368"><text:span text:style-name="T403">When a dataset is closed, the display buffers are released. </text:span>The <text:span text:style-name="T403">protected </text:span>virtual method FreeRecordBuffer is called <text:span text:style-name="T403">so that the subclass can</text:span> free a buffer allocated by <text:s/><text:span text:style-name="T399">AllocRecordBuffer.</text:span></text:p>
      <text:list xml:id="list100751319046599" text:continue-numbering="true" text:style-name="WW8Num2">
        <text:list-item>
          <text:list>
            <text:list-item>
              <text:list>
                <text:list-item>
                  <text:h text:style-name="A2" text:outline-level="2"><text:bookmark-start text:name="__RefHeading___Toc19833_1614309218"/>Scrolling Through a Dataset<text:bookmark-end text:name="__RefHeading___Toc19833_1614309218"/></text:h>
                </text:list-item>
              </text:list>
            </text:list-item>
          </text:list>
        </text:list-item>
      </text:list>
      <text:p text:style-name="P362"><text:span text:style-name="T403">A subclass must override the GetRecord and <text:s/></text:span><text:span text:style-name="T404">InternalSetToRecord </text:span><text:span text:style-name="T403">methods in order to support dataset scrolling.</text:span></text:p>
      <text:p text:style-name="P369"><text:soft-page-break/><text:span text:style-name="T401">A database driver is expected to maintain a cursor on the underlying dataset. Initially, the cursor is at BOF. The cursor is then advanced to retrieve the first row in the dataset </text:span><text:span text:style-name="T407">and so on until all rows have been retrieved when the cursor is now at EOF. </text:span></text:p>
      <text:p text:style-name="P369">InternalSetToRecord <text:span text:style-name="T403">is called to set the dataset cursor to the CurrentRecord. GetRecord is then called to fill a display buffer with the dataset row </text:span><text:span text:style-name="T405">that is the CurrentRecord, or the previous row, or the next row. </text:span><text:span text:style-name="T406">Datasets may be scrolled either uni-directionally (top to bottom only) or bi-direction</text:span><text:span text:style-name="T405">a</text:span><text:span text:style-name="T406">lly. </text:span><text:span text:style-name="T405">In the former case, InternalSetToRecord can only advance the cursor and GetRecord cannot return the previous row.</text:span></text:p>
      <text:p text:style-name="P370">GetRecord is called to copy a dataset row into the indicated buffer. The row returned depends on the TGetMode parameter:</text:p>
      <text:list text:style-name="L105">
        <text:list-item>
          <text:p text:style-name="P1183">gmCurrent: the current row associated with the cursor. The cursor is not changed.</text:p>
        </text:list-item>
        <text:list-item>
          <text:p text:style-name="P1183">gmNext: the cursor is advanced and the new current row is returned.</text:p>
        </text:list-item>
        <text:list-item>
          <text:p text:style-name="P1183">gmPrior: the cursor is move backwards one row and the new current row returned.</text:p>
        </text:list-item>
      </text:list>
      <text:p text:style-name="P370">gmPrior is never used when the dataset is opened in uni-directional mode. In bi-directional mode, the database driver may have to implement an internal row cache if it is to satisfy gmPrior when the underlying cursor is uni-directional - as is typically the case.</text:p>
      <text:p text:style-name="P370">GetRecord returns gmOK on success or gmBOF/gmEOF to indicate no more rows for calls to gmPrior/gmNext. If may return gmError if the DoCheck parameter is true <text:span text:style-name="T408">and there is a problem accessing the database. Although the database driver may return an exception on error.</text:span></text:p>
      <text:list text:continue-list="list100751319046599" text:style-name="WW8Num2">
        <text:list-item>
          <text:list>
            <text:list-item>
              <text:list>
                <text:list-item>
                  <text:h text:style-name="A2" text:outline-level="2"><text:bookmark-start text:name="__RefHeading___Toc19835_1614309218"/>Row Editing<text:bookmark-end text:name="__RefHeading___Toc19835_1614309218"/></text:h>
                </text:list-item>
              </text:list>
            </text:list-item>
          </text:list>
        </text:list-item>
      </text:list>
      <text:p text:style-name="P362"><text:span text:style-name="T409">Only the active </text:span><text:span text:style-name="T410">record</text:span><text:span text:style-name="T409"> can be modified and only after the user calling TDataset.Edit </text:span><text:span text:style-name="T382">programatically</text:span><text:span text:style-name="T409"> or implicitly </text:span><text:span text:style-name="T410">by editing</text:span><text:span text:style-name="T409"> a Data Aware control. When the active row is placed into edit mode, the database driver should make a copy of the current row contents. This is so it can be restored if TDataset.Cancel is called to cancel all changes. Otherwise, the modifications are saved to the underlying database when TDataset.Post is called.</text:span></text:p>
      <text:list text:continue-numbering="true" text:style-name="WW8Num2">
        <text:list-item>
          <text:list>
            <text:list-item>
              <text:list>
                <text:list-item>
                  <text:h text:style-name="A2" text:outline-level="2"><text:bookmark-start text:name="__RefHeading___Toc19837_1614309218"/>Row Deletion<text:bookmark-end text:name="__RefHeading___Toc19837_1614309218"/></text:h>
                </text:list-item>
              </text:list>
            </text:list-item>
          </text:list>
        </text:list-item>
      </text:list>
      <text:p text:style-name="P371">The Active Row is deleted and removed from the TDataset buffers when the Delete method is called. The database driver also removes it from the underlying database <text:span text:style-name="T394">and any internal record cache </text:span>when TDataset.InternalDelete is called.</text:p>
      <text:list text:continue-numbering="true" text:style-name="WW8Num2">
        <text:list-item>
          <text:list>
            <text:list-item>
              <text:list>
                <text:list-item>
                  <text:h text:style-name="A2" text:outline-level="2"><text:bookmark-start text:name="__RefHeading___Toc19839_1614309218"/>Row Insert/Append<text:bookmark-end text:name="__RefHeading___Toc19839_1614309218"/></text:h>
                </text:list-item>
              </text:list>
            </text:list-item>
          </text:list>
        </text:list-item>
      </text:list>
      <text:p text:style-name="P372">TDataset provides two public methods to support insert/append, these are TDataset.Insert and TDataset.Append. The former inserts a new row immediately before the active record, while the later scrolls the dataset to the end and inserts a new row after the last row in the dataset. The new row becomes the active record and is immediately editable. The new row is saved to the underlying dataset when TDataset.Post is called, or removed if TDataset.Cancel is called before it is saved.</text:p>
      <text:p text:style-name="P362"><text:span text:style-name="T404">However, TDataset does nothing to ensure that </text:span><text:span text:style-name="T410">the new row</text:span><text:span text:style-name="T404"> is the correct relative row position </text:span><text:span text:style-name="T410">as defined by the query sort order</text:span><text:span text:style-name="T404">. The </text:span><text:span text:style-name="T410">user</text:span><text:span text:style-name="T404"> is expected to ensure that the row’s </text:span><text:span text:style-name="T410">column </text:span><text:span text:style-name="T404">values </text:span><text:span text:style-name="T410">mean</text:span><text:span text:style-name="T404"> </text:span><text:soft-page-break/><text:span text:style-name="T404">that it is correctly positioned according to the underlying quer</text:span><text:span text:style-name="T410">y’</text:span><text:span text:style-name="T404">s sort key. Otherwise, when the dataset is refreshed the </text:span><text:span text:style-name="T410">new</text:span><text:span text:style-name="T404"> row may appear in a different relative position.</text:span></text:p>
      <text:list text:continue-numbering="true" text:style-name="WW8Num2">
        <text:list-item>
          <text:list>
            <text:list-item>
              <text:list>
                <text:list-item>
                  <text:h text:style-name="A2" text:outline-level="2"><text:bookmark-start text:name="__RefHeading___Toc19841_1614309218"/>Accessing Fields<text:bookmark-end text:name="__RefHeading___Toc19841_1614309218"/></text:h>
                </text:list-item>
              </text:list>
            </text:list-item>
          </text:list>
        </text:list-item>
      </text:list>
      <text:p text:style-name="P362"><text:span text:style-name="T412">Terminology: TDataset refers to the individual columns as “fields”. The column values of the active record are accessed and set as the values of the corresponding fields. An object of the TField class is used to both describe a given field and to </text:span><text:span text:style-name="T382">provide access to</text:span><text:span text:style-name="T412"> the </text:span><text:span text:style-name="T427">field </text:span><text:span text:style-name="T412">data.</text:span></text:p>
      <text:p text:style-name="P373">A TField may also be a “calculated field”. The values of calculated fields are also held in the display buffer but are never written through to the underlying dataset. </text:p>
      <text:p text:style-name="P373">Fields may be accessed by name o<text:span text:style-name="T427">r</text:span> position and are associated with database columns by name,</text:p>
      <text:p text:style-name="P362"><text:span text:style-name="T411">TDataset provides two </text:span><text:span text:style-name="T412">public </text:span><text:span text:style-name="T411">virtual methods: GetFieldData and SetFieldData which are called to respectively copy </text:span><text:span text:style-name="T412">the column value</text:span><text:span text:style-name="T411"> from the </text:span><text:span text:style-name="T412">active record</text:span><text:span text:style-name="T411"> to the requested field and to update </text:span><text:span text:style-name="T412">the column value in the active record</text:span><text:span text:style-name="T411"> with the value of the Field. </text:span></text:p>
      <text:p text:style-name="P373">These methods must be overridden by the database driver as TDataset does not know how field data is stored in a display buffer,</text:p>
      <text:list text:continue-numbering="true" text:style-name="WW8Num2">
        <text:list-item>
          <text:list>
            <text:list-item>
              <text:list>
                <text:list-item>
                  <text:h text:style-name="A2" text:outline-level="2"><text:bookmark-start text:name="__RefHeading___Toc19843_1614309218"/>Calculated Fields<text:bookmark-end text:name="__RefHeading___Toc19843_1614309218"/></text:h>
                </text:list-item>
              </text:list>
            </text:list-item>
          </text:list>
        </text:list-item>
      </text:list>
      <text:p text:style-name="P374">Calculated fields represent an alternative to server side computed fields and are implemented client side.</text:p>
      <text:p text:style-name="P374">Calculated fields are defined at design time using the dataset’s field editor. Each has a name and type. When then buffer pool is initialised, space in each row buffer must also be allocated for each such field. The TDataSet event OnCalcFields is called whenever a row is read in or edited in order to set the field values. <text:span text:style-name="T427">It is the user's responsibility to set the value of each calculated field in the current record when OnCalcFields is called.</text:span></text:p>
      <text:list text:continue-numbering="true" text:style-name="WW8Num2">
        <text:list-item>
          <text:list>
            <text:list-item>
              <text:list>
                <text:list-item>
                  <text:h text:style-name="A2" text:outline-level="2"><text:bookmark-start text:name="__RefHeading___Toc19845_1614309218"/>Blob Support<text:bookmark-end text:name="__RefHeading___Toc19845_1614309218"/></text:h>
                </text:list-item>
              </text:list>
            </text:list-item>
          </text:list>
        </text:list-item>
      </text:list>
      <text:p text:style-name="P375">TDataset provides only the stub method CreateBlobStream in order to create a blob stream object to read or write a blob field’s value. Everything else is handled by the database driver <text:span text:style-name="T413">and its implementation of </text:span><text:span text:style-name="T411">GetFieldData and SetFieldData</text:span>.</text:p>
      <text:list xml:id="list100750658326436" text:continue-numbering="true" text:style-name="WW8Num2">
        <text:list-item>
          <text:list>
            <text:list-item>
              <text:h text:style-name="A2" text:outline-level="2"><text:bookmark-start text:name="__RefHeading___Toc19847_1614309218"/>Legacy IBX<text:bookmark-end text:name="__RefHeading___Toc19847_1614309218"/></text:h>
            </text:list-item>
          </text:list>
        </text:list-item>
      </text:list>
      <text:p text:style-name="P362"><text:span text:style-name="T413">Up</text:span><text:span text:style-name="T414"> to and including release 2.</text:span><text:span text:style-name="T433">6</text:span><text:span text:style-name="T414">.0 </text:span><text:span text:style-name="T415">IBX allocates individual buffers in response to a call to allocRecordBuffer and </text:span><text:span text:style-name="T414">maintains a separate row cache in a single memory block. Buffers in the cache are indexed using a unique record number allocated to each dataset row.</text:span></text:p>
      <text:p text:style-name="P362"><text:span text:style-name="T414">IBX also provides a “Cached Updates” mode of use. When this mode is selected, instead of writing through changes to the database when the change is posted (or a delete called), the changes are held in a pending state and applied as a batch or rolled back in a single operation. This implies that the original copies of each updated row </text:span><text:span text:style-name="T383">must also be</text:span><text:span text:style-name="T414"> held in a separate “pending” buffer block until the changes are applied or cancelled.</text:span></text:p>
      <text:p text:style-name="P376">Legacy IBX has several issues with its buffer management strategy:</text:p>
      <text:list text:style-name="L106">
        <text:list-item>
          <text:p text:style-name="P1185"><text:soft-page-break/>There is an “in memory” copy from the buffer cache to a display buffer <text:span text:style-name="T413">each time </text:span><text:span text:style-name="T428">t</text:span><text:span text:style-name="T413">he display window changes</text:span>. This is because the display buffers are separate from the buffer cache.</text:p>
        </text:list-item>
        <text:list-item>
          <text:p text:style-name="P1185">Using a single memory block for the buffer cache means that the entire block has to be reallocated when it needs to grow. Large datasets become increasingly inefficient.</text:p>
        </text:list-item>
        <text:list-item>
          <text:p text:style-name="P1186">Calculated fields are held in both the display buffers and the buffer cache even though they are always recalculated when copying from the cache.</text:p>
        </text:list-item>
        <text:list-item>
          <text:p text:style-name="P1184"><text:span text:style-name="T416">Buffer inserts are always placed at the end of the </text:span><text:span text:style-name="T413">buffer</text:span><text:span text:style-name="T416"> cache resulting in mis-ordering.</text:span></text:p>
        </text:list-item>
      </text:list>
      <text:list text:continue-list="list100750658326436" text:style-name="WW8Num2">
        <text:list-item>
          <text:list>
            <text:list-item>
              <text:h text:style-name="A2" text:outline-level="2"><text:bookmark-start text:name="__RefHeading___Toc19849_1614309218"/>IBX: Improved Buffer Management<text:bookmark-end text:name="__RefHeading___Toc19849_1614309218"/></text:h>
            </text:list-item>
          </text:list>
        </text:list-item>
      </text:list>
      <text:p text:style-name="P378">IBX 2.6 introduces a new buffer management strategy aimed at avoiding the above issues. </text:p>
      <text:list text:continue-numbering="true" text:style-name="WW8Num2">
        <text:list-item>
          <text:list>
            <text:list-item>
              <text:list>
                <text:list-item>
                  <text:h text:style-name="A3" text:outline-level="3"><text:bookmark-start text:name="__RefHeading___Toc19851_1614309218"/>The Display Buffer<text:bookmark-end text:name="__RefHeading___Toc19851_1614309218"/></text:h>
                </text:list-item>
              </text:list>
            </text:list-item>
          </text:list>
        </text:list-item>
      </text:list>
      <text:p text:style-name="P377">The most important change is for the display buffer pointer to point to an internal structure rather than an actual buffer. This structure is defined as:</text:p>
      <text:p text:style-name="P364">PDisplayBuffer = ^TDisplaybuffer;</text:p>
      <text:p text:style-name="P364">TDisplayBuffer = record</text:p>
      <text:p text:style-name="P364"><text:s text:c="8"/>dbBookmarkFlag: TBookmarkFlag;</text:p>
      <text:p text:style-name="P364"><text:s text:c="8"/>dbBookmarkData: array [1..sizeof(TIBRecordNumber)] of Byte;</text:p>
      <text:p text:style-name="P364"><text:s text:c="8"/>dbBuffer: PByte;</text:p>
      <text:p text:style-name="P364"><text:s text:c="8"/>dbCalcFields: PByte;</text:p>
      <text:p text:style-name="P364">end;</text:p>
      <text:p text:style-name="P364"/>
      <text:p text:style-name="P377">This structure is effectively an indirect pointer to the actual row buffer (dbBuffer) in the buffer cache. Instead of an in memory copy <text:span text:style-name="T417">when GetRecord returns the requested row into the display buffer, the new implementation of GetRecord simply updates dbBuffer to point to the </text:span><text:span text:style-name="T428">selected</text:span><text:span text:style-name="T417"> </text:span><text:span text:style-name="T428">row </text:span><text:span text:style-name="T417">cache buffer.</text:span></text:p>
      <text:p text:style-name="P362"><text:span text:style-name="T417">The new structure also allows for a separate buffer for calculated fields (dbCalcField). This allocated by AllocRecordBuffer and stays linked to the display buffer. </text:span><text:span text:style-name="T428">This avoids wasted space by </text:span><text:span text:style-name="T383">allocating space for</text:span><text:span text:style-name="T428"> calculated fields in every row cache buffer.</text:span></text:p>
      <text:p text:style-name="P379">The other two fields are required for TDataset local use and allow it to set a bookmark flag to access bookmark data.</text:p>
      <text:list text:continue-numbering="true" text:style-name="WW8Num2">
        <text:list-item>
          <text:list>
            <text:list-item>
              <text:list>
                <text:list-item>
                  <text:h text:style-name="A2" text:outline-level="2"><text:bookmark-start text:name="__RefHeading___Toc19853_1614309218"/>The Buffer Cache<text:bookmark-end text:name="__RefHeading___Toc19853_1614309218"/></text:h>
                </text:list-item>
              </text:list>
            </text:list-item>
          </text:list>
        </text:list-item>
      </text:list>
      <text:p text:style-name="P379">Instead of a single memory block being used for the buffer cache, a doubly linked list of memory blocks is used, each containing one or more buffers. This allows the buffer cache to be extended without having to copy the current memory block to a new larger one. </text:p>
      <text:p text:style-name="P379">One additional benefit is that it is now possible to allocate a small block for the initial allocation and then a larger block for each extension. This allows for a sensible default initial allocation for efficient memory use for small datasets whilst a larger extension allocation optimises large datasets.</text:p>
      <text:p text:style-name="P362"><text:soft-page-break/><text:span text:style-name="T417">The above results in a more complicated structure for the buffer cache. However, access has been carefully optimised to recognise that most references are to the current, next or previous buffer. Random access is </text:span><text:span text:style-name="T383">achieved</text:span><text:span text:style-name="T417"> by “walking” the buffer blocks and to find the block containing the required buffer and then direct access to the array of buffers in the block.</text:span></text:p>
      <text:p text:style-name="P379">Row deletion is handled by marking a buffer as containing a deleted row. It can then be skipped by next and previous operations. It retains its record number thus not affecting random access time<text:span text:style-name="T428">s</text:span>.</text:p>
      <text:p text:style-name="P379">Insertions are permitted and implemented by <text:span text:style-name="T418">permitting out of sequence next and previous operations. This ensures that inserted rows no longer “jump” to the end of the dataset when they scroll out of the current window.</text:span></text:p>
      <text:list text:continue-numbering="true" text:style-name="WW8Num2">
        <text:list-item>
          <text:list>
            <text:list-item>
              <text:h text:style-name="A2" text:outline-level="2"><text:bookmark-start text:name="__RefHeading___Toc19855_1614309218"/>Implementation<text:bookmark-end text:name="__RefHeading___Toc19855_1614309218"/></text:h>
            </text:list-item>
          </text:list>
        </text:list-item>
      </text:list>
      <text:p text:style-name="P380">The new buffer management strategy is implemented as a set of helper classes rather than as part of TCustomIBDataset – which was the previous strategy. This should result in a clearer and more maintainable implementation. </text:p>
      <text:p text:style-name="P380">It also allows for a straightforward implementation of the different buffer managers that IBX uses i.e.</text:p>
      <text:list text:style-name="L107">
        <text:list-item>
          <text:p text:style-name="P1187">uni-directional</text:p>
        </text:list-item>
        <text:list-item>
          <text:p text:style-name="P1187">bi-directional, and</text:p>
        </text:list-item>
        <text:list-item>
          <text:p text:style-name="P1187">cached updates.</text:p>
        </text:list-item>
      </text:list>
      <text:p text:style-name="P380">Each depend on a common base class and helper classes with the differences found in separate subclasses. Again, the result should result in a clearer and more maintainable implementation. The Buffer Managers are instantiated as COM interfaces.</text:p>
      <text:p text:style-name="P380">The opportunity has also been taken to optimise the transfer of columns values to and from Firebird database buffers and, in particular, for Refresh, Update and Insert Operations. In this case, Legacy IBX matched SQL parameter names to field names every time such an operation was performed. In the new implementation, the names are matched once, on first use, and column numbers are used thereafter.</text:p>
      <text:p text:style-name="P380">The Buffer Management Classes are:</text:p>
      <table:table table:name="Table87" table:style-name="Table87">
        <table:table-column table:style-name="Table87.A"/>
        <table:table-column table:style-name="Table87.B"/>
        <table:table-row>
          <table:table-cell table:style-name="Table87.A1" office:value-type="string">
            <text:list text:style-name="L8">
              <text:list-item>
                <text:p text:style-name="P1188">TIBSelectCursor</text:p>
              </text:list-item>
            </text:list>
          </table:table-cell>
          <table:table-cell table:style-name="Table87.B1" office:value-type="string">
            <text:p text:style-name="P381">This is the base class for all IBX Buffer Managers. It provides all common functions. <text:span text:style-name="T419">It also includes the logic for transferring column values to and from Firebird row buffers.</text:span></text:p>
          </table:table-cell>
        </table:table-row>
        <table:table-row>
          <table:table-cell table:style-name="Table87.A2" office:value-type="string">
            <text:list text:continue-numbering="true" text:style-name="L8">
              <text:list-item>
                <text:p text:style-name="P1188">TIBEditableCursor</text:p>
              </text:list-item>
            </text:list>
          </table:table-cell>
          <table:table-cell table:style-name="Table87.B2" office:value-type="string">
            <text:p text:style-name="P796">This subclasses TIBSelectCursor and adds Update/Insert/Delete functionality.</text:p>
          </table:table-cell>
        </table:table-row>
        <table:table-row>
          <table:table-cell table:style-name="Table87.A2" office:value-type="string">
            <text:list text:continue-numbering="true" text:style-name="L8">
              <text:list-item>
                <text:p text:style-name="P1188">TIBUniDirectionalCursor</text:p>
              </text:list-item>
            </text:list>
          </table:table-cell>
          <table:table-cell table:style-name="Table87.B2" office:value-type="string">
            <text:p text:style-name="P796">This subclasses TIBSelectCursor and implements a uni-directional buffer manager.</text:p>
          </table:table-cell>
        </table:table-row>
        <table:table-row>
          <table:table-cell table:style-name="Table87.A2" office:value-type="string">
            <text:list text:continue-numbering="true" text:style-name="L8">
              <text:list-item>
                <text:p text:style-name="P1188">TIBBiDirectionalCursor</text:p>
              </text:list-item>
            </text:list>
          </table:table-cell>
          <table:table-cell table:style-name="Table87.B2" office:value-type="string">
            <text:p text:style-name="P796">This subclasses TIBSelectCursor and implements a bi-directional buffer manager.</text:p>
          </table:table-cell>
        </table:table-row>
      </table:table>
      <text:p text:style-name="P380"/>
      <text:p text:style-name="P362"><text:soft-page-break/><text:span text:style-name="T420">The common functions for the Cached Updates Buffer Management are </text:span><text:span text:style-name="T428">also </text:span><text:span text:style-name="T420">implemented by </text:span><text:span text:style-name="T421">TIBEditableCursor, </text:span><text:span text:style-name="T420">while specific variations for uni and bi-directional buffer management are implemented by the respective buffer managers. “Cached updates” is selected when the buffer manager is created.</text:span></text:p>
      <text:p text:style-name="P382">The most important feature of cached updates is in the way copies of a row are saved when the row is put into edit mode.</text:p>
      <text:p text:style-name="P382">Without cached updates, a <text:span text:style-name="T422">single “Old Buffer” is used to hold a copy of the edited row. This can be discarded when the row changes are posted to the dataset – or the edits cancelled. When updates are cached, a separate buffer pool is used to hold “</text:span><text:span text:style-name="T428">old” </text:span><text:span text:style-name="T422">copies of all edited rows for use if updates are cancelled. They can only be discarded after updates are applied. Th</text:span><text:span text:style-name="T428">is</text:span><text:span text:style-name="T422"> buffer pool can be “walked” in reverse order when applying the updates and walked forward when cancelled updates allowing for efficient application of cached upda</text:span><text:span text:style-name="T428">t</text:span><text:span text:style-name="T422">es.</text:span></text:p>
      <text:p text:style-name="P362"><text:span text:style-name="T422">The buffer managers use a set of helper classes </text:span><text:span text:style-name="T383">used</text:span><text:span text:style-name="T422"> to implement the buffer pools. These are:</text:span></text:p>
      <table:table table:name="Table88" table:style-name="Table88">
        <table:table-column table:style-name="Table88.A"/>
        <table:table-column table:style-name="Table88.B"/>
        <table:table-row>
          <table:table-cell table:style-name="Table88.A1" office:value-type="string">
            <text:list text:continue-numbering="true" text:style-name="L8">
              <text:list-item>
                <text:p text:style-name="P1188">TIBSimpleBufferPool</text:p>
              </text:list-item>
            </text:list>
          </table:table-cell>
          <table:table-cell table:style-name="Table88.B1" office:value-type="string">
            <text:p text:style-name="P365"><text:span text:style-name="T421">This is the base class for </text:span><text:span text:style-name="T422">the buffer pools</text:span><text:span text:style-name="T421">. </text:span><text:span text:style-name="T422">It implements a multi-block buffer pool where each block contains an array of one or more buffers. </text:span><text:span text:style-name="T419">Each buffer is given a unique sequential record number that may be used for random access to the buffer.</text:span></text:p>
          </table:table-cell>
        </table:table-row>
        <table:table-row>
          <table:table-cell table:style-name="Table88.A2" office:value-type="string">
            <text:list text:continue-numbering="true" text:style-name="L8">
              <text:list-item>
                <text:p text:style-name="P1188">TIBBufferPool</text:p>
              </text:list-item>
            </text:list>
          </table:table-cell>
          <table:table-cell table:style-name="Table88.B2" office:value-type="string">
            <text:p text:style-name="P797">This is a subclass of <text:span text:style-name="T421">TIBSimpleBufferPool </text:span>and extends it to support buffer deletion and insertion.</text:p>
          </table:table-cell>
        </table:table-row>
        <table:table-row>
          <table:table-cell table:style-name="Table88.A2" office:value-type="string">
            <text:list text:continue-numbering="true" text:style-name="L8">
              <text:list-item>
                <text:p text:style-name="P1188">TIBOldBufferPool</text:p>
              </text:list-item>
            </text:list>
          </table:table-cell>
          <table:table-cell table:style-name="Table88.B2" office:value-type="string">
            <text:p text:style-name="P797">This is a subclass of <text:span text:style-name="T421">TIBSimpleBufferPool </text:span>and extends it to <text:span text:style-name="T423">provide a pool of buffers used to hold old row copies in support of cached updates.</text:span></text:p>
          </table:table-cell>
        </table:table-row>
      </table:table>
      <text:p text:style-name="P3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family-generic="system" style:font-pitch="variable"/>
    <style:font-face style:name="Droid Sans Mono" svg:font-family="'Droid Sans Mono'" style:font-adornments="Regular" style:font-family-generic="swiss" style:font-pitch="fixed"/>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style:font-face style:name="serif" svg:font-family="serif"/>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1"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1"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class="chapter">
      <style:paragraph-properties fo:margin-left="0in" fo:margin-right="0in" fo:margin-top="0in" fo:margin-bottom="0.1701in" style: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2"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style: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style: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min-label-distance="0.1in"/>
      </text:list-level-style-number>
      <text:list-level-style-number text:level="2" loext:num-list-format="%1%.%2%" style:num-format="1" text:display-levels="2">
        <style:list-level-properties text:min-label-distance="0.1in"/>
      </text:list-level-style-number>
      <text:list-level-style-number text:level="3" loext:num-list-format="%1%.%2%.%3%" style:num-format="1" text:display-levels="3">
        <style:list-level-properties text:min-label-width="0.3in" text:min-label-distance="0.1in"/>
      </text:list-level-style-number>
      <text:list-level-style-number text:level="4" text:style-name="Numbering_20_Symbols" loext:num-list-format="%1%.%2%.%3%.%4%" style:num-format="1" text:display-levels="4">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6 May 202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IBX Buffer Management</text:chapter></text:span></text:p>
      </style:header>
      <style:footer>
        <text:p text:style-name="MP10"><text:page-number text:select-page="current">159</text:page-number></text:p>
      </style:footer>
    </style:master-page>
    <style:master-page style:name="Left_20_Page" style:display-name="Left Page" style:page-layout-name="Mpm6" draw:style-name="Mdp1"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draw:style-name="Mdp2" style:next-style-name="Front_20_Left">
      <style:footer>
        <text:p text:style-name="MP13"><text:page-number text:select-page="current">vii</text:page-number></text:p>
      </style:footer>
    </style:master-page>
    <style:master-page style:name="Front_20_Left" style:display-name="Front Left" style:page-layout-name="Mpm8" draw:style-name="Mdp1" style:next-style-name="Front_20_Right">
      <style:footer>
        <text:p text:style-name="Footer"><text:page-number text:select-page="current">vi</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BX for Lazarus User Guide</dc:title>
    <meta:creation-date>2016-11-11T16:32:52.820297320</meta:creation-date>
    <meta:editing-cycles>478</meta:editing-cycles>
    <meta:editing-duration>P4DT14H25M53S</meta:editing-duration>
    <meta:initial-creator>Tony Whyman</meta:initial-creator>
    <dc:date>2026-05-06T10:07:48.966654728</dc:date>
    <meta:print-date>2018-12-03T16:02:48.055290158</meta:print-date>
    <meta:document-statistic meta:table-count="78" meta:image-count="48" meta:object-count="1" meta:page-count="167" meta:paragraph-count="3666" meta:word-count="49770" meta:character-count="316192" meta:non-whitespace-character-count="26821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